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5">
      <style:text-properties fo:language="en" fo:country="GB" officeooo:rsid="00639376" officeooo:paragraph-rsid="0064adb3"/>
    </style:style>
    <style:style style:name="P49" style:family="paragraph" style:parent-style-name="Text_20_body" style:list-style-name="L26"/>
    <style:style style:name="P50" style:family="paragraph" style:parent-style-name="Heading_20_4">
      <style:text-properties officeooo:rsid="006c8dae" officeooo:paragraph-rsid="006c8dae"/>
    </style:style>
    <style:style style:name="P51" style:family="paragraph" style:parent-style-name="Text_20_body">
      <style:text-properties officeooo:rsid="006c8dae" officeooo:paragraph-rsid="006c8dae"/>
    </style:style>
    <style:style style:name="P52" style:family="paragraph" style:parent-style-name="Standard">
      <style:text-properties style:font-name="Cascadia Mono1" fo:font-size="10pt" officeooo:paragraph-rsid="006c8dae" style:font-size-asian="10pt" style:font-size-complex="10pt"/>
    </style:style>
    <style:style style:name="P53" style:family="paragraph" style:parent-style-name="Standard">
      <style:text-properties officeooo:paragraph-rsid="006c8dae"/>
    </style:style>
    <style:style style:name="P54" style:family="paragraph" style:parent-style-name="Text_20_body">
      <style:text-properties officeooo:rsid="001fef5a" officeooo:paragraph-rsid="0022f813"/>
    </style:style>
    <style:style style:name="P55" style:family="paragraph" style:parent-style-name="Text_20_body">
      <style:text-properties officeooo:paragraph-rsid="00708bb9"/>
    </style:style>
    <style:style style:name="P56" style:family="paragraph" style:parent-style-name="Text_20_body" style:list-style-name="L27"/>
    <style:style style:name="P57"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8" style:family="paragraph" style:parent-style-name="Text_20_body">
      <style:paragraph-properties fo:margin-left="1.251cm" fo:margin-right="0cm" fo:margin-top="0cm" fo:margin-bottom="0.212cm" style:contextual-spacing="false" fo:text-indent="-0.582cm" style:auto-text-indent="false"/>
    </style:style>
    <style:style style:name="P59"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0"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61"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62"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63" style:family="paragraph" style:parent-style-name="Text_20_body" style:list-style-name="L28">
      <style:paragraph-properties fo:margin-left="0cm" fo:margin-right="0cm" fo:text-indent="0cm" style:auto-text-indent="false"/>
    </style:style>
    <style:style style:name="P64" style:family="paragraph" style:parent-style-name="Text_20_body" style:list-style-name="L29"/>
    <style:style style:name="P65" style:family="paragraph" style:parent-style-name="Text_20_body" style:list-style-name="L30"/>
    <style:style style:name="P66" style:family="paragraph" style:parent-style-name="Text_20_body" style:list-style-name="L31"/>
    <style:style style:name="P67" style:family="paragraph" style:parent-style-name="Text_20_body" style:list-style-name="L32"/>
    <style:style style:name="P68" style:family="paragraph" style:parent-style-name="Text_20_body" style:list-style-name="L32">
      <style:text-properties fo:font-style="italic" style:font-style-asian="italic" style:font-style-complex="italic"/>
    </style:style>
    <style:style style:name="P69" style:family="paragraph" style:parent-style-name="Text_20_body" style:list-style-name="L33"/>
    <style:style style:name="P70" style:family="paragraph" style:parent-style-name="Text_20_body" style:list-style-name="L34"/>
    <style:style style:name="P71" style:family="paragraph" style:parent-style-name="Text_20_body" style:list-style-name="L35"/>
    <style:style style:name="P72" style:family="paragraph" style:parent-style-name="Text_20_body" style:list-style-name="L36">
      <style:text-properties fo:language="en" fo:country="GB" officeooo:paragraph-rsid="004bd719"/>
    </style:style>
    <style:style style:name="P73" style:family="paragraph" style:parent-style-name="Text_20_body" style:list-style-name="L36">
      <style:text-properties fo:language="en" fo:country="GB"/>
    </style:style>
    <style:style style:name="P74" style:family="paragraph" style:parent-style-name="Text_20_body">
      <style:text-properties fo:language="en" fo:country="GB"/>
    </style:style>
    <style:style style:name="P75" style:family="paragraph">
      <style:paragraph-properties fo:text-align="center"/>
    </style:style>
    <style:style style:name="P76" style:family="paragraph">
      <style:paragraph-properties fo:text-align="center" style:writing-mode="lr-tb"/>
    </style:style>
    <style:style style:name="P77" style:family="paragraph">
      <loext:graphic-properties draw:fill-color="#ccffff"/>
      <style:paragraph-properties fo:text-align="center"/>
    </style:style>
    <style:style style:name="P78" style:family="paragraph">
      <loext:graphic-properties draw:fill-color="#ccffff"/>
      <style:paragraph-properties fo:text-align="center"/>
      <style:text-properties fo:font-size="12pt"/>
    </style:style>
    <style:style style:name="P79" style:family="paragraph">
      <loext:graphic-properties draw:fill-color="#83caff"/>
    </style:style>
    <style:style style:name="P80" style:family="paragraph">
      <loext:graphic-properties draw:fill-color="#ffffcc"/>
      <style:paragraph-properties fo:text-align="center"/>
    </style:style>
    <style:style style:name="P81" style:family="paragraph" style:parent-style-name="Text_20_body" style:list-style-name="L37">
      <style:text-properties fo:language="en" fo:country="GB"/>
    </style:style>
    <style:style style:name="P82" style:family="paragraph" style:parent-style-name="Text_20_body" style:list-style-name="L34">
      <style:text-properties fo:language="en" fo:country="GB"/>
    </style:style>
    <style:style style:name="P83" style:family="paragraph" style:parent-style-name="Text_20_body" style:list-style-name="L34">
      <style:text-properties fo:language="en" fo:country="GB" officeooo:rsid="00639376" officeooo:paragraph-rsid="00639376"/>
    </style:style>
    <style:style style:name="P84" style:family="paragraph" style:parent-style-name="Text_20_body">
      <style:text-properties fo:language="en" fo:country="GB" officeooo:paragraph-rsid="005119f7"/>
    </style:style>
    <style:style style:name="P85"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6" style:family="paragraph" style:parent-style-name="Text_20_body">
      <style:text-properties fo:language="en" fo:country="GB" officeooo:rsid="005119f7" officeooo:paragraph-rsid="005119f7"/>
    </style:style>
    <style:style style:name="P87" style:family="paragraph" style:parent-style-name="Text_20_body">
      <style:text-properties fo:language="en" fo:country="GB" officeooo:rsid="005c01e1" officeooo:paragraph-rsid="005c01e1"/>
    </style:style>
    <style:style style:name="P88" style:family="paragraph" style:parent-style-name="Heading_20_3">
      <style:text-properties officeooo:paragraph-rsid="005119f7"/>
    </style:style>
    <style:style style:name="P89" style:family="paragraph" style:parent-style-name="Text_20_body">
      <style:text-properties style:font-name="Cascadia Mono1" fo:font-size="10pt" style:font-size-asian="10pt" style:font-size-complex="10pt"/>
    </style:style>
    <style:style style:name="P90"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91" style:family="paragraph" style:parent-style-name="Standard">
      <style:paragraph-properties style:text-autospace="none"/>
      <style:text-properties fo:color="#000000" loext:opacity="100%" style:font-name="Cascadia Mono" fo:font-size="9.5pt" officeooo:paragraph-rsid="006bb2b6" style:font-name-asian="Cascadia Mono" style:font-size-asian="9.5pt" style:font-name-complex="Cascadia Mono" style:font-size-complex="9.5pt"/>
    </style:style>
    <style:style style:name="P92" style:family="paragraph" style:parent-style-name="Standard">
      <style:paragraph-properties style:text-autospace="none"/>
      <style:text-properties fo:color="#000000" loext:opacity="100%" style:font-name="Cascadia Mono" fo:font-size="9.5pt" officeooo:paragraph-rsid="006a25cb" style:font-name-asian="Cascadia Mono" style:font-size-asian="9.5pt" style:font-name-complex="Cascadia Mono" style:font-size-complex="9.5pt"/>
    </style:style>
    <style:style style:name="P93" style:family="paragraph" style:parent-style-name="Standard">
      <style:paragraph-properties style:text-autospace="none"/>
      <style:text-properties fo:color="#000000" loext:opacity="100%" style:font-name="Cascadia Mono" fo:font-size="9.5pt" officeooo:rsid="006a25cb" officeooo:paragraph-rsid="006c175d" style:font-name-asian="Cascadia Mono" style:font-size-asian="9.5pt" style:font-name-complex="Cascadia Mono" style:font-size-complex="9.5pt"/>
    </style:style>
    <style:style style:name="P94" style:family="paragraph" style:parent-style-name="Text_20_body" style:list-style-name="L38"/>
    <style:style style:name="P95" style:family="paragraph" style:parent-style-name="Text_20_body" style:list-style-name="L39"/>
    <style:style style:name="P96" style:family="paragraph" style:parent-style-name="Heading_20_3">
      <style:text-properties fo:language="en" fo:country="GB"/>
    </style:style>
    <style:style style:name="P97" style:family="paragraph" style:parent-style-name="Heading_20_4">
      <style:text-properties fo:language="en" fo:country="GB"/>
    </style:style>
    <style:style style:name="P98" style:family="paragraph" style:parent-style-name="Text_20_body" style:list-style-name="L40"/>
    <style:style style:name="P99" style:family="paragraph" style:parent-style-name="Text_20_body">
      <style:text-properties fo:font-size="12pt" style:font-size-asian="12pt" style:font-size-complex="12pt"/>
    </style:style>
    <style:style style:name="P100" style:family="paragraph" style:parent-style-name="Text_20_body" style:list-style-name="L41">
      <style:text-properties fo:font-size="12pt" style:font-size-asian="12pt" style:font-size-complex="12pt"/>
    </style:style>
    <style:style style:name="P101" style:family="paragraph" style:parent-style-name="Text_20_body" style:list-style-name="L42">
      <style:text-properties fo:font-size="12pt" style:font-size-asian="12pt" style:font-size-complex="12pt"/>
    </style:style>
    <style:style style:name="P102" style:family="paragraph" style:parent-style-name="Text_20_body" style:list-style-name="L43">
      <style:text-properties fo:font-size="12pt" style:font-size-asian="12pt" style:font-size-complex="12pt"/>
    </style:style>
    <style:style style:name="P103" style:family="paragraph" style:parent-style-name="Text_20_body">
      <style:paragraph-properties fo:margin-left="1.251cm" fo:margin-right="0cm" fo:text-indent="0cm" style:auto-text-indent="false"/>
      <style:text-properties fo:font-size="12pt" style:font-size-asian="12pt" style:font-size-complex="12pt"/>
    </style:style>
    <style:style style:name="P104" style:family="paragraph" style:parent-style-name="Text_20_body" style:list-style-name="L44">
      <style:text-properties fo:font-size="12pt" style:font-size-asian="12pt" style:font-size-complex="12pt"/>
    </style:style>
    <style:style style:name="P105" style:family="paragraph" style:parent-style-name="Text_20_body" style:list-style-name="L45"/>
    <style:style style:name="P106" style:family="paragraph" style:parent-style-name="Text_20_body" style:list-style-name="L46"/>
    <style:style style:name="P107" style:family="paragraph" style:parent-style-name="Text_20_body" style:list-style-name="L46">
      <style:text-properties style:font-name="Cascadia Mono1" fo:font-size="11pt" style:font-size-asian="11pt" style:font-size-complex="11pt"/>
    </style:style>
    <style:style style:name="P108" style:family="paragraph" style:parent-style-name="Text_20_body" style:list-style-name="L47"/>
    <style:style style:name="P109" style:family="paragraph" style:parent-style-name="Table_20_Heading">
      <style:paragraph-properties fo:text-align="center" style:justify-single-word="false"/>
    </style:style>
    <style:style style:name="P110" style:family="paragraph" style:parent-style-name="Table_20_Contents">
      <style:paragraph-properties fo:text-align="center" style:justify-single-word="false"/>
    </style:style>
    <style:style style:name="P111" style:family="paragraph" style:parent-style-name="Table_20_Contents">
      <style:text-properties officeooo:rsid="0069e89e" officeooo:paragraph-rsid="0069e89e"/>
    </style:style>
    <style:style style:name="P112" style:family="paragraph" style:parent-style-name="Table_20_Contents">
      <style:text-properties style:text-line-through-style="none" style:text-line-through-type="none" officeooo:rsid="006215c5" officeooo:paragraph-rsid="006215c5"/>
    </style:style>
    <style:style style:name="P113" style:family="paragraph" style:parent-style-name="Table_20_Contents">
      <style:text-properties officeooo:rsid="006215c5" officeooo:paragraph-rsid="006215c5"/>
    </style:style>
    <style:style style:name="P114" style:family="paragraph" style:parent-style-name="Table_20_Contents">
      <style:text-properties style:text-line-through-style="none" style:text-line-through-type="none"/>
    </style:style>
    <style:style style:name="P115" style:family="paragraph" style:parent-style-name="Table_20_Contents">
      <style:text-properties officeooo:rsid="0069e89e"/>
    </style:style>
    <style:style style:name="P116" style:family="paragraph" style:parent-style-name="Table_20_Contents">
      <style:text-properties officeooo:rsid="005c01e1" officeooo:paragraph-rsid="005c01e1"/>
    </style:style>
    <style:style style:name="P117" style:family="paragraph" style:parent-style-name="Table_20_Contents">
      <style:text-properties fo:font-weight="normal" style:font-weight-asian="normal" style:font-weight-complex="normal"/>
    </style:style>
    <style:style style:name="P118" style:family="paragraph" style:parent-style-name="Table_20_Contents">
      <style:text-properties fo:font-weight="normal" officeooo:rsid="005c01e1" officeooo:paragraph-rsid="005c01e1" style:font-weight-asian="normal" style:font-weight-complex="normal"/>
    </style:style>
    <style:style style:name="P119" style:family="paragraph" style:parent-style-name="Table_20_Contents">
      <style:text-properties officeooo:rsid="001f1707" officeooo:paragraph-rsid="001f1707"/>
    </style:style>
    <style:style style:name="P120" style:family="paragraph" style:parent-style-name="Table_20_Contents">
      <style:text-properties officeooo:rsid="0051b934" officeooo:paragraph-rsid="0051b934"/>
    </style:style>
    <style:style style:name="P121"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74de17"/>
    </style:style>
    <style:style style:name="T2" style:family="text">
      <style:text-properties officeooo:rsid="006546bf"/>
    </style:style>
    <style:style style:name="T3" style:family="text">
      <style:text-properties officeooo:rsid="006e4c18"/>
    </style:style>
    <style:style style:name="T4" style:family="text">
      <style:text-properties officeooo:rsid="0057ece6"/>
    </style:style>
    <style:style style:name="T5" style:family="text">
      <style:text-properties fo:font-style="italic" style:font-style-asian="italic" style:font-style-complex="italic"/>
    </style:style>
    <style:style style:name="T6" style:family="text">
      <style:text-properties style:font-name="Cascadia Mono1" fo:font-size="11pt" style:font-size-asian="11pt" style:font-size-complex="11pt"/>
    </style:style>
    <style:style style:name="T7" style:family="text">
      <style:text-properties officeooo:rsid="002e1e9a"/>
    </style:style>
    <style:style style:name="T8" style:family="text">
      <style:text-properties style:font-name="Arial1" fo:font-size="11pt" style:font-size-asian="11pt" style:font-size-complex="11pt"/>
    </style:style>
    <style:style style:name="T9" style:family="text">
      <style:text-properties fo:font-style="normal" style:font-style-asian="normal" style:font-style-complex="normal"/>
    </style:style>
    <style:style style:name="T10" style:family="text">
      <style:text-properties style:font-name="Cascadia Mono" fo:font-size="9.5pt" style:font-name-asian="Cascadia Mono" style:font-size-asian="9.5pt" style:font-name-complex="Cascadia Mono" style:font-size-complex="9.5pt"/>
    </style:style>
    <style:style style:name="T11" style:family="text">
      <style:text-properties style:font-name="Times New Roman" fo:font-size="12pt" style:font-name-asian="Cascadia Mono" style:font-size-asian="12pt" style:font-name-complex="Cascadia Mono" style:font-size-complex="12pt"/>
    </style:style>
    <style:style style:name="T12" style:family="text">
      <style:text-properties style:font-name="Cascadia Mono1" fo:font-size="10pt" style:font-name-asian="Cascadia Mono" style:font-size-asian="10pt" style:font-name-complex="Cascadia Mono" style:font-size-complex="10pt"/>
    </style:style>
    <style:style style:name="T13" style:family="text">
      <style:text-properties style:font-name="Times New Roman" fo:font-size="12pt" officeooo:rsid="002fb4de" style:font-name-asian="Cascadia Mono" style:font-size-asian="12pt" style:font-name-complex="Cascadia Mono" style:font-size-complex="12pt"/>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31e8a7"/>
    </style:style>
    <style:style style:name="T16" style:family="text">
      <style:text-properties officeooo:rsid="00301e12"/>
    </style:style>
    <style:style style:name="T17" style:family="text">
      <style:text-properties officeooo:rsid="0074914b"/>
    </style:style>
    <style:style style:name="T18" style:family="text">
      <style:text-properties officeooo:rsid="0072cd1c"/>
    </style:style>
    <style:style style:name="T19" style:family="text">
      <style:text-properties style:font-name="Cascadia Mono1" fo:font-size="10.5pt" style:font-size-asian="10.5pt" style:font-size-complex="10.5pt"/>
    </style:style>
    <style:style style:name="T20" style:family="text">
      <style:text-properties style:font-name="Cascadia Mono1" fo:font-size="10.5pt" officeooo:rsid="0033fe27" style:font-size-asian="10.5pt" style:font-size-complex="10.5pt"/>
    </style:style>
    <style:style style:name="T21" style:family="text">
      <style:text-properties fo:font-family="'Times New Roman'" style:font-family-generic="roman" style:font-family-asian="'Times New Roman'" style:font-family-generic-asian="roman" style:font-family-complex="'Times New Roman'" style:font-family-generic-complex="roman"/>
    </style:style>
    <style:style style:name="T22" style:family="text">
      <style:text-properties fo:font-family="'Times New Roman'" style:font-family-generic="roman"/>
    </style:style>
    <style:style style:name="T23" style:family="text">
      <style:text-properties style:font-name="Times New Roman"/>
    </style:style>
    <style:style style:name="T24" style:family="text">
      <style:text-properties officeooo:rsid="0017e84f"/>
    </style:style>
    <style:style style:name="T25" style:family="text">
      <style:text-properties officeooo:rsid="001993d5"/>
    </style:style>
    <style:style style:name="T26" style:family="text">
      <style:text-properties officeooo:rsid="0035c6ff"/>
    </style:style>
    <style:style style:name="T27" style:family="text">
      <style:text-properties officeooo:rsid="00366a4f"/>
    </style:style>
    <style:style style:name="T28" style:family="text">
      <style:text-properties officeooo:rsid="001fef5a"/>
    </style:style>
    <style:style style:name="T29" style:family="text">
      <style:text-properties officeooo:rsid="00645474"/>
    </style:style>
    <style:style style:name="T30" style:family="text">
      <style:text-properties officeooo:rsid="0064adb3"/>
    </style:style>
    <style:style style:name="T31" style:family="text">
      <style:text-properties officeooo:rsid="006c8dae"/>
    </style:style>
    <style:style style:name="T32" style:family="text">
      <style:text-properties style:font-name="Cascadia Mono1" fo:font-size="10pt" style:font-size-asian="10pt" style:font-size-complex="10pt"/>
    </style:style>
    <style:style style:name="T33" style:family="text">
      <style:text-properties style:font-name="Cascadia Mono1" fo:font-size="10pt" officeooo:rsid="006c8dae" style:font-size-asian="10pt" style:font-size-complex="10pt"/>
    </style:style>
    <style:style style:name="T34" style:family="text">
      <style:text-properties officeooo:rsid="0021d586"/>
    </style:style>
    <style:style style:name="T35" style:family="text">
      <style:text-properties officeooo:rsid="00382fad"/>
    </style:style>
    <style:style style:name="T36" style:family="text">
      <style:text-properties officeooo:rsid="0022f813"/>
    </style:style>
    <style:style style:name="T37"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8" style:family="text">
      <style:text-properties officeooo:rsid="0039cfc3"/>
    </style:style>
    <style:style style:name="T39" style:family="text">
      <style:text-properties officeooo:rsid="00405ee9"/>
    </style:style>
    <style:style style:name="T40" style:family="text">
      <style:text-properties fo:font-weight="bold" style:font-weight-asian="bold" style:font-weight-complex="bold"/>
    </style:style>
    <style:style style:name="T41" style:family="text">
      <style:text-properties officeooo:rsid="0042cea8"/>
    </style:style>
    <style:style style:name="T42" style:family="text">
      <style:text-properties officeooo:rsid="0041ec23"/>
    </style:style>
    <style:style style:name="T43" style:family="text">
      <style:text-properties officeooo:rsid="004489f9"/>
    </style:style>
    <style:style style:name="T44" style:family="text">
      <style:text-properties officeooo:rsid="00461f44"/>
    </style:style>
    <style:style style:name="T45" style:family="text">
      <style:text-properties officeooo:rsid="002c1d2b"/>
    </style:style>
    <style:style style:name="T46" style:family="text">
      <style:text-properties officeooo:rsid="0046c321"/>
    </style:style>
    <style:style style:name="T47" style:family="text">
      <style:text-properties fo:color="#a31515" loext:opacity="100%" style:font-name="Cascadia Mono" fo:font-size="9.5pt" style:font-name-asian="Cascadia Mono" style:font-size-asian="9.5pt" style:font-name-complex="Cascadia Mono" style:font-size-complex="9.5pt"/>
    </style:style>
    <style:style style:name="T48" style:family="text">
      <style:text-properties fo:language="en" fo:country="GB"/>
    </style:style>
    <style:style style:name="T49" style:family="text">
      <style:text-properties officeooo:rsid="004bd719"/>
    </style:style>
    <style:style style:name="T50" style:family="text">
      <style:text-properties fo:font-size="12pt"/>
    </style:style>
    <style:style style:name="T51" style:family="text">
      <style:text-properties officeooo:rsid="004d615a"/>
    </style:style>
    <style:style style:name="T52" style:family="text">
      <style:text-properties officeooo:rsid="005c01e1"/>
    </style:style>
    <style:style style:name="T53" style:family="text">
      <style:text-properties officeooo:rsid="004eb216"/>
    </style:style>
    <style:style style:name="T54" style:family="text">
      <style:text-properties officeooo:rsid="0067b115"/>
    </style:style>
    <style:style style:name="T55" style:family="text">
      <style:text-properties officeooo:rsid="00674888"/>
    </style:style>
    <style:style style:name="T56" style:family="text">
      <style:text-properties officeooo:rsid="00548f2e"/>
    </style:style>
    <style:style style:name="T57" style:family="text">
      <style:text-properties officeooo:rsid="006a25cb"/>
    </style:style>
    <style:style style:name="T58" style:family="text">
      <style:text-properties officeooo:rsid="006c175d"/>
    </style:style>
    <style:style style:name="T59" style:family="text">
      <style:text-properties fo:color="#a31515" loext:opacity="100%"/>
    </style:style>
    <style:style style:name="T60" style:family="text">
      <style:text-properties fo:color="#0000ff" loext:opacity="100%"/>
    </style:style>
    <style:style style:name="T61" style:family="text">
      <style:text-properties style:font-name="Cascadia Mono1" fo:font-size="11pt" fo:language="en" fo:country="GB" style:font-size-asian="11pt" style:font-size-complex="11pt"/>
    </style:style>
    <style:style style:name="T62" style:family="text">
      <style:text-properties fo:color="#000000" loext:opacity="100%" style:font-name="Cascadia Mono" fo:font-size="11pt" style:font-name-asian="Cascadia Mono" style:font-size-asian="11pt" style:font-name-complex="Cascadia Mono" style:font-size-complex="11pt"/>
    </style:style>
    <style:style style:name="T63" style:family="text">
      <style:text-properties fo:font-size="11pt" style:font-size-asian="11pt" style:font-size-complex="11pt"/>
    </style:style>
    <style:style style:name="T64" style:family="text">
      <style:text-properties fo:color="#000000" loext:opacity="100%" style:font-name="Cascadia Mono" style:font-name-asian="Cascadia Mono" style:font-name-complex="Cascadia Mono"/>
    </style:style>
    <style:style style:name="T65" style:family="text">
      <style:text-properties fo:color="#000000" loext:opacity="100%" style:font-name="Cascadia Mono" fo:font-size="9.5pt" style:font-name-asian="Cascadia Mono" style:font-size-asian="9.5pt" style:font-name-complex="Cascadia Mono" style:font-size-complex="9.5pt"/>
    </style:style>
    <style:style style:name="T66" style:family="text">
      <style:text-properties style:font-name="Times New Roman" fo:font-size="12pt" style:font-size-asian="12pt" style:font-size-complex="12pt"/>
    </style:style>
    <style:style style:name="T67" style:family="text">
      <style:text-properties officeooo:rsid="0069e89e"/>
    </style:style>
    <style:style style:name="T68" style:family="text">
      <style:text-properties officeooo:rsid="005eb456"/>
    </style:style>
    <style:style style:name="T69" style:family="text">
      <style:text-properties officeooo:rsid="006215c5"/>
    </style:style>
    <style:style style:name="T70" style:family="text">
      <style:text-properties officeooo:rsid="001f1707"/>
    </style:style>
    <style:style style:name="T71" style:family="text">
      <style:text-properties officeooo:rsid="006648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1525312334768" text:id="ct1525312334768">
          <text:deletion>
            <office:change-info>
              <dc:creator>Unbekannter Autor</dc:creator>
              <dc:date>2026-05-08T08:49:52</dc:date>
            </office:change-info>
            <text:p text:style-name="P3"><text:span text:style-name="T3">3</text:span></text:p>
          </text:deletion>
        </text:changed-region>
        <text:changed-region xml:id="ct1525312338512" text:id="ct1525312338512">
          <text:insertion>
            <office:change-info>
              <dc:creator>Unbekannter Autor</dc:creator>
              <dc:date>2026-05-08T08:49:52</dc:date>
            </office:change-info>
          </text:insertion>
        </text:changed-region>
        <text:changed-region xml:id="ct1525216597728" text:id="ct1525216597728">
          <text:insertion>
            <office:change-info>
              <dc:creator>Unbekannter Autor</dc:creator>
              <dc:date>2026-05-08T08:49:25</dc:date>
            </office:change-info>
          </text:insertion>
        </text:changed-region>
        <text:changed-region xml:id="ct1525216591680" text:id="ct1525216591680">
          <text:insertion>
            <office:change-info>
              <dc:creator>Unbekannter Autor</dc:creator>
              <dc:date>2026-05-08T08:49:27</dc:date>
            </office:change-info>
          </text:insertion>
        </text:changed-region>
        <text:changed-region xml:id="ct1525190618560" text:id="ct1525190618560">
          <text:insertion>
            <office:change-info>
              <dc:creator>Unbekannter Autor</dc:creator>
              <dc:date>2026-05-08T08:47:59</dc:date>
            </office:change-info>
          </text:insertion>
        </text:changed-region>
        <text:changed-region xml:id="ct1525190607904" text:id="ct1525190607904">
          <text:deletion>
            <office:change-info>
              <dc:creator>Unbekannter Autor</dc:creator>
              <dc:date>2026-05-08T08:48:15</dc:date>
            </office:change-info>
            <text:p text:style-name="Text_20_body"><text:span text:style-name="T18">, und </text:span></text:p>
          </text:deletion>
        </text:changed-region>
        <text:changed-region xml:id="ct1525190612512" text:id="ct1525190612512">
          <text:deletion>
            <office:change-info>
              <dc:creator>Unbekannter Autor</dc:creator>
              <dc:date>2026-05-08T08:48:18</dc:date>
            </office:change-info>
            <text:p text:style-name="Text_20_body">darf </text:p>
          </text:deletion>
        </text:changed-region>
        <text:changed-region xml:id="ct1525190612800" text:id="ct1525190612800">
          <text:insertion>
            <office:change-info>
              <dc:creator>Unbekannter Autor</dc:creator>
              <dc:date>2026-05-08T08:48:18</dc:date>
            </office:change-info>
          </text:insertion>
        </text:changed-region>
        <text:changed-region xml:id="ct1525190615680" text:id="ct1525190615680">
          <text:insertion>
            <office:change-info>
              <dc:creator>Unbekannter Autor</dc:creator>
              <dc:date>2026-05-08T08:48:23</dc:date>
            </office:change-info>
          </text:insertion>
        </text:changed-region>
        <text:changed-region xml:id="ct1525190609920" text:id="ct1525190609920">
          <text:deletion>
            <office:change-info>
              <dc:creator>Unbekannter Autor</dc:creator>
              <dc:date>2026-05-08T08:48:33</dc:date>
            </office:change-info>
            <text:p text:style-name="Text_20_body">oder </text:p>
          </text:deletion>
        </text:changed-region>
        <text:changed-region xml:id="ct1525190617120" text:id="ct1525190617120">
          <text:insertion>
            <office:change-info>
              <dc:creator>Unbekannter Autor</dc:creator>
              <dc:date>2026-05-08T08:48:33</dc:date>
            </office:change-info>
          </text:insertion>
        </text:changed-region>
        <text:changed-region xml:id="ct1525190613088" text:id="ct1525190613088">
          <text:insertion>
            <office:change-info>
              <dc:creator>Unbekannter Autor</dc:creator>
              <dc:date>2026-05-08T08:48:44</dc:date>
            </office:change-info>
          </text:insertion>
        </text:changed-region>
        <text:changed-region xml:id="ct1525312356080" text:id="ct1525312356080">
          <text:deletion>
            <office:change-info>
              <dc:creator>Unbekannter Autor</dc:creator>
              <dc:date>2026-05-08T08:52:39</dc:date>
            </office:change-info>
            <text:p text:style-name="Text_20_body">vorstehenden </text:p>
          </text:deletion>
        </text:changed-region>
        <text:changed-region xml:id="ct1525312348880" text:id="ct1525312348880">
          <text:insertion>
            <office:change-info>
              <dc:creator>Unbekannter Autor</dc:creator>
              <dc:date>2026-05-08T08:52: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change text:change-id="ct1525312334768"/><text:change-start text:change-id="ct1525312338512"/><text:span text:style-name="T1">8</text:span><text:change-end text:change-id="ct1525312338512"/><text:span text:style-name="T2">.</text:span><text:span text:style-name="T3">5</text:span>.202<text:span text:style-name="T4">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schränkung erlaubter Subpfade<text:tab/>21</text:p>
          <text:p text:style-name="P9">4.2.15.3. Einbettung ohne Fräsen für „Korrekturfräsungen“<text:tab/>21</text:p>
          <text:p text:style-name="P8">4.2.16. Teilpfad-Einbettungen mit Variablen<text:tab/>21</text:p>
          <text:p text:style-name="P9">4.2.16.1. Beispiel für ein Aufspann- und <text:span text:style-name="T5">Variablenprojekt</text:span><text:tab/>21</text:p>
          <text:p text:style-name="P9">4.2.16.2. Definition von Variablen<text:tab/>24</text:p>
          <text:p text:style-name="P9">4.2.16.3. Verwendung der Variablen<text:tab/>24</text:p>
          <text:p text:style-name="P9">4.2.16.4. Setzen der Werte für Variablen<text:tab/>24</text:p>
          <text:p text:style-name="P9">4.2.16.5. Prüfwerte für Variablen<text:tab/>25</text:p>
          <text:p text:style-name="P8">4.2.17. Sternförmige Pfade<text:tab/>25</text:p>
          <text:p text:style-name="P7">4.3. Bauteilpfad-DXF-Dateien<text:tab/>26</text:p>
          <text:p text:style-name="P7">4.4. Projekte<text:tab/>27</text:p>
          <text:p text:style-name="P8">4.4.1. Projekt-Pfadzeichnungen und Teilpfade<text:tab/>27</text:p>
          <text:p text:style-name="P7">4.5. Z-Probes<text:tab/>28</text:p>
          <text:p text:style-name="P8">4.5.1. Grundlagen<text:tab/>28</text:p>
          <text:p text:style-name="P8">4.5.2. Pfad-Zeichnung<text:tab/>29</text:p>
          <text:p text:style-name="P8">4.5.3. Messfahrt<text:tab/>30</text:p>
          <text:p text:style-name="P8">4.5.4. Erzeugen der Milling.gcode-Datei<text:tab/>30</text:p>
          <text:p text:style-name="P7"><text:soft-page-break/>4.6. Aufruf von PathDxf2GCode<text:tab/>31</text:p>
          <text:p text:style-name="P8">4.6.1. Aufrufparameter<text:tab/>31</text:p>
          <text:p text:style-name="P8">4.6.2. Probleme und ihre Lösungen<text:tab/>31</text:p>
          <text:p text:style-name="P9">4.6.2.1. „Pfaddefinition … nicht gefunden.“<text:tab/>31</text:p>
          <text:p text:style-name="P9">4.6.2.2. „Ende-Markierung fehlt.“<text:tab/>31</text:p>
          <text:p text:style-name="P9">4.6.2.3. „S-Wert fehlt.“, „B-Wert fehlt.“, ...<text:tab/>32</text:p>
          <text:p text:style-name="P9">4.6.2.4. „Keine weiteren Segmente ab Punkt … gefunden.“<text:tab/>32</text:p>
          <text:p text:style-name="P7">4.7. Aufruf von PathGCodeAdjustZ<text:tab/>32</text:p>
          <text:p text:style-name="P8">4.7.1. Aufrufparameter<text:tab/>32</text:p>
          <text:p text:style-name="P8">4.7.2. Maximale Z-Korrektur<text:tab/>32</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5">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5">Modelle</text:span>, die aus vorkonstruierten<text:span text:style-name="T5">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5">G-Code-Datei für einen Fertigungslauf </text:span>aus den Konstruktionsbeschreibungen mehrerer Bauteile <text:span text:style-name="T5">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5">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5">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6">.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6</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Die Zeichnung für den zugehörigen Fräspfad (hier ein <text:span text:style-name="T5">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soft-page-break/></text:p>
      <text:p text:style-name="Text_20_body">Einige wichtige Elemente jedes Pfades sind hier direkt erkennbar:</text:p>
      <text:p text:style-name="Text_20_body">a) Der Anfang eines Pfades (unter dem <text:span text:style-name="T7">braunen </text:span>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5">Vertreterlinie</text:span><text:span text:style-name="T9">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An anderen Stellen dient es dazu, „Markierungen“ für Folgebearbeitungen in das Material zu fräsen – im Beispiel für die mit der Bandsäge anzubringenden schmalen <text:soft-page-break/>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10">([0-9]{4})[.]([0-9]+)([A-Z])</text:span><text:span text:style-name="T11">,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11">Durch Angabe der Optionen </text:span><text:span text:style-name="T12">/n</text:span><text:span text:style-name="T11"> und </text:span><text:span text:style-name="T12">/p</text:span><text:span text:style-name="T11"> kann man auch ganz andere Pfadnamenmuster festlegen (siehe S. </text:span><text:span text:style-name="T11"><text:bookmark-ref text:reference-format="page" text:ref-name="__RefHeading__1108_1253387321">31</text:bookmark-ref></text:span><text:span text:style-name="T11">). Die Muster müssen aufeinander abgestimmt sein, weil über sie die passenden Dateien für eine Teilpfad-Einbettung gesucht </text:span><text:span text:style-name="T13">werden</text:span><text:span text:style-name="T11"> (Details dazu siehe S. </text:span><text:span text:style-name="T11"><text:bookmark-ref text:reference-format="page" text:ref-name="__RefHeading__3237_207922309">20</text:bookmark-ref></text:span><text:span text:style-name="T11">).</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5">Gruppen-Pfadlayer</text:span> 1234.** (die zwei Sterne kennzeichen Gruppen-<text:span text:style-name="T5">Pfad</text:span>layer, im Gegensatz zu Gruppen-<text:span text:style-name="T14">Konstruktions</text:span>layern, die unter 1234.* gruppiert werden). Wenn eine Zeichnung mehrere Zeichnungsnummern umfasst, z.B. 1234 K und 2345 K, dann <text:span text:style-name="T15">legt man</text:span> dafür getrennte Gruppen-Pfadlayer 1234.** und 2345.** an.</text:p>
        </text:list-item>
        <text:list-item>
          <text:p text:style-name="P24">Unterhalb der Gruppen-Pfadlayer liegen die <text:span text:style-name="T5">Bauteil-Pfadlayer</text:span> für z.B. die Bauteile 1234.1, 1234.2 usw. Für Bauteile mit nur einem Pfadlayer <text:span text:style-name="T16">benenne ich diesen</text:span>mit 1234.1P, für Bauteile aus Winkelprofilen, die zwei Layer benötigen, <text:span text:style-name="T16">verwende ich </text:span>1234.2L und 1234.2R. In anderen Fällen (z.B. mehrere Pfade wegen Werkzeugwechsel) <text:span text:style-name="T16">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343838424"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343838424"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4</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text:change-start text:change-id="ct1525216597728"/><text:span text:style-name="T17">oder </text:span><text:change-end text:change-id="ct1525216597728"/>rechts unten</text:p>
        </text:list-item>
        <text:list-item>
          <text:p text:style-name="P29"><text:change-start text:change-id="ct1525216591680"/><text:span text:style-name="T17">oder </text:span><text:change-end text:change-id="ct1525216591680"/>in der Mitte</text:p>
        </text:list-item>
      </text:list>
      <text:p text:style-name="Text_20_body">liegen<text:change-start text:change-id="ct1525190618560"/>. <text:span text:style-name="T18">Wenn der Anker nicht in der Mitte ist, darf </text:span><text:change-end text:change-id="ct1525190618560"/><text:change text:change-id="ct1525190607904"/>der Text <text:change text:change-id="ct1525190612512"/><text:change-start text:change-id="ct1525190612800"/><text:span text:style-name="T18">auch </text:span><text:change-end text:change-id="ct1525190612800"/>nicht gedreht sein<text:change-start text:change-id="ct1525190615680"/>. <text:span text:style-name="T18">Zuletzt darf er</text:span><text:change-end text:change-id="ct1525190615680"/> <text:change text:change-id="ct1525190609920"/><text:change-start text:change-id="ct1525190617120"/><text:span text:style-name="T18">nicht </text:span><text:change-end text:change-id="ct1525190617120"/>von unten nach oben oder von rechts nach links orientiert sein. Am besten wählt man den Ankerpunkt in der Mitte, weil sich dann bei Textskalierungen der Mittelpunkt des Überlappungskreis des Textes nicht verschiebt<text:change-start text:change-id="ct1525190613088"/>, <text:span text:style-name="T18">und weil dann ein Drehen des Pfadtextes (i.d.R. zusammen mit dem Pfad) um 90° problemlos möglich ist</text:span><text:change-end text:change-id="ct1525190613088"/>.</text:p>
      <text:p text:style-name="Text_20_body">Die <text:change text:change-id="ct1525312356080"/>Bilder <text:change-start text:change-id="ct1525312348880"/><text:span text:style-name="T1">in vorhergehenden Abschnitten </text:span><text:change-end text:change-id="ct1525312348880"/>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text:soft-page-break/>der Strecke anordnet:</text:p>
        </text:list-item>
        <text:list-item>
          <text:p text:style-name="P31"><draw:frame draw:style-name="fr1" draw:name="Grafik5" text:anchor-type="paragraph" svg:width="6.95cm" svg:height="3.621cm" draw:z-index="30"><draw:image xlink:href="Pictures/200000070000518700002C7D83E120FA.svm" xlink:type="simple" xlink:show="embed" xlink:actuate="onLoad" draw:mime-type="image/x-svm"/><draw:image xlink:href="Pictures/10000001000003DB0000021B070A6619.png" xlink:type="simple" xlink:show="embed" xlink:actuate="onLoad" draw:mime-type="image/png"/></draw:frame>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4"><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5">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41"><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6">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40"><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19">2916.1P~</text:span><text:span text:style-name="T20">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31"><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3"><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21">≥</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5">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22">·</text:span><text:span text:style-name="T23"> O verwendet. Zur Verwendung dieses Wertes siehe S. </text:span><text:span text:style-name="T23"><text:bookmark-ref text:reference-format="page" text:ref-name="__RefHeading__2304_1453201033">18</text:bookmark-ref></text:span><text:span text:style-name="T23">.</text:span></text:p>
        </text:list-item>
        <text:list-item>
          <text:p text:style-name="P38"><text:span text:style-name="T23">W: Erste Frästiefe für leerfahrtloses Fräsen (siehe S. </text:span><text:span text:style-name="T23"><text:bookmark-ref text:reference-format="page" text:ref-name="__RefHeading__6323_207922309">20</text:bookmark-ref></text:span><text:span text:style-name="T23">);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4">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5">Pfadname</text:span> an. Hier ist ein Beispiel:</text:p>
      <text:p text:style-name="P41"><draw:frame draw:style-name="fr4" draw:name="Bild1" text:anchor-type="as-char" svg:width="6.669cm" svg:height="6.849cm" draw:z-index="32"><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24">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25">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5">aufeinanderfolgende Frässegmente </text:span>zu <text:span text:style-name="T5">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5">Parameter einer Fräskette</text:span> werden beim ersten Frässegment angegeben; sie gelten dann für die ganze Kette:</text:p>
      <text:list xml:id="list4175867047"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5">optionalen Parameter für einzelne Frässegmente </text:span>sind:</text:p>
      <text:list xml:id="list85249007794707" text:continue-list="list4175867047"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5">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6">Linie für Fräsung bis zur Tiefe B </text:span>oder strich-doppeltpunktierter Linie <text:span text:style-name="T26">für Fräsung bis zur Tiefe D </text:span>gezeichnet werden (siehe S. <text:bookmark-ref text:reference-format="page" text:ref-name="__RefHeading__3017_1578383688">17</text:bookmark-ref>). Für Bohrlöcher können folgende Parameter angegeben werden („FBQ“):</text:p>
      <text:list xml:id="list85250171713630"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5">2</text:span>. Helixkreise<text:bookmark-end text:name="__RefHeading__2304_1453201033"/></text:h>
      <text:p text:style-name="Text_20_body">Helixkreise sind kreisförmige Fräsungen mit einem größerem Außendurchmesser als dem des Fräsers. Der gezeichnete Kreis gibt den <text:span text:style-name="T5">Außendurchmesser</text:span> der Fräsung an; das ist hilfreich bei der häufigsten Anwendung, dem Fräsen eines Loches.</text:p>
      <text:p text:style-name="P25">Achtung: Alle anderen Fräspfade – insbesondere Bögen (ARC) – beschreiben die Bewegung des Fräser<text:span text:style-name="T5">zentrums</text:span>; nur bei den Helixpfaden wird der <text:span text:style-name="T5">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85249842478833"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5">keinen </text:span>G-Code zum Wegfräsen des entstehende Kerns – daher sind das auch <text:span text:style-name="T5">Kreise</text:span> und keine <text:span text:style-name="T5">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5">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9"><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85249842478833"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7">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5">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5">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 <text:span text:style-name="T28">relevant sind nur Anfangs- und Endpunkt</text:spa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item>
          <text:p text:style-name="P48">H: Zusätzliche Höhe <text:span text:style-name="T29">in mm </text:span>für Montierung des <text:span text:style-name="T30">Fräsm</text:span>aterials auf Unterlagen; <text:span text:style-name="T29">Standardwert 0.</text:span></text:p>
        </text:list-item>
      </text:list>
      <text:p text:style-name="Text_20_body">Für das Subpfad-Element gelten folgende Bedingungen:</text:p>
      <text:list text:style-name="L26">
        <text:list-item>
          <text:p text:style-name="P49"><text:soft-page-break/>Die Angaben T, O und M beim Anfangskreis des eingebetteten Teilpfades müssen mit den entsprechenden Werten an der Einbettungsstelle übereinstimmen.</text:p>
        </text:list-item>
        <text:list-item>
          <text:p text:style-name="P49">Der Abstand von Anfangs- und Endpunkt des eingebetteten Teilpfades muss mit dem Abstand von Anfangs- und Endpunkt der Einbettungslinie übereinstimmen (d.h. eine Skalierung des eingebetteten Teilpfades ist nicht möglich).</text:p>
        </text:list-item>
        <text:list-item>
          <text:p text:style-name="P49">Die maximale Verschachtelungstiefe von Teilpfad-Einbettungen ist 9.</text:p>
        </text:list-item>
      </text:list>
      <text:h text:style-name="P50" text:outline-level="4"><text:bookmark-start text:name="__RefHeading___Toc7407_3755525066"/>4.2.15.2. Einschränkung erlaubter Subpfade<text:bookmark-end text:name="__RefHeading___Toc7407_3755525066"/></text:h>
      <text:p text:style-name="P51">Beim Kopieren von Projekten mit Subpfaden – insbesondere von Aufspannprojekten – für eine weiteren Fräsdurchgang vergisst man leicht die Umbenennung von Subpfaden; z.B. darf ein Aufspannprojekt für die „linke“ Seite von Profilen i.d.R. nur „linke“ Subpfade enthalten, das daraus durch Umkopieren erzeugte „rechte“ Aufspannprojekt dagegen nur „rechte“ Subpfade – das entsprechende Umbenennen ist aber fehleranfällig.</text:p>
      <text:p text:style-name="P51">Um solche Fehler abzufangen, können über Angabe von /e-Parametern Paare von regulären Ausdrücken angegeben werden, mit der Bedeutung, dass ein Pfad, der dem ersten Ausdruck eines Paares entspricht, nur Subpfade aufrufen darf, die dem zweiten Ausdruck entsprechen. Die Beispielregel kann folgendermaßen formuliert werden:</text:p>
      <text:p text:style-name="P52"><text:s text:c="3"/>/<text:span text:style-name="T31">e L$:L$ /e R$:R$</text:span></text:p>
      <text:p text:style-name="P51">Um diese globalen Regeln bei Bedarf bei einem Pfad anpassen zu können, kann dort der zweite reguläre Ausdruck über den E-Parameter übersteuert werden. So können z.B. mit dem folgenden Pfadparameter sowohl Pfade, die mit L enden, wie auch solche, die mit P enden, aufgerufen werden:</text:p>
      <text:p text:style-name="P53"><text:span text:style-name="T32"><text:s text:c="3"/></text:span><text:span text:style-name="T33">E[LP]$</text:span></text:p>
      <text:h text:style-name="Heading_20_4" text:outline-level="4"><text:bookmark-start text:name="__RefHeading___Toc11271_1113469703"/>4.2.15.<text:span text:style-name="T31">3</text:span>. Einbettung ohne Fräsen für „Korrekturfräsungen“<text:bookmark-end text:name="__RefHeading___Toc11271_1113469703"/></text:h>
      <text:p text:style-name="P54">Statt einer strichpunktierten Linie kann <text:span text:style-name="T34">ein Teilpfad auch mit </text:span>eine<text:span text:style-name="T34">r </text:span>punktierte<text:span text:style-name="T34">n</text:span> Linie (DXF: DOT) <text:span text:style-name="T34">gezeichnet </text:span>werden. In diesem Fall wird die Einbettung wie eine Leerfahrt ohne Parameter behandelt (siehe S.<text:bookmark-ref text:reference-format="page" text:ref-name="__RefHeading___Toc2730_813158241">17</text:bookmark-ref>).</text:p>
      <text:p text:style-name="P54">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35">eder</text:span> durch eine Strichpunktierung.</text:p>
      <text:p text:style-name="P55"><text:span text:style-name="T36">Auch in diesem Fall dürfen am Subpfad die Angaben für &gt;, T, O und M angegeben werden, sodass für das „Überspringen“ der Einbettung alleine die Umstellung auf eine punktierte Linie reicht. Die</text:span><text:span text:style-name="T35">se</text:span><text:span text:style-name="T36"> Angaben werden aber vollständig ignoriert.</text:span></text:p>
      <text:h text:style-name="Heading_20_3" text:outline-level="3"><text:bookmark-start text:name="__RefHeading___Toc7736_3755525066"/>4.2.1<text:span text:style-name="T25">6</text:span>. Teilpfad-Einbettungen mit Variablen<text:bookmark-end text:name="__RefHeading___Toc7736_3755525066"/></text:h>
      <text:h text:style-name="Heading_20_4" text:outline-level="4"><text:bookmark-start text:name="__RefHeading___Toc2736_813158241"/>4.2.1<text:span text:style-name="T25">6</text:span>.1. Beispiel für ein Aufspann- und <text:span text:style-name="T37">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text:soft-page-break/></text:p>
      <text:p text:style-name="Text_20_body"><draw:frame draw:style-name="fr1" draw:name="Grafik15" text:anchor-type="paragraph" svg:width="9.874cm" svg:height="5.043cm" draw:z-index="37"><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38">n</text:span>projekt definieren, damit Änderungen am Aufspannprojekt nicht an mehreren Stellen nachgezogen werden müssen.</text:p>
      <text:p text:style-name="Text_20_body">Die Lösung dafür ist, zwei getrennte Projekte zu haben:</text:p>
      <text:list text:style-name="L27">
        <text:list-item>
          <text:p text:style-name="P56">Im Aufspannprojekt werden die Pfade der Griffe nicht mehr fest definiert, sondern als Variablen angegeben.</text:p>
        </text:list-item>
        <text:list-item>
          <text:p text:style-name="P56">Das Aufspannprojekt definiert an seinem Startpunkt, welche Variablen und welche Werte zulässig sind.</text:p>
        </text:list-item>
        <text:list-item>
          <text:p text:style-name="P56">In einem umgebenden Variablenprojekt werden den Variablen bestimmte Werte zugewiesen.</text:p>
        </text:list-item>
        <text:list-item>
          <text:p text:style-name="P56">Die Namen der aus dem Variablenprojekt erzeugten Dateien enthalten eine Information über die verwendeten Variablenwerte.</text:p>
        </text:list-item>
      </text:list>
      <text:p text:style-name="Text_20_body"><text:soft-page-break/>Hier sind diese Teile im Detail gezeigt:</text:p>
      <text:p text:style-name="P57">Ad 1. Im Aufspannprojekt sind die eingebetteten Pfade über =-Variablen angegeben,</text:p>
      <text:p text:style-name="P58">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8"><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9">Ad 3. Das Variablenprojekt besteht nur mehr aus einem Aufruf des Aufspannprojekts, wo man den Variablen Werte zuweist:</text:p>
      <text:p text:style-name="P60"><draw:frame draw:style-name="fr1" draw:name="Grafik17" text:anchor-type="paragraph" svg:width="6.341cm" svg:height="6.174cm" draw:z-index="0"><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61">Ad 4. Mit Hilfe des R-Parameters ergänzt man im Pfad des Variablenprojekts eine (beliebige) Markierung, um im Dateinamen <text:span text:style-name="T39">der G-Code-Datei </text:span>über die gewählten Variablenwerte zu in<text:span text:style-name="T39">f</text:span>ormieren. Hier ist das die Zeichenfolge _112, mit der man die gewählten Variablenwerte P1, P1, P2 symbolisiert.</text:p>
      <text:h text:style-name="Heading_20_4" text:outline-level="4"><text:bookmark-start text:name="__RefHeading__4809_1371230396"/><text:soft-page-break/>4.2.1<text:span text:style-name="T25">6</text:span>.2. Definition von Variablen<text:bookmark-end text:name="__RefHeading__4809_1371230396"/></text:h>
      <text:p text:style-name="Text_20_body">Variablen werden am Startpunkt eines Pfades durch Texte der Form</text:p>
      <text:p text:style-name="Text_20_body"><text:tab/><text:span text:style-name="T40">:</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62">:B2051.P1,2051.P2 bedeutet, dass für die Variable B die Werte 2051.P1 und 2052.P2 zulässig sind.</text:p>
      <text:p text:style-name="Text_20_body">b) über eine Liste von einzelnen Zeichen nach einem Fragezeichen. Beispiel:</text:p>
      <text:p text:style-name="P25">:<text:span text:style-name="T41">C</text:span>?PQRS bedeutet, dass für die Variable <text:span text:style-name="T41">C</text:span> die Werte P, Q, <text:span text:style-name="T42">R</text:span> und <text:span text:style-name="T42">S</text:span> zulässig sind (was auch durch :<text:span text:style-name="T41">C</text:span>P,Q,R,S angegeben werden könnte).</text:p>
      <text:list text:style-name="L28">
        <text:list-header>
          <text:p text:style-name="P63">c) über einen Bereich von Zahlen im Format von~bis. Beispiel:</text:p>
        </text:list-header>
      </text:list>
      <text:p text:style-name="P25">:<text:span text:style-name="T41">D</text:span>-0,5~1,2 bedeutet, dass für die Variable <text:span text:style-name="T41">D </text:span>Zahlen zwischen –0,5 und 1,2 (jeweils inklusive) zulässig sind.</text:p>
      <text:h text:style-name="Heading_20_4" text:outline-level="4"><text:bookmark-start text:name="__RefHeading___Toc2738_813158241"/>4.2.1<text:span text:style-name="T25">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25">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text:soft-page-break/>Bei Verwendung von Variablenprojekten ist die Angabe des R-Parameters hilfreich: Sein Wert wird in die Namen der erzeugten Dateien übernommen, sodass man dort kennzeichnen kann, welche Variablenwerte zum erzeugten G-<text:span text:style-name="T43">C</text:span>ode geführt haben. </text:p>
      <text:h text:style-name="Heading_20_4" text:outline-level="4"><text:bookmark-start text:name="__RefHeading___Toc2740_813158241"/>4.2.1<text:span text:style-name="T25">6</text:span>.5. Prüfwerte für Variablen<text:bookmark-end text:name="__RefHeading___Toc2740_813158241"/></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text:style-name="L29">
        <text:list-item>
          <text:p text:style-name="P64">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44">nwerten</text:span> (wie etwa im Aufspannprojekt oben) möglichst verschiedene Werte zur Prüfung verwendet werden.</text:p>
        </text:list-item>
        <text:list-item>
          <text:p text:style-name="P64">Für die Bereiche von zulässigen Werten werden abwechselnd von- und bis-Wert der Bereiche verwendet.</text:p>
        </text:list-item>
      </text:list>
      <text:h text:style-name="Heading_20_3" text:outline-level="3"><text:bookmark-start text:name="__RefHeading__1863_2102980402"/>4.2.1<text:span text:style-name="T25">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5">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5"><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65">Nach der Leerfahrt vom Startpunkt zum linken Sternpunkt wird das Segment mit N1 gefräst.</text:p>
        </text:list-item>
        <text:list-item>
          <text:p text:style-name="P65">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5">Diese Fräsfahrt erreicht nun wieder den Sternpunkt links. Da hier nun beide markierten Segmente „verbraucht“ (weil schon befahren) sind, wird nun die Leerfahrt in der Mitte gewählt.</text:p>
        </text:list-item>
        <text:list-item>
          <text:p text:style-name="P65">Am rechten Sternpunkt bleibt schließlich nur mehr die Leerfahrt zum Pfadende übrig.</text:p>
        </text:list-item>
      </text:list>
      <text:h text:style-name="Heading_20_2" text:outline-level="2"><text:bookmark-start text:name="__RefHeading__1371_695252532"/><text:soft-page-break/>4.3. Bauteil<text:span text:style-name="T45">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46">zur Expandierung einer Subpfad-Einbettung </text:span>in <text:span text:style-name="T46">einer Menge von </text:span>Dateien gesucht <text:span text:style-name="T46">werden muss</text:span>, dann sucht PathDxf2GCode in den Dateinamen passende <text:span text:style-name="T5">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47">([0-9]{4})(?:[.]([0-9]+))?</text:span>, was folgende Pfadnamenmuster erlaubt:</text:p>
      <text:list text:style-name="L31">
        <text:list-item>
          <text:p text:style-name="P66">4-stellige Zahl</text:p>
        </text:list-item>
        <text:list-item>
          <text:p text:style-name="P66">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5">Pfadnummernbereich</text:span>{,<text:span text:style-name="T5">Pfadnummernbereich</text:span>...}....DXF</text:p>
      <text:p text:style-name="Text_20_body">Ein Pfadnummernbereich hat dabei eine der folgenden zwei Formen und Bedeutungen:</text:p>
      <text:list text:style-name="L32">
        <text:list-item>
          <text:p text:style-name="P67"><text:span text:style-name="T5">Pfadnamenmuster</text:span>.</text:p>
          <text:list>
            <text:list-item>
              <text:p text:style-name="P67">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8">Pfadnamenuster–Pfadnnamenmuster</text:p>
          <text:list>
            <text:list-item>
              <text:p text:style-name="P67">Zwei Muster, getrennt durch ein Minus.</text:p>
            </text:list-item>
            <text:list-item>
              <text:p text:style-name="P67">Ein solcher Bereich zeigt an, dass die DXF-Datei Pfade in diesem <text:span text:style-name="T5">Bereich</text:span> enthält. Dabei werden Gruppen als Zahl verglichen, wenn sie nur aus Ziffern bestehen (was beim Standardwert für /p immer der Fall sein muss), andernfalls werden sie als Text verglichen. So kann eine Datei mit Namen <text:span text:style-name="T5">1234–1236.DXF </text:span><text:span text:style-name="T9">beliebige Pfade enthalten, die mit 1234 oder 1235 oder 1236 beginnen; also u.a. den Pf</text:span>ad 1234.8A , aber auch den Pfad 1235.99B oder <text:s/>1236.3C. Eine Datei mit Namen <text:span text:style-name="T5">1234.1–1234.10.DXF </text:span><text:span text:style-name="T9"><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5">1234.DXF</text:span> und <text:span text:style-name="T5">1234,1235.DXF </text:span>und <text:span text:style-name="T5">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text:soft-page-break/>Hilfreich ist es, wenn der Name einer Pfaddatei nicht nur aus Pfadnamenmustern besteht, sondern auch eine Bezeichnung enthält, z.B. <text:span text:style-name="T5">1234.1 Motorgehäuse.DXF</text:span>. Damit ist es auch leicht möglich, mehrere Dateien (Zeichnungen) für gleiche Nummernbereiche zu haben, z.B. eine weitere Datei <text:s/><text:span text:style-name="T5">1234.1 Motorgehäuse-Befestigung.DXF.</text:span></text:p>
      <text:p text:style-name="Text_20_body">Zur Suche nach Subpfaden werden folgende Verzeichnisse durchsucht:</text:p>
      <text:list text:style-name="L33">
        <text:list-item>
          <text:p text:style-name="P69">Zuerst das Verzeichnis, wo die gerade verarbeitete DXF-Datei liegt;</text:p>
        </text:list-item>
        <text:list-item>
          <text:p text:style-name="P69">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4.4.<text:span text:style-name="T46">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8"><draw:image xlink:href="Pictures/10000000000002C4000001E053CB3483.png" xlink:type="simple" xlink:show="embed" xlink:actuate="onLoad" draw:mime-type="image/png"/></draw:frame></text:p>
      <text:p text:style-name="Text_20_body">Bei einem Projektpfad müssen zumindest folgende Parameter angegeben werden:</text:p>
      <text:list xml:id="list140579752" text:style-name="L34">
        <text:list-item>
          <text:p text:style-name="P70">O, weil der Fräsdurchmesser für einen Projekt-Fräsdurchgang fest ist; und gegen die O-Angabe in eingebettetem Pfaden geprüft werden muss;</text:p>
        </text:list-item>
        <text:list-item>
          <text:p text:style-name="P70">T, weil aus Sicherheitsgründen immer klar sein muss, ab welcher Tiefe bei senkrechten Fahrten ein Bohren (G01) statt einer Leerfahrt (G00) nötig ist;</text:p>
        </text:list-item>
        <text:list-item>
          <text:p text:style-name="P70">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5">Projektnummer</text:span>.<text:span text:style-name="T5">Fräsdurchgang</text:span></text:p>
      <text:p text:style-name="Text_20_body"><text:soft-page-break/>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71">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5">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48">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72">Eine Pfadzeichnung kann Z-Probe-Punkte enthalten, an denen vor dem eigentlichen Fräsvorgang durch eine Messfahrt der tatsächliche Z-Wert gemessen wird. <text:span text:style-name="T49">D</text:span>er Fräser fährt die Punkte mit einem G38.2 an, den von UGS angezeigten Wert <text:span text:style-name="T49">erfasse </text:span>ich manuell in einer Textdatei.</text:p>
        </text:list-item>
        <text:list-item>
          <text:p text:style-name="P73">In der G-Code-Datei, die PathDxf2GCode erzeugt, wird bei jeder Z-Koordinate ein Formelausdruck hinterlegt, der die Korrektur des Z-Wertes in Abhängigkeiten von den Messwerten an den Z-Probe-Punkten beschreibt.</text:p>
        </text:list-item>
        <text:list-item>
          <text:p text:style-name="P73">Nach der Messfahrt wird mit Hilfe eines weiteren Programms namens PathGCodeAdjustZ die G-Code-Datei mit den Werten aus der Textdatei und den Formeln “nachberechnet”.</text:p>
        </text:list-item>
        <text:list-item>
          <text:p text:style-name="P73">Den Fräsvorgang führe ich dann mit dieser verbesserten G-Code-Datei durch.</text:p>
        </text:list-item>
      </text:list>
      <text:p text:style-name="P74"><text:soft-page-break/>Der gesamte Arbeitsablauf sieht so aus:</text:p>
      <text:p text:style-name="P74"/>
      <text:p text:style-name="P74"/>
      <text:p text:style-name="P74"><draw:custom-shape text:anchor-type="paragraph" draw:z-index="13" draw:name="Form1" draw:style-name="gr1" draw:text-style-name="P76" svg:width="3.121cm" svg:height="1.424cm" svg:x="6.022cm" svg:y="0.157cm"><text:p text:style-name="P75">..._Clean.gcode-</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6" draw:name="Form2" draw:style-name="gr2" draw:text-style-name="P77" svg:width="2.477cm" svg:height="1.424cm" svg:x="12.942cm" svg:y="-0.019cm"><text:p text:style-name="P75">PathGCode-</text:p><text:p text:style-name="P75">AddZAdjusts</text:p></draw:rect></text:p>
      <text:p text:style-name="P74"><draw:custom-shape text:anchor-type="paragraph" draw:z-index="19" draw:name="Form3" draw:style-name="gr1" draw:text-style-name="P76" svg:width="2.408cm" svg:height="1.424cm" svg:x="0.086cm" svg:y="-0.194cm"><text:p text:style-name="P75">.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2" draw:name="Form4" draw:style-name="gr3" draw:text-style-name="P75" svg:x1="5.281cm" svg:y1="1.188cm" svg:x2="6.022cm" svg:y2="0.407cm"><text:p/></draw:line><draw:line text:anchor-type="paragraph" draw:z-index="11" draw:name="Form5" draw:style-name="gr3" draw:text-style-name="P75" svg:x1="9.142cm" svg:y1="0.035cm" svg:x2="12.941cm" svg:y2="-0.032cm"><text:p/></draw:line><draw:custom-shape text:anchor-type="paragraph" draw:z-index="25" draw:name="Form6" draw:style-name="gr1" draw:text-style-name="P76" svg:width="2.814cm" svg:height="1.424cm" svg:x="9.313cm" svg:y="0.469cm"><text:p text:style-name="P75">ergänzte</text:p><text:p text:style-name="P75">...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7" draw:name="Form7" draw:style-name="gr3" draw:text-style-name="P75" svg:x1="12.127cm" svg:y1="0.984cm" svg:x2="12.942cm" svg:y2="0.035cm"><text:p/></draw:line></text:p>
      <text:p text:style-name="Text_20_body"><draw:rect text:anchor-type="paragraph" draw:z-index="17" draw:name="Form8" draw:style-name="gr2" draw:text-style-name="P78" svg:width="2.211cm" svg:height="1.362cm" svg:x="3.071cm" svg:y="-0.009cm"><text:p text:style-name="P75"><text:span text:style-name="T50">PathDXF2-</text:span></text:p><text:p text:style-name="P75"><text:span text:style-name="T50">GCode</text:span></text:p></draw:rect><draw:line text:anchor-type="paragraph" draw:z-index="28" draw:name="Form9" draw:style-name="gr3" draw:text-style-name="P75" svg:x1="2.494cm" svg:y1="0.056cm" svg:x2="3.071cm" svg:y2="0.871cm"><text:p/></draw:line><draw:line text:anchor-type="paragraph" draw:z-index="14" draw:name="Form10" draw:style-name="gr3" draw:text-style-name="P75" svg:x1="14.231cm" svg:y1="0.007cm" svg:x2="14.469cm" svg:y2="1.065cm"><text:p/></draw:line></text:p>
      <text:p text:style-name="Text_20_body"><draw:custom-shape text:anchor-type="paragraph" draw:z-index="18" draw:name="Form11" draw:style-name="gr1" draw:text-style-name="P76" svg:width="3.121cm" svg:height="1.424cm" svg:x="12.908cm" svg:y="0.367cm"><text:p text:style-name="P75">..._Milling.gcode-</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1" draw:name="Form12" draw:style-name="gr3" draw:text-style-name="P75" svg:x1="5.281cm" svg:y1="0.056cm" svg:x2="6.022cm" svg:y2="3.081cm"><text:p/></draw:line><draw:line text:anchor-type="paragraph" draw:z-index="9" draw:name="Form13" draw:style-name="gr3" draw:text-style-name="P75" svg:x1="5.281cm" svg:y1="0.056cm" svg:x2="6.362cm" svg:y2="1.453cm"><text:p/></draw:line></text:p>
      <text:p text:style-name="Text_20_body"><draw:custom-shape text:anchor-type="paragraph" draw:z-index="24" draw:name="Form14" draw:style-name="gr1" draw:text-style-name="P76" svg:width="2.952cm" svg:height="1.424cm" svg:x="6.362cm" svg:y="0.323cm"><text:p text:style-name="P75">Leere ..._Z.txt-</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15" draw:style-name="gr3" draw:text-style-name="P75" svg:x1="11.111cm" svg:y1="0.525cm" svg:x2="11.111cm" svg:y2="-0.203cm"><text:p/></draw:line></text:p>
      <text:p text:style-name="P74"><draw:line text:anchor-type="paragraph" draw:z-index="12" draw:name="Form16" draw:style-name="gr3" draw:text-style-name="P75" svg:x1="9.313cm" svg:y1="0.362cm" svg:x2="10.567cm" svg:y2="0.362cm"><text:p/></draw:line><draw:custom-shape text:anchor-type="paragraph" draw:z-index="27" draw:name="Form17" draw:style-name="gr4" draw:text-style-name="P79"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3" draw:name="Form18" draw:style-name="gr3" draw:text-style-name="P75" svg:x1="14.639cm" svg:y1="0.393cm" svg:x2="14.911cm" svg:y2="1.631cm"><text:p/></draw:line></text:p>
      <text:p text:style-name="Text_20_body"><draw:line text:anchor-type="paragraph" draw:z-index="10" draw:name="Form19" draw:style-name="gr3" draw:text-style-name="P75" svg:x1="11.144cm" svg:y1="0.959cm" svg:x2="11.144cm" svg:y2="0.153cm"><text:p/></draw:line></text:p>
      <text:p text:style-name="Text_20_body"><draw:custom-shape text:anchor-type="paragraph" draw:z-index="15" draw:name="Form20" draw:style-name="gr1" draw:text-style-name="P76" svg:width="3.121cm" svg:height="1.424cm" svg:x="6.022cm" svg:y="0.288cm"><text:p text:style-name="P75">..._Probing.gcode-</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80" svg:width="2.477cm" svg:height="1.424cm" svg:x="10.024cm" svg:y="0.261cm"><text:p text:style-name="P75">Messfahrt</text:p></draw:rect><draw:rect text:anchor-type="paragraph" draw:z-index="26" draw:name="Form22" draw:style-name="gr5" draw:text-style-name="P80" svg:width="2.477cm" svg:height="1.424cm" svg:x="14.198cm" svg:y="0.235cm"><text:p text:style-name="P75">Fräsen</text:p></draw:rect></text:p>
      <text:p text:style-name="Text_20_body"><draw:line text:anchor-type="paragraph" draw:z-index="29" draw:name="Form23" draw:style-name="gr3" draw:text-style-name="P75"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74">Die Z-Probe-Punkte werden in der Zeichnung durch Kreise mit Linientyp Strich-Doppelstrich (<text:span text:style-name="T51">DXF: </text:span>PHANTOM) <text:span text:style-name="T52">oder strichpunktiert (DXF: DASHDOT) – siehe dazu das Ende dieses Abschnitts – </text:span>und Durchmesser 6 mm gezeichnet. Sie können an beliebigen Stellen liegen (also nicht unbedingt am Fräspfad). Den Pfad für die Messfahrt in der _Probing.gcode-Datei berechnet PathDxf2GCode selbst, indem vom Anfangspunkt immer der jeweils näh<text:span text:style-name="T53">e</text:span>ste, noch nicht besuchte Z-Probe-Punkt angefahren wird; zum Schluss wird zum Anfangspunkt zurückgekehrt.</text:p>
      <text:p text:style-name="P74">Die Z-Probes können auf zwei Arten angeordnet werden:</text:p>
      <text:list text:style-name="L37">
        <text:list-item>
          <text:p text:style-name="P81">außerhalb der Halbzeuge; dann muss bei der Messfahrt der Messfühler an die jeweilige Stelle gelegt werden.</text:p>
        </text:list-item>
        <text:list-item>
          <text:p text:style-name="P81">auf einem Halbzeug; dann muss bei der Messfahrt ein leitender Kontakt von Halbzeug und Messfühler hergestellt werden.</text:p>
        </text:list-item>
      </text:list>
      <text:p text:style-name="P74">Bei eine<text:span text:style-name="T54">r</text:span> Z-Probe können folgende Parameter angegeben werden:</text:p>
      <text:list text:continue-list="list140579752" text:style-name="L34">
        <text:list-item>
          <text:p text:style-name="P82">T: Messfühler- oder Materialdicke in mm; wenn die Angabe fehlt, wird die entsprechende Pfadangabe am Anfangspunkt übernommen.</text:p>
        </text:list-item>
        <text:list-item>
          <text:p text:style-name="P83">H: Zusätzliche Höhe <text:span text:style-name="T29">in mm </text:span>für Montierung des <text:span text:style-name="T30">Fräsm</text:span>aterials auf Unterlagen; <text:span text:style-name="T29">Standardwert 0.</text:span></text:p>
        </text:list-item>
        <text:list-item>
          <text:p text:style-name="P82">L: Name des Z-Probe-Punktes, der in der _Z.txt-Datei angezeigt wird.</text:p>
        </text:list-item>
        <text:list-item>
          <text:p text:style-name="P82">Z: Fühlgeschwindigkeit in mm/min; bei fehlender Angabe wird die entsprechende Pfadangabe am Anfangspunkt übernommen, wenn auch die fehlt, wird der <text:span text:style-name="T55">Wert der /z-Option verwendet</text:span>.</text:p>
        </text:list-item>
      </text:list>
      <text:p text:style-name="P74">Hier ist eine Pfadzeichnung, die zwei solche Z-Probes enthält (die orangen Kreise), jeweils in der Nähe von Subpfaden:</text:p>
      <text:p text:style-name="P74"><draw:frame draw:style-name="fr1" draw:name="Grafik9" text:anchor-type="paragraph" svg:width="11.07cm" svg:height="6.708cm" draw:z-index="34"><draw:image xlink:href="Pictures/10000000000002780000016FEB6A8305.png" xlink:type="simple" xlink:show="embed" xlink:actuate="onLoad" draw:mime-type="image/png"/></draw:frame><text:soft-page-break/></text:p>
      <text:p text:style-name="P84">Die _Z.txt-Datei, die daraus entsteht, sieht so aus:</text:p>
      <text:p text:style-name="P85">@[138.000|299.000] #2001=</text:p>
      <text:p text:style-name="P85">@[242.000|264.000] #2002=</text:p>
      <text:p text:style-name="P86">Z-Probes dürfen auch einen punktierten Umfang (DXF: DOT) haben, dann werden sie ignoriert. Das ist hilfreich, damit ZProbes für Subpfade, die in Korrektur-Projektdateien durch Punktierung <text:span text:style-name="T56">übersprungen</text:span> werden, nicht angefahren werden.</text:p>
      <text:p text:style-name="P87">Für das Zurückeditieren einer Korrektur-Projektdatei ist es ein wenig hilfreich, dass Z-Probes auch strichpunktiert (DXF: DASHDOT) sein dürfen: Denn dann kann man alle punktierten Linien (sowohl der ignorierten Pfade wie der ignorierten Z-Probes) strichpunktieren, um sie wieder zu aktivieren.</text:p>
      <text:h text:style-name="P88"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48">Wenn der Fräser dabei den Messfühler oder das Halbzeug berührt, bleibt er jeweils 4 Sekunden stehen, damit man den Z-Wert in die _Z.txt-Datei übernehmen kann. </text:span>Dazu wird dort manuell der in UGS abgelesene Z-Wert eingetragen, z.B. so:</text:p>
      <text:p text:style-name="P85">@[138.000|299.000] #2001=5,1</text:p>
      <text:p text:style-name="P85">@[242.000|264.000] #2002= 5.25</text:p>
      <text:p text:style-name="P74">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74">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text:soft-page-break/>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89"><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90"><text:s text:c="4"/>/h <text:s text:c="4"/>Hilfe-Anzeige</text:p>
      <text:p text:style-name="P90"><text:s text:c="4"/>/f 000 Fräsgeschwindigkeit in mm/min; Pflichtwert</text:p>
      <text:p text:style-name="P90"><text:s text:c="4"/>/v 000 Maximalgeschwindigkeit für Leerfahrten in mm/min; Pflichtwert</text:p>
      <text:p text:style-name="P90"><text:s text:c="4"/>/s 000 Vorgabe für Leerfahrt-Höhe in mm; Pflichtwert</text:p>
      <text:p text:style-name="P90"><text:s text:c="4"/>/c <text:s text:c="4"/>Überprüfen aller Pfade in der DXF-Datei ohne G-Code-Ausgabe; wenn /c nicht</text:p>
      <text:p text:style-name="P90"><text:s text:c="11"/>angegeben wird, dann darf die DXF-Datei nur einen Pfad enthalten</text:p>
      <text:p text:style-name="P90"><text:s text:c="4"/>/x zzz Gibt für alle auf diese Regex passenden Texte aus, welchem DXF-Objekt</text:p>
      <text:p text:style-name="P90"><text:s text:c="11"/>sie zugeordnet sind</text:p>
      <text:p text:style-name="P91"><text:s text:c="4"/>/d zzz Suchpfad für referenzierte DXF-Dateien <text:span text:style-name="T57">(Mehrfachangabe </text:span><text:span text:style-name="T58">möglich</text:span><text:span text:style-name="T57">)</text:span></text:p>
      <text:p text:style-name="P90"><text:s text:c="4"/>/n zzz Reg.Ausdruck für Pfadbezeichnungen in DXF-Dateien</text:p>
      <text:p text:style-name="P90"><text:s text:c="11"/>Standardwert ist <text:span text:style-name="T59">([0-9]{4})[.]([0-9]+)([A-Z])</text:span></text:p>
      <text:p text:style-name="P90"><text:s text:c="4"/>/p zzz Reg.Ausdruck für Pfadbezeichnungen in Dateinamen</text:p>
      <text:p text:style-name="P92"><text:s text:c="11"/>Standardwert ist <text:span text:style-name="T60">([0-9]{4})(?:[.]([0-9]+))?</text:span> <text:s text:c="3"/>/<text:span text:style-name="T57">e</text:span> zzz:<text:span text:style-name="T57">zzz</text:span> Reg.Ausdr<text:span text:style-name="T57">ücke, die erlaubte Subpfade einschränken (Mehrfachangabe</text:span></text:p>
      <text:p text:style-name="P93"><text:s text:c="11"/><text:span text:style-name="T58">möglich</text:span>)</text:p>
      <text:p text:style-name="P92"><text:s text:c="4"/>/l zzz Meldungssprache; Standardwert ist die Betriebssystemsprache</text:p>
      <text:p text:style-name="P90"/>
      <text:p text:style-name="Text_20_body">Beispielaufrufe:</text:p>
      <text:p text:style-name="P89"><text:tab/>PathDxf2GCode /h</text:p>
      <text:p text:style-name="P89"><text:tab/>PathDxf2GCode /f150 /v1000 /s15 /d..\Bauteile “2913 Ph.DXF“</text:p>
      <text:p text:style-name="P89"><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3597717338" text:style-name="L38">
        <text:list-item>
          <text:p text:style-name="P94">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85249544749045" text:continue-numbering="true" text:style-name="L38">
        <text:list-item>
          <text:p text:style-name="P94">Endpunkt eines Pfades nicht mit Linienart „Strich-Doppelstrich“ (DXF: PHANTOM) versehen → Lösung: Endpunkt mit Linienart „Strich-Doppelstrich“ versehen.</text:p>
        </text:list-item>
      </text:list>
      <text:h text:style-name="Heading_20_4" text:outline-level="4"><text:bookmark-start text:name="__RefHeading___Toc2762_813158241"/><text:soft-page-break/>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8">
        <text:list-item>
          <text:p text:style-name="P94">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95">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95">Doppelte Elemente, die genau übereinanderliegen; nach dem Befahren eines Elements und der Rückkehr über das andere „geht es nicht mehr weiter“ → Lösung: Doppelte Elemente entfernen.</text:p>
        </text:list-item>
        <text:list-item>
          <text:p text:style-name="P95">Eventuell liegt eine Linie nicht im Pfadlayer → Lösung: Punkt in der Zeichnung finden und Linie in korrekten Layer verlegen.</text:p>
        </text:list-item>
        <text:list-item>
          <text:p text:style-name="P95">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48">.7.</text:span> Aufruf von <text:span text:style-name="T48">PathGCodeAdjustZ</text:span><text:bookmark-end text:name="__RefHeading__6627_810929200"/></text:h>
      <text:h text:style-name="Heading_20_3" text:outline-level="3"><text:bookmark-start text:name="__RefHeading___Toc2764_813158241"/>4<text:span text:style-name="T48">.7.</text:span>1. Aufrufparameter<text:bookmark-end text:name="__RefHeading___Toc2764_813158241"/></text:h>
      <text:p text:style-name="Text_20_body">Beim Aufruf werden i.d.R. <text:span text:style-name="T4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89"><text:tab/>PathGCodeAdjustZ 8001.27.1P_Clean.gcode 8001.27.2P.DXF</text:p>
      <text:p text:style-name="Text_20_body">Zusätzlich können folgende Optionen angegeben werden:</text:p>
      <text:p text:style-name="P89"><text:s text:c="4"/>/h <text:s text:c="4"/>Hilfe-Anzeige<text:line-break/> <text:s text:c="3"/>/m 000 Maximale Korrektur von Z-Werten; Pflichtangabe<text:line-break/> <text:s text:c="3"/>/x zzz Regex für auszugebende Zeilen<text:line-break/> <text:s text:c="3"/>/l zzz Sprache</text:p>
      <text:h text:style-name="P96" text:outline-level="3"><text:bookmark-start text:name="__RefHeading___Toc2766_813158241"/>4.7.2. Maximale Z-Korrektur<text:bookmark-end text:name="__RefHeading___Toc2766_813158241"/></text:h>
      <text:p text:style-name="P74">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text:soft-page-break/>Maximalwert für die Korrektur angegeben werden. Typischerweise gebe ich hier 0,9 mm an.</text:p>
      <text:h text:style-name="P96" text:outline-level="3"><text:bookmark-start text:name="__RefHeading___Toc2768_813158241"/>4.7.3. Ausgabe der Statistikzeilen<text:bookmark-end text:name="__RefHeading___Toc2768_813158241"/></text:h>
      <text:p text:style-name="Standard"><text:span text:style-name="T48">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61">/x mm.*min</text:span><text:span text:style-name="T48"> sichtbar machen.</text:span></text:p>
      <text:h text:style-name="P96" text:outline-level="3"><text:bookmark-start text:name="__RefHeading___Toc2770_813158241"/>4.7.4. Probleme und ihre Lösungen<text:bookmark-end text:name="__RefHeading___Toc2770_813158241"/></text:h>
      <text:h text:style-name="P97" text:outline-level="4"><text:bookmark-start text:name="__RefHeading___Toc2772_813158241"/>4.7.4.1. “Zeile hat nicht das Format '(Kommentar) #...=Wert'”<text:bookmark-end text:name="__RefHeading___Toc2772_813158241"/></text:h>
      <text:p text:style-name="P74">Üblicherweise fehlen die Werte nach den Gleichheitszeichen.</text:p>
      <text:p text:style-name="P74">Wenn man ohne Z-Adjustments fräsen will, dann kann man auch direkt die jeweilige _Clean.gcode-Datei an die Fräse senden.</text:p>
      <text:h text:style-name="Heading_20_2" text:outline-level="2"><text:bookmark-start text:name="__RefHeading___Toc2774_813158241"/>4.<text:span text:style-name="T48">8</text:span>. Fräsen<text:bookmark-end text:name="__RefHeading___Toc2774_813158241"/></text:h>
      <text:p text:style-name="Text_20_body">Für den Fräsvorgang werden</text:p>
      <text:list text:style-name="L40">
        <text:list-item>
          <text:p text:style-name="P98">die erzeugten G-Code-Dateien</text:p>
        </text:list-item>
        <text:list-item>
          <text:p text:style-name="P98">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99">Die 6 Phasen sind:</text:p>
      <text:list text:style-name="L41">
        <text:list-item>
          <text:p text:style-name="P100">DXF-Datei → <text:span text:style-name="T62">DxfDocument</text:span>; dafür wird die netDxf-Bibliothek verwendet. Die zentrale Methode dieser Phase ist <text:span text:style-name="T62">DxfFile.LoadDxfDocument</text:span>.</text:p>
        </text:list-item>
      </text:list>
      <text:list text:style-name="L42">
        <text:list-item>
          <text:p text:style-name="P101"><text:span text:style-name="T6">DxfDocument</text:span> → <text:span text:style-name="T6">RawPathModel</text:span>; das <text:span text:style-name="T6">RawPathModel</text:span> ist eine temporäre Darstellung der Pfade aus einer Pfadzeichnung. Jeder Pfad besteht aus</text:p>
        </text:list-item>
      </text:list>
      <text:list text:style-name="L43">
        <text:list-item>
          <text:p text:style-name="P102">Pfadsegmenten (Typen: <text:span text:style-name="T6">MillSegment</text:span>, <text:span text:style-name="T6">SweepSegment</text:span>, <text:span text:style-name="T6">HelixSegment</text:span>, <text:span text:style-name="T6">DrillSegment</text:span><text:span text:style-name="T63"> </text:span>und <text:span text:style-name="T6">SubpathSegment</text:span>),</text:p>
          <text:list>
            <text:list-item>
              <text:p text:style-name="P102">wo MillSegmente eine <text:span text:style-name="T6">MillingGeometry</text:span> vom Typ <text:span text:style-name="T6">LineGeometry</text:span> oder <text:span text:style-name="T6">ArcGeometry</text:span> haben;</text:p>
            </text:list-item>
          </text:list>
        </text:list-item>
        <text:list-item>
          <text:p text:style-name="P102">Markierungen (Anfangs- und Endpunkt)</text:p>
        </text:list-item>
        <text:list-item>
          <text:p text:style-name="P102">und Pfadparametern.</text:p>
        </text:list-item>
      </text:list>
      <text:p text:style-name="P103">Die zentrale Methode dieser Phase ist <text:span text:style-name="T62">PathModel.TransformDxf2PathModel</text:span>.</text:p>
      <text:list text:style-name="L44">
        <text:list-item>
          <text:p text:style-name="P104">Zusammenfassung von Frässegmenten zu Fräsketten; die zentrale Methode dafür ist <text:span text:style-name="T62">PathModel.CreatePathModel</text:span>.</text:p>
        </text:list-item>
        <text:list-item>
          <text:p text:style-name="P104"><text:span text:style-name="T62">PathModel</text:span> → <text:span text:style-name="T62">GCode</text:span>-Liste; die zentrale Methode dieser Textausgabe ist <text:span text:style-name="T62">PathModel.EmitGCode</text:span> zusammen mit den <text:span text:style-name="T64">EmitGCode</text:span>-Methoden in der <text:span text:style-name="T6">GCode</text:span>-Hierarchie. </text:p>
        </text:list-item>
        <text:list-item>
          <text:p text:style-name="P104">Peephole-Optimizer der <text:span text:style-name="T62">GCode</text:span>-Liste (aktuell zur Zusammenfassung aufeinanderfolgender Leerfahrten); die zentrale Methode dafür ist <text:span text:style-name="T62">GCodeHelpers.Optimize</text:span>, zusammen mit der <text:span text:style-name="T62">GCode</text:span>-Klassenhierarchie.</text:p>
        </text:list-item>
        <text:list-item>
          <text:p text:style-name="P104">Ausgabe der G-Code-Datei; zentrale Methoden sind in der Klasse <text:span text:style-name="T62">Program</text:span><text:span text:style-name="T65"> </text:span><text:s/><text:span text:style-name="T62">WriteGCodes</text:span> und <text:span text:style-name="T6">WriteZProbingGCode</text:span>, die <text:span text:style-name="T62">AsString</text:span>-Methoden der <text:span text:style-name="T62">GCode</text:span>-Hierarchie und die <text:span text:style-name="T6">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5">netDxf-EntityObjects <text:s text:c="3"/>RawSegments <text:s text:c="3"/>Segments</text:span></text:p>
      <text:p text:style-name="Text_20_body"><draw:frame draw:style-name="fr1" draw:name="Grafik18" text:anchor-type="paragraph" svg:width="12.755cm" svg:height="7.826cm" draw:z-index="35"><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6">GCode</text:span>-Liste. Die Erkennung von zu optimierenden Mustern erfolgt über reguläre Expressions, wofür jedes <text:span text:style-name="T6">GCode</text:span>-Objekt durch ein Zeichen (Propery <text:span text:style-name="T6">Letter</text:span>) repräsentiert wird.</text:p>
      <text:list text:style-name="L45">
        <text:list-item>
          <text:p text:style-name="P105">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106"><text:span text:style-name="T6">ChainParams, SweepParams, HelixParams, DrillParams, SubpathParams, ZProbeParams</text:span> → <text:span text:style-name="T6">PathParams</text:span></text:p>
        </text:list-item>
        <text:list-item>
          <text:p text:style-name="P107"><text:soft-page-break/>MillParams<text:span text:style-name="T66">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108">das Aufsammeln aller EntityObjects auf Pfaden</text:p>
        </text:list-item>
        <text:list-item>
          <text:p text:style-name="P108">die Zuordnung von Parametertexten zu Objekten</text:p>
        </text:list-item>
        <text:list-item>
          <text:p text:style-name="P108">die Auswertung spezieller Marker (Start, Ende, ZProbes)</text:p>
        </text:list-item>
        <text:list-item>
          <text:p text:style-name="P108">das Laden von Subpfaden.</text:p>
        </text:list-item>
      </text:list>
      <text:p text:style-name="Text_20_body">Daraus entsteht ein <text:span text:style-name="T6">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6">PathModel</text:span> aus dem <text:span text:style-name="T6">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6">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22">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9"/>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10">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22">·</text:span><text:span text:style-name="T23"> </text:span>O</text:p>
          </table:table-cell>
        </table:table-row>
        <table:table-row>
          <table:table-cell table:style-name="Tabelle1.A2" office:value-type="string">
            <text:p text:style-name="P110">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E</text:p>
          </table:table-cell>
          <table:table-cell table:style-name="Tabelle1.A2" office:value-type="string">
            <text:p text:style-name="P111">Erlaubte Subpfade (Reg.Ausdruck)</text:p>
          </table:table-cell>
          <table:table-cell table:style-name="Tabelle1.A2" office:value-type="string">
            <text:p text:style-name="P111">Text</text:p>
          </table:table-cell>
          <table:table-cell table:style-name="Tabelle1.D2" office:value-type="string">
            <text:p text:style-name="Table_20_Contents">/<text:span text:style-name="T67">e</text:span></text:p>
          </table:table-cell>
        </table:table-row>
        <table:table-row>
          <table:table-cell table:style-name="Tabelle1.A2" office:value-type="string">
            <text:p text:style-name="P110">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1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H</text:p>
          </table:table-cell>
          <table:table-cell table:style-name="Tabelle1.A2" office:value-type="string">
            <text:p text:style-name="P112">Höhe</text:p>
          </table:table-cell>
          <table:table-cell table:style-name="Tabelle1.A2" office:value-type="string">
            <text:p text:style-name="P113">mm</text:p>
          </table:table-cell>
          <table:table-cell table:style-name="Tabelle1.D2" office:value-type="string">
            <text:p text:style-name="P113">0</text:p>
          </table:table-cell>
        </table:table-row>
        <table:table-row>
          <table:table-cell table:style-name="Tabelle1.A2" office:value-type="string">
            <text:p text:style-name="P110">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P113">keine</text:p>
          </table:table-cell>
        </table:table-row>
        <table:table-row>
          <table:table-cell table:style-name="Tabelle1.A2" office:value-type="string">
            <text:p text:style-name="P110">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0">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P</text:p>
          </table:table-cell>
          <table:table-cell table:style-name="Tabelle1.A2" office:value-type="string">
            <text:p text:style-name="P114">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0">R</text:p>
          </table:table-cell>
          <table:table-cell table:style-name="Tabelle1.A2" office:value-type="string">
            <text:p text:style-name="P114">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10">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10">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U</text:p>
          </table:table-cell>
          <table:table-cell table:style-name="Tabelle1.A2" office:value-type="string">
            <text:p text:style-name="P114">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W</text:p>
          </table:table-cell>
          <table:table-cell table:style-name="Tabelle1.A2" office:value-type="string">
            <text:p text:style-name="P114">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Y</text:p>
          </table:table-cell>
          <table:table-cell table:style-name="Tabelle1.A2" office:value-type="string">
            <text:p text:style-name="P115"/>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0">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68">z</text:span></text:p>
          </table:table-cell>
        </table:table-row>
        <table:table-row>
          <table:table-cell table:style-name="Tabelle1.A2" office:value-type="string">
            <text:p text:style-name="P110">&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0">:</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68">v</text:span></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14">BORDER</text:p>
          </table:table-cell>
          <table:table-cell table:style-name="Tabelle2.A2" office:value-type="string">
            <text:p text:style-name="P114">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ext:p text:style-name="P116">Z-Probe</text:p>
          </table:table-cell>
          <table:table-cell table:style-name="Tabelle2.D2" office:value-type="string">
            <text:p text:style-name="P117">&gt; M T O <text:span text:style-name="T69">H</text:span></text:p>
            <text:p text:style-name="P118">T L Z <text:span text:style-name="T69">H</text:span></text:p>
          </table:table-cell>
        </table:table-row>
        <table:table-row>
          <table:table-cell table:style-name="Tabelle2.A2" office:value-type="string">
            <text:p text:style-name="Table_20_Contents">‍……….</text:p>
          </table:table-cell>
          <table:table-cell table:style-name="Tabelle2.A2" office:value-type="string">
            <text:p text:style-name="P119">DOT</text:p>
          </table:table-cell>
          <table:table-cell table:style-name="Tabelle2.A2" office:value-type="string">
            <text:p text:style-name="P119">Subpfad als Leerfahrt</text:p>
            <text:p text:style-name="P120">Ignorierter Z-Probe-Punkt</text:p>
          </table:table-cell>
          <table:table-cell table:style-name="Tabelle2.D2" office:value-type="string">
            <text:p text:style-name="P117">&gt; <text:span text:style-name="T70">M T O </text:span><text:span text:style-name="T71">H</text:span></text:p>
            <text:p text:style-name="P121">T L Z <text:span text:style-name="T71">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17">T O M B I F D U P S A W</text:p>
            <text:p text:style-name="Table_20_Contents"/>
            <text:p text:style-name="Table_20_Contents">T L Z <text:span text:style-name="T71">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08T08:52:48.061514000</dc:date>
    <meta:editing-duration>P20DT1H7M48S</meta:editing-duration>
    <meta:editing-cycles>946</meta:editing-cycles>
    <meta:generator>LibreOffice/25.8.5.2$Windows_X86_64 LibreOffice_project/9c8b85f387cc00a89945a79c9e6239f32e450ac2</meta:generator>
    <meta:print-date>2025-11-19T07:19:51.487511500</meta:print-date>
    <meta:printed-by>PDF-Dateien</meta:printed-by>
    <meta:document-statistic meta:table-count="2" meta:image-count="19" meta:object-count="0" meta:page-count="39" meta:paragraph-count="765" meta:word-count="10073" meta:character-count="72281" meta:non-whitespace-character-count="62859"/>
  </office:meta>
</office:document-meta>
</file>