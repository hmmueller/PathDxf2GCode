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79000002460F18B6EB.png" manifest:media-type="image/png"/>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20000007000034420000300BF7F4890E.svm" manifest:media-type="image/x-svm"/>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Standard" style:list-style-name="L2"/>
    <style:style style:name="P13" style:family="paragraph" style:parent-style-name="Text_20_body" style:list-style-name="L3"/>
    <style:style style:name="P14" style:family="paragraph" style:parent-style-name="Text_20_body">
      <style:paragraph-properties fo:text-align="center"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1"/>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paragraph-properties fo:margin-left="2.501cm" fo:margin-right="0cm" fo:text-indent="0cm" style:auto-text-indent="false"/>
    </style:style>
    <style:style style:name="P38" style:family="paragraph" style:parent-style-name="Text_20_body" style:list-style-name="L19">
      <style:text-properties fo:language="en" fo:country="GB"/>
    </style:style>
    <style:style style:name="P39" style:family="paragraph" style:parent-style-name="Heading_20_3">
      <style:text-properties officeooo:paragraph-rsid="0017e84f"/>
    </style:style>
    <style:style style:name="P40" style:family="paragraph" style:parent-style-name="Text_20_body">
      <style:text-properties officeooo:rsid="0017e84f" officeooo:paragraph-rsid="0017e84f"/>
    </style:style>
    <style:style style:name="P41" style:family="paragraph" style:parent-style-name="Text_20_body">
      <style:paragraph-properties fo:text-align="center" style:justify-single-word="false"/>
      <style:text-properties officeooo:rsid="0017e84f" officeooo:paragraph-rsid="0017e84f"/>
    </style:style>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5">
      <style:text-properties fo:language="en" fo:country="GB" officeooo:rsid="00639376" officeooo:paragraph-rsid="0064adb3"/>
    </style:style>
    <style:style style:name="P49" style:family="paragraph" style:parent-style-name="Text_20_body" style:list-style-name="L26"/>
    <style:style style:name="P50" style:family="paragraph" style:parent-style-name="Heading_20_4">
      <style:text-properties officeooo:rsid="006c8dae" officeooo:paragraph-rsid="006c8dae"/>
    </style:style>
    <style:style style:name="P51" style:family="paragraph" style:parent-style-name="Text_20_body">
      <style:text-properties officeooo:rsid="006c8dae" officeooo:paragraph-rsid="006c8dae"/>
    </style:style>
    <style:style style:name="P52" style:family="paragraph" style:parent-style-name="Standard">
      <style:text-properties style:font-name="Cascadia Mono1" fo:font-size="10pt" officeooo:paragraph-rsid="006c8dae" style:font-size-asian="10pt" style:font-size-complex="10pt"/>
    </style:style>
    <style:style style:name="P53" style:family="paragraph" style:parent-style-name="Standard">
      <style:text-properties officeooo:paragraph-rsid="006c8dae"/>
    </style:style>
    <style:style style:name="P54" style:family="paragraph" style:parent-style-name="Text_20_body">
      <style:text-properties officeooo:rsid="001fef5a" officeooo:paragraph-rsid="0022f813"/>
    </style:style>
    <style:style style:name="P55" style:family="paragraph" style:parent-style-name="Text_20_body">
      <style:text-properties officeooo:paragraph-rsid="00708bb9"/>
    </style:style>
    <style:style style:name="P56" style:family="paragraph" style:parent-style-name="Text_20_body" style:list-style-name="L27"/>
    <style:style style:name="P57"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8" style:family="paragraph" style:parent-style-name="Text_20_body">
      <style:paragraph-properties fo:margin-left="1.251cm" fo:margin-right="0cm" fo:margin-top="0cm" fo:margin-bottom="0.212cm" style:contextual-spacing="false" fo:text-indent="-0.582cm" style:auto-text-indent="false"/>
    </style:style>
    <style:style style:name="P59"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60" style:family="paragraph" style:parent-style-name="Text_20_body" style:master-page-name="">
      <style:paragraph-properties fo:margin-left="1.27cm" fo:margin-right="0cm" fo:margin-top="0cm" fo:margin-bottom="0.212cm" style:contextual-spacing="false" fo:text-indent="-0.609cm" style:auto-text-indent="false" style:page-number="auto"/>
      <style:text-properties officeooo:rsid="003ef60d"/>
    </style:style>
    <style:style style:name="P61" style:family="paragraph" style:parent-style-name="Text_20_body">
      <style:paragraph-properties fo:margin-left="1.27cm" fo:margin-right="0cm" fo:margin-top="0cm" fo:margin-bottom="0.212cm" style:contextual-spacing="false" fo:text-indent="-0.609cm" style:auto-text-indent="false"/>
      <style:text-properties officeooo:paragraph-rsid="00405ee9"/>
    </style:style>
    <style:style style:name="P62" style:family="paragraph" style:parent-style-name="Text_20_body" style:master-page-name="">
      <style:paragraph-properties fo:margin-left="1.251cm" fo:margin-right="0cm" fo:margin-top="0cm" fo:margin-bottom="0.212cm" style:contextual-spacing="false" fo:text-indent="0cm" style:auto-text-indent="false" style:page-number="auto"/>
    </style:style>
    <style:style style:name="P63" style:family="paragraph" style:parent-style-name="Text_20_body" style:list-style-name="L28">
      <style:paragraph-properties fo:margin-left="0cm" fo:margin-right="0cm" fo:text-indent="0cm" style:auto-text-indent="false"/>
    </style:style>
    <style:style style:name="P64" style:family="paragraph" style:parent-style-name="Text_20_body" style:list-style-name="L29"/>
    <style:style style:name="P65" style:family="paragraph" style:parent-style-name="Text_20_body" style:list-style-name="L30"/>
    <style:style style:name="P66" style:family="paragraph" style:parent-style-name="Text_20_body" style:list-style-name="L31"/>
    <style:style style:name="P67" style:family="paragraph" style:parent-style-name="Text_20_body" style:list-style-name="L32"/>
    <style:style style:name="P68" style:family="paragraph" style:parent-style-name="Text_20_body" style:list-style-name="L32">
      <style:text-properties fo:font-style="italic" style:font-style-asian="italic" style:font-style-complex="italic"/>
    </style:style>
    <style:style style:name="P69" style:family="paragraph" style:parent-style-name="Text_20_body" style:list-style-name="L33"/>
    <style:style style:name="P70" style:family="paragraph" style:parent-style-name="Text_20_body" style:list-style-name="L34"/>
    <style:style style:name="P71" style:family="paragraph" style:parent-style-name="Text_20_body" style:list-style-name="L35"/>
    <style:style style:name="P72" style:family="paragraph" style:parent-style-name="Text_20_body" style:list-style-name="L36">
      <style:text-properties fo:language="en" fo:country="GB" officeooo:paragraph-rsid="004bd719"/>
    </style:style>
    <style:style style:name="P73" style:family="paragraph" style:parent-style-name="Text_20_body" style:list-style-name="L36">
      <style:text-properties fo:language="en" fo:country="GB"/>
    </style:style>
    <style:style style:name="P74" style:family="paragraph" style:parent-style-name="Text_20_body">
      <style:text-properties fo:language="en" fo:country="GB"/>
    </style:style>
    <style:style style:name="P75" style:family="paragraph">
      <style:paragraph-properties fo:text-align="center"/>
    </style:style>
    <style:style style:name="P76" style:family="paragraph">
      <style:paragraph-properties fo:text-align="center" style:writing-mode="lr-tb"/>
    </style:style>
    <style:style style:name="P77" style:family="paragraph">
      <loext:graphic-properties draw:fill-color="#ccffff"/>
      <style:paragraph-properties fo:text-align="center"/>
    </style:style>
    <style:style style:name="P78" style:family="paragraph">
      <loext:graphic-properties draw:fill-color="#ccffff"/>
      <style:paragraph-properties fo:text-align="center"/>
      <style:text-properties fo:font-size="12pt"/>
    </style:style>
    <style:style style:name="P79" style:family="paragraph">
      <loext:graphic-properties draw:fill-color="#83caff"/>
    </style:style>
    <style:style style:name="P80" style:family="paragraph">
      <loext:graphic-properties draw:fill-color="#ffffcc"/>
      <style:paragraph-properties fo:text-align="center"/>
    </style:style>
    <style:style style:name="P81" style:family="paragraph" style:parent-style-name="Text_20_body" style:list-style-name="L37">
      <style:text-properties fo:language="en" fo:country="GB"/>
    </style:style>
    <style:style style:name="P82" style:family="paragraph" style:parent-style-name="Text_20_body" style:list-style-name="L34">
      <style:text-properties fo:language="en" fo:country="GB"/>
    </style:style>
    <style:style style:name="P83" style:family="paragraph" style:parent-style-name="Text_20_body" style:list-style-name="L34">
      <style:text-properties fo:language="en" fo:country="GB" officeooo:rsid="00639376" officeooo:paragraph-rsid="00639376"/>
    </style:style>
    <style:style style:name="P84" style:family="paragraph" style:parent-style-name="Text_20_body">
      <style:text-properties fo:language="en" fo:country="GB" officeooo:paragraph-rsid="005119f7"/>
    </style:style>
    <style:style style:name="P85"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6" style:family="paragraph" style:parent-style-name="Text_20_body">
      <style:text-properties fo:language="en" fo:country="GB" officeooo:rsid="005119f7" officeooo:paragraph-rsid="005119f7"/>
    </style:style>
    <style:style style:name="P87" style:family="paragraph" style:parent-style-name="Text_20_body">
      <style:text-properties fo:language="en" fo:country="GB" officeooo:rsid="005c01e1" officeooo:paragraph-rsid="005c01e1"/>
    </style:style>
    <style:style style:name="P88" style:family="paragraph" style:parent-style-name="Heading_20_3">
      <style:text-properties officeooo:paragraph-rsid="005119f7"/>
    </style:style>
    <style:style style:name="P89" style:family="paragraph" style:parent-style-name="Text_20_body">
      <style:text-properties style:font-name="Cascadia Mono1" fo:font-size="10pt" style:font-size-asian="10pt" style:font-size-complex="10pt"/>
    </style:style>
    <style:style style:name="P90"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91" style:family="paragraph" style:parent-style-name="Standard">
      <style:paragraph-properties style:text-autospace="none"/>
      <style:text-properties fo:color="#000000" loext:opacity="100%" style:font-name="Cascadia Mono" fo:font-size="9.5pt" officeooo:paragraph-rsid="006bb2b6" style:font-name-asian="Cascadia Mono" style:font-size-asian="9.5pt" style:font-name-complex="Cascadia Mono" style:font-size-complex="9.5pt"/>
    </style:style>
    <style:style style:name="P92" style:family="paragraph" style:parent-style-name="Standard">
      <style:paragraph-properties style:text-autospace="none"/>
      <style:text-properties fo:color="#000000" loext:opacity="100%" style:font-name="Cascadia Mono" fo:font-size="9.5pt" officeooo:paragraph-rsid="006a25cb" style:font-name-asian="Cascadia Mono" style:font-size-asian="9.5pt" style:font-name-complex="Cascadia Mono" style:font-size-complex="9.5pt"/>
    </style:style>
    <style:style style:name="P93" style:family="paragraph" style:parent-style-name="Standard">
      <style:paragraph-properties style:text-autospace="none"/>
      <style:text-properties fo:color="#000000" loext:opacity="100%" style:font-name="Cascadia Mono" fo:font-size="9.5pt" officeooo:rsid="006a25cb" officeooo:paragraph-rsid="006c175d" style:font-name-asian="Cascadia Mono" style:font-size-asian="9.5pt" style:font-name-complex="Cascadia Mono" style:font-size-complex="9.5pt"/>
    </style:style>
    <style:style style:name="P94" style:family="paragraph" style:parent-style-name="Text_20_body" style:list-style-name="L38"/>
    <style:style style:name="P95" style:family="paragraph" style:parent-style-name="Text_20_body" style:list-style-name="L39"/>
    <style:style style:name="P96" style:family="paragraph" style:parent-style-name="Heading_20_3">
      <style:text-properties fo:language="en" fo:country="GB"/>
    </style:style>
    <style:style style:name="P97" style:family="paragraph" style:parent-style-name="Heading_20_4">
      <style:text-properties fo:language="en" fo:country="GB"/>
    </style:style>
    <style:style style:name="P98" style:family="paragraph" style:parent-style-name="Text_20_body" style:list-style-name="L40"/>
    <style:style style:name="P99" style:family="paragraph" style:parent-style-name="Text_20_body">
      <style:text-properties fo:font-size="12pt" style:font-size-asian="12pt" style:font-size-complex="12pt"/>
    </style:style>
    <style:style style:name="P100" style:family="paragraph" style:parent-style-name="Text_20_body" style:list-style-name="L41">
      <style:text-properties fo:font-size="12pt" style:font-size-asian="12pt" style:font-size-complex="12pt"/>
    </style:style>
    <style:style style:name="P101" style:family="paragraph" style:parent-style-name="Text_20_body" style:list-style-name="L42">
      <style:text-properties fo:font-size="12pt" style:font-size-asian="12pt" style:font-size-complex="12pt"/>
    </style:style>
    <style:style style:name="P102" style:family="paragraph" style:parent-style-name="Text_20_body" style:list-style-name="L43">
      <style:text-properties fo:font-size="12pt" style:font-size-asian="12pt" style:font-size-complex="12pt"/>
    </style:style>
    <style:style style:name="P103" style:family="paragraph" style:parent-style-name="Text_20_body">
      <style:paragraph-properties fo:margin-left="1.251cm" fo:margin-right="0cm" fo:text-indent="0cm" style:auto-text-indent="false"/>
      <style:text-properties fo:font-size="12pt" style:font-size-asian="12pt" style:font-size-complex="12pt"/>
    </style:style>
    <style:style style:name="P104" style:family="paragraph" style:parent-style-name="Text_20_body" style:list-style-name="L44">
      <style:text-properties fo:font-size="12pt" style:font-size-asian="12pt" style:font-size-complex="12pt"/>
    </style:style>
    <style:style style:name="P105" style:family="paragraph" style:parent-style-name="Text_20_body" style:list-style-name="L45"/>
    <style:style style:name="P106" style:family="paragraph" style:parent-style-name="Text_20_body" style:list-style-name="L46"/>
    <style:style style:name="P107" style:family="paragraph" style:parent-style-name="Text_20_body" style:list-style-name="L46">
      <style:text-properties style:font-name="Cascadia Mono1" fo:font-size="11pt" style:font-size-asian="11pt" style:font-size-complex="11pt"/>
    </style:style>
    <style:style style:name="P108" style:family="paragraph" style:parent-style-name="Text_20_body" style:list-style-name="L47"/>
    <style:style style:name="P109" style:family="paragraph" style:parent-style-name="Table_20_Heading">
      <style:paragraph-properties fo:text-align="center" style:justify-single-word="false"/>
    </style:style>
    <style:style style:name="P110" style:family="paragraph" style:parent-style-name="Table_20_Contents">
      <style:paragraph-properties fo:text-align="center" style:justify-single-word="false"/>
    </style:style>
    <style:style style:name="P111" style:family="paragraph" style:parent-style-name="Table_20_Contents">
      <style:text-properties officeooo:rsid="0069e89e" officeooo:paragraph-rsid="0069e89e"/>
    </style:style>
    <style:style style:name="P112" style:family="paragraph" style:parent-style-name="Table_20_Contents">
      <style:text-properties style:text-line-through-style="none" style:text-line-through-type="none" officeooo:rsid="006215c5" officeooo:paragraph-rsid="006215c5"/>
    </style:style>
    <style:style style:name="P113" style:family="paragraph" style:parent-style-name="Table_20_Contents">
      <style:text-properties officeooo:rsid="006215c5" officeooo:paragraph-rsid="006215c5"/>
    </style:style>
    <style:style style:name="P114" style:family="paragraph" style:parent-style-name="Table_20_Contents">
      <style:text-properties style:text-line-through-style="none" style:text-line-through-type="none"/>
    </style:style>
    <style:style style:name="P115" style:family="paragraph" style:parent-style-name="Table_20_Contents">
      <style:text-properties officeooo:rsid="0069e89e"/>
    </style:style>
    <style:style style:name="P116" style:family="paragraph" style:parent-style-name="Table_20_Contents">
      <style:text-properties officeooo:rsid="005c01e1" officeooo:paragraph-rsid="005c01e1"/>
    </style:style>
    <style:style style:name="P117" style:family="paragraph" style:parent-style-name="Table_20_Contents">
      <style:text-properties fo:font-weight="normal" style:font-weight-asian="normal" style:font-weight-complex="normal"/>
    </style:style>
    <style:style style:name="P118" style:family="paragraph" style:parent-style-name="Table_20_Contents">
      <style:text-properties fo:font-weight="normal" officeooo:rsid="005c01e1" officeooo:paragraph-rsid="005c01e1" style:font-weight-asian="normal" style:font-weight-complex="normal"/>
    </style:style>
    <style:style style:name="P119" style:family="paragraph" style:parent-style-name="Table_20_Contents">
      <style:text-properties officeooo:rsid="001f1707" officeooo:paragraph-rsid="001f1707"/>
    </style:style>
    <style:style style:name="P120" style:family="paragraph" style:parent-style-name="Table_20_Contents">
      <style:text-properties officeooo:rsid="0051b934" officeooo:paragraph-rsid="0051b934"/>
    </style:style>
    <style:style style:name="P121" style:family="paragraph" style:parent-style-name="Table_20_Contents">
      <style:text-properties fo:font-weight="normal" officeooo:rsid="0051b934" officeooo:paragraph-rsid="0051b934" style:font-weight-asian="normal" style:font-weight-complex="normal"/>
    </style:style>
    <style:style style:name="T1" style:family="text">
      <style:text-properties officeooo:rsid="0074de17"/>
    </style:style>
    <style:style style:name="T2" style:family="text">
      <style:text-properties officeooo:rsid="006546bf"/>
    </style:style>
    <style:style style:name="T3" style:family="text">
      <style:text-properties officeooo:rsid="006e4c18"/>
    </style:style>
    <style:style style:name="T4" style:family="text">
      <style:text-properties officeooo:rsid="0057ece6"/>
    </style:style>
    <style:style style:name="T5" style:family="text">
      <style:text-properties fo:font-style="italic" style:font-style-asian="italic" style:font-style-complex="italic"/>
    </style:style>
    <style:style style:name="T6" style:family="text">
      <style:text-properties style:font-name="Cascadia Mono1" fo:font-size="11pt" style:font-size-asian="11pt" style:font-size-complex="11pt"/>
    </style:style>
    <style:style style:name="T7" style:family="text">
      <style:text-properties officeooo:rsid="002e1e9a"/>
    </style:style>
    <style:style style:name="T8" style:family="text">
      <style:text-properties style:font-name="Arial1" fo:font-size="11pt" style:font-size-asian="11pt" style:font-size-complex="11pt"/>
    </style:style>
    <style:style style:name="T9" style:family="text">
      <style:text-properties fo:font-style="normal" style:font-style-asian="normal" style:font-style-complex="normal"/>
    </style:style>
    <style:style style:name="T10" style:family="text">
      <style:text-properties style:font-name="Cascadia Mono" fo:font-size="9.5pt" style:font-name-asian="Cascadia Mono" style:font-size-asian="9.5pt" style:font-name-complex="Cascadia Mono" style:font-size-complex="9.5pt"/>
    </style:style>
    <style:style style:name="T11" style:family="text">
      <style:text-properties style:font-name="Times New Roman" fo:font-size="12pt" style:font-name-asian="Cascadia Mono" style:font-size-asian="12pt" style:font-name-complex="Cascadia Mono" style:font-size-complex="12pt"/>
    </style:style>
    <style:style style:name="T12" style:family="text">
      <style:text-properties style:font-name="Cascadia Mono1" fo:font-size="10pt" style:font-name-asian="Cascadia Mono" style:font-size-asian="10pt" style:font-name-complex="Cascadia Mono" style:font-size-complex="10pt"/>
    </style:style>
    <style:style style:name="T13" style:family="text">
      <style:text-properties style:font-name="Times New Roman" fo:font-size="12pt" officeooo:rsid="002fb4de" style:font-name-asian="Cascadia Mono" style:font-size-asian="12pt" style:font-name-complex="Cascadia Mono" style:font-size-complex="12pt"/>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31e8a7"/>
    </style:style>
    <style:style style:name="T16" style:family="text">
      <style:text-properties officeooo:rsid="00301e12"/>
    </style:style>
    <style:style style:name="T17" style:family="text">
      <style:text-properties officeooo:rsid="0074914b"/>
    </style:style>
    <style:style style:name="T18" style:family="text">
      <style:text-properties officeooo:rsid="0072cd1c"/>
    </style:style>
    <style:style style:name="T19" style:family="text">
      <style:text-properties style:font-name="Cascadia Mono1" fo:font-size="10.5pt" style:font-size-asian="10.5pt" style:font-size-complex="10.5pt"/>
    </style:style>
    <style:style style:name="T20" style:family="text">
      <style:text-properties style:font-name="Cascadia Mono1" fo:font-size="10.5pt" officeooo:rsid="0033fe27" style:font-size-asian="10.5pt" style:font-size-complex="10.5pt"/>
    </style:style>
    <style:style style:name="T21" style:family="text">
      <style:text-properties fo:font-family="'Times New Roman'" style:font-family-generic="roman" style:font-family-asian="'Times New Roman'" style:font-family-generic-asian="roman" style:font-family-complex="'Times New Roman'" style:font-family-generic-complex="roman"/>
    </style:style>
    <style:style style:name="T22" style:family="text">
      <style:text-properties fo:font-family="'Times New Roman'" style:font-family-generic="roman"/>
    </style:style>
    <style:style style:name="T23" style:family="text">
      <style:text-properties style:font-name="Times New Roman"/>
    </style:style>
    <style:style style:name="T24" style:family="text">
      <style:text-properties officeooo:rsid="0017e84f"/>
    </style:style>
    <style:style style:name="T25" style:family="text">
      <style:text-properties officeooo:rsid="001993d5"/>
    </style:style>
    <style:style style:name="T26" style:family="text">
      <style:text-properties officeooo:rsid="0035c6ff"/>
    </style:style>
    <style:style style:name="T27" style:family="text">
      <style:text-properties officeooo:rsid="00366a4f"/>
    </style:style>
    <style:style style:name="T28" style:family="text">
      <style:text-properties officeooo:rsid="001fef5a"/>
    </style:style>
    <style:style style:name="T29" style:family="text">
      <style:text-properties officeooo:rsid="00645474"/>
    </style:style>
    <style:style style:name="T30" style:family="text">
      <style:text-properties officeooo:rsid="0064adb3"/>
    </style:style>
    <style:style style:name="T31" style:family="text">
      <style:text-properties officeooo:rsid="006c8dae"/>
    </style:style>
    <style:style style:name="T32" style:family="text">
      <style:text-properties style:font-name="Cascadia Mono1" fo:font-size="10pt" style:font-size-asian="10pt" style:font-size-complex="10pt"/>
    </style:style>
    <style:style style:name="T33" style:family="text">
      <style:text-properties style:font-name="Cascadia Mono1" fo:font-size="10pt" officeooo:rsid="006c8dae" style:font-size-asian="10pt" style:font-size-complex="10pt"/>
    </style:style>
    <style:style style:name="T34" style:family="text">
      <style:text-properties officeooo:rsid="0021d586"/>
    </style:style>
    <style:style style:name="T35" style:family="text">
      <style:text-properties officeooo:rsid="00382fad"/>
    </style:style>
    <style:style style:name="T36" style:family="text">
      <style:text-properties officeooo:rsid="0022f813"/>
    </style:style>
    <style:style style:name="T37"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38" style:family="text">
      <style:text-properties officeooo:rsid="0039cfc3"/>
    </style:style>
    <style:style style:name="T39" style:family="text">
      <style:text-properties officeooo:rsid="00405ee9"/>
    </style:style>
    <style:style style:name="T40" style:family="text">
      <style:text-properties fo:font-weight="bold" style:font-weight-asian="bold" style:font-weight-complex="bold"/>
    </style:style>
    <style:style style:name="T41" style:family="text">
      <style:text-properties officeooo:rsid="0042cea8"/>
    </style:style>
    <style:style style:name="T42" style:family="text">
      <style:text-properties officeooo:rsid="0041ec23"/>
    </style:style>
    <style:style style:name="T43" style:family="text">
      <style:text-properties officeooo:rsid="004489f9"/>
    </style:style>
    <style:style style:name="T44" style:family="text">
      <style:text-properties officeooo:rsid="00461f44"/>
    </style:style>
    <style:style style:name="T45" style:family="text">
      <style:text-properties officeooo:rsid="002c1d2b"/>
    </style:style>
    <style:style style:name="T46" style:family="text">
      <style:text-properties officeooo:rsid="0046c321"/>
    </style:style>
    <style:style style:name="T47" style:family="text">
      <style:text-properties fo:color="#a31515" loext:opacity="100%" style:font-name="Cascadia Mono" fo:font-size="9.5pt" style:font-name-asian="Cascadia Mono" style:font-size-asian="9.5pt" style:font-name-complex="Cascadia Mono" style:font-size-complex="9.5pt"/>
    </style:style>
    <style:style style:name="T48" style:family="text">
      <style:text-properties fo:language="en" fo:country="GB"/>
    </style:style>
    <style:style style:name="T49" style:family="text">
      <style:text-properties officeooo:rsid="004bd719"/>
    </style:style>
    <style:style style:name="T50" style:family="text">
      <style:text-properties fo:font-size="12pt"/>
    </style:style>
    <style:style style:name="T51" style:family="text">
      <style:text-properties officeooo:rsid="004d615a"/>
    </style:style>
    <style:style style:name="T52" style:family="text">
      <style:text-properties officeooo:rsid="005c01e1"/>
    </style:style>
    <style:style style:name="T53" style:family="text">
      <style:text-properties officeooo:rsid="004eb216"/>
    </style:style>
    <style:style style:name="T54" style:family="text">
      <style:text-properties officeooo:rsid="0067b115"/>
    </style:style>
    <style:style style:name="T55" style:family="text">
      <style:text-properties officeooo:rsid="00674888"/>
    </style:style>
    <style:style style:name="T56" style:family="text">
      <style:text-properties officeooo:rsid="00548f2e"/>
    </style:style>
    <style:style style:name="T57" style:family="text">
      <style:text-properties officeooo:rsid="006a25cb"/>
    </style:style>
    <style:style style:name="T58" style:family="text">
      <style:text-properties officeooo:rsid="006c175d"/>
    </style:style>
    <style:style style:name="T59" style:family="text">
      <style:text-properties fo:color="#a31515" loext:opacity="100%"/>
    </style:style>
    <style:style style:name="T60" style:family="text">
      <style:text-properties fo:color="#0000ff" loext:opacity="100%"/>
    </style:style>
    <style:style style:name="T61" style:family="text">
      <style:text-properties style:font-name="Cascadia Mono1" fo:font-size="11pt" fo:language="en" fo:country="GB" style:font-size-asian="11pt" style:font-size-complex="11pt"/>
    </style:style>
    <style:style style:name="T62" style:family="text">
      <style:text-properties fo:color="#000000" loext:opacity="100%" style:font-name="Cascadia Mono" fo:font-size="11pt" style:font-name-asian="Cascadia Mono" style:font-size-asian="11pt" style:font-name-complex="Cascadia Mono" style:font-size-complex="11pt"/>
    </style:style>
    <style:style style:name="T63" style:family="text">
      <style:text-properties fo:font-size="11pt" style:font-size-asian="11pt" style:font-size-complex="11pt"/>
    </style:style>
    <style:style style:name="T64" style:family="text">
      <style:text-properties fo:color="#000000" loext:opacity="100%" style:font-name="Cascadia Mono" style:font-name-asian="Cascadia Mono" style:font-name-complex="Cascadia Mono"/>
    </style:style>
    <style:style style:name="T65" style:family="text">
      <style:text-properties fo:color="#000000" loext:opacity="100%" style:font-name="Cascadia Mono" fo:font-size="9.5pt" style:font-name-asian="Cascadia Mono" style:font-size-asian="9.5pt" style:font-name-complex="Cascadia Mono" style:font-size-complex="9.5pt"/>
    </style:style>
    <style:style style:name="T66" style:family="text">
      <style:text-properties style:font-name="Times New Roman" fo:font-size="12pt" style:font-size-asian="12pt" style:font-size-complex="12pt"/>
    </style:style>
    <style:style style:name="T67" style:family="text">
      <style:text-properties officeooo:rsid="0069e89e"/>
    </style:style>
    <style:style style:name="T68" style:family="text">
      <style:text-properties officeooo:rsid="005eb456"/>
    </style:style>
    <style:style style:name="T69" style:family="text">
      <style:text-properties officeooo:rsid="006215c5"/>
    </style:style>
    <style:style style:name="T70" style:family="text">
      <style:text-properties officeooo:rsid="001f1707"/>
    </style:style>
    <style:style style:name="T71" style:family="text">
      <style:text-properties officeooo:rsid="0066486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athDxf2GCode</text:p>
      <text:p text:style-name="P2"/>
      <text:p text:style-name="P2">Utility für grafische Definition von Fräspfaden</text:p>
      <text:p text:style-name="P2"/>
      <text:p text:style-name="P3">H.M.Müller, <text:span text:style-name="T1">8</text:span><text:span text:style-name="T2">.</text:span><text:span text:style-name="T3">5</text:span>.202<text:span text:style-name="T4">6</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5">Inhaltsverzeichnis</text:p>
          </text:index-title>
          <text:p text:style-name="P6">1. Problem<text:tab/>4</text:p>
          <text:p text:style-name="P6">2. Herstellungsprozess<text:tab/>5</text:p>
          <text:p text:style-name="P6">3. Lösungskonzept<text:tab/>6</text:p>
          <text:p text:style-name="P6">4. Benutzerdokumentation<text:tab/>7</text:p>
          <text:p text:style-name="P7">4.1. Arbeitsprozess<text:tab/>7</text:p>
          <text:p text:style-name="P8">4.1.1. Bauteile konstruieren<text:tab/>7</text:p>
          <text:p text:style-name="P8">4.1.2. Projekt konstruieren<text:tab/>7</text:p>
          <text:p text:style-name="P8">4.1.3. Pfaddateien exportieren<text:tab/>7</text:p>
          <text:p text:style-name="P8">4.1.4. G-Code erzeugen<text:tab/>8</text:p>
          <text:p text:style-name="P8">4.1.5. Fräsen<text:tab/>8</text:p>
          <text:p text:style-name="P7">4.2. Pfadzeichnungen<text:tab/>8</text:p>
          <text:p text:style-name="P8">4.2.1. Ein Beispiel<text:tab/>8</text:p>
          <text:p text:style-name="P8">4.2.2. Pfadnamen<text:tab/>10</text:p>
          <text:p text:style-name="P8">4.2.3. Pfadlayer<text:tab/>10</text:p>
          <text:p text:style-name="P8">4.2.4. Aufbau einer Pfadkonstruktion<text:tab/>11</text:p>
          <text:p text:style-name="P8">4.2.5. Parameter-Texte<text:tab/>12</text:p>
          <text:p text:style-name="P9">4.2.5.1. Aufbau von Parameter-Texten<text:tab/>12</text:p>
          <text:p text:style-name="P9">4.2.5.2. Zuordnung zu Objekten nur mit Überlappung<text:tab/>12</text:p>
          <text:p text:style-name="P9">4.2.5.3. Problemfälle und ihre Lösung<text:tab/>12</text:p>
          <text:p text:style-name="P9">4.2.5.4. Zuordnung zu Objekten durch Parameter-Text-Layer<text:tab/>13</text:p>
          <text:p text:style-name="P8">4.2.6. Geometrie der Fräsparameter<text:tab/>14</text:p>
          <text:p text:style-name="P8">4.2.7. Pfade<text:tab/>15</text:p>
          <text:p text:style-name="P8">4.2.8. Pfadtext als @-Referenz<text:tab/>16</text:p>
          <text:p text:style-name="P8">4.2.9. Leerfahrten<text:tab/>17</text:p>
          <text:p text:style-name="P8">4.2.10. Fräsketten und Frässegmente<text:tab/>17</text:p>
          <text:p text:style-name="P8">4.2.11. Bohrlöcher<text:tab/>18</text:p>
          <text:p text:style-name="P8">4.2.12. Helixkreise<text:tab/>18</text:p>
          <text:p text:style-name="P8">4.2.13. Stützsteg-Segmente<text:tab/>19</text:p>
          <text:p text:style-name="P8">4.2.14. Leerfahrtloses Fräsen<text:tab/>20</text:p>
          <text:p text:style-name="P8">4.2.15. Teilpfad-Einbettungen<text:tab/>20</text:p>
          <text:p text:style-name="P9">4.2.15.1. Einbettung mit Fräsen<text:tab/>20</text:p>
          <text:p text:style-name="P9">4.2.15.2. Einschränkung erlaubter Subpfade<text:tab/>21</text:p>
          <text:p text:style-name="P9">4.2.15.3. Einbettung ohne Fräsen für „Korrekturfräsungen“<text:tab/>21</text:p>
          <text:p text:style-name="P8">4.2.16. Teilpfad-Einbettungen mit Variablen<text:tab/>21</text:p>
          <text:p text:style-name="P9">4.2.16.1. Beispiel für ein Aufspann- und <text:span text:style-name="T5">Variablenprojekt</text:span><text:tab/>21</text:p>
          <text:p text:style-name="P9">4.2.16.2. Definition von Variablen<text:tab/>24</text:p>
          <text:p text:style-name="P9">4.2.16.3. Verwendung der Variablen<text:tab/>24</text:p>
          <text:p text:style-name="P9">4.2.16.4. Setzen der Werte für Variablen<text:tab/>24</text:p>
          <text:p text:style-name="P9">4.2.16.5. Prüfwerte für Variablen<text:tab/>25</text:p>
          <text:p text:style-name="P8">4.2.17. Sternförmige Pfade<text:tab/>25</text:p>
          <text:p text:style-name="P7">4.3. Bauteilpfad-DXF-Dateien<text:tab/>26</text:p>
          <text:p text:style-name="P7">4.4. Projekte<text:tab/>27</text:p>
          <text:p text:style-name="P8">4.4.1. Projekt-Pfadzeichnungen und Teilpfade<text:tab/>27</text:p>
          <text:p text:style-name="P7">4.5. Z-Probes<text:tab/>28</text:p>
          <text:p text:style-name="P8">4.5.1. Grundlagen<text:tab/>28</text:p>
          <text:p text:style-name="P8">4.5.2. Pfad-Zeichnung<text:tab/>29</text:p>
          <text:p text:style-name="P8">4.5.3. Messfahrt<text:tab/>30</text:p>
          <text:p text:style-name="P8">4.5.4. Erzeugen der Milling.gcode-Datei<text:tab/>30</text:p>
          <text:p text:style-name="P7"><text:soft-page-break/>4.6. Aufruf von PathDxf2GCode<text:tab/>31</text:p>
          <text:p text:style-name="P8">4.6.1. Aufrufparameter<text:tab/>31</text:p>
          <text:p text:style-name="P8">4.6.2. Probleme und ihre Lösungen<text:tab/>31</text:p>
          <text:p text:style-name="P9">4.6.2.1. „Pfaddefinition … nicht gefunden.“<text:tab/>31</text:p>
          <text:p text:style-name="P9">4.6.2.2. „Ende-Markierung fehlt.“<text:tab/>31</text:p>
          <text:p text:style-name="P9">4.6.2.3. „S-Wert fehlt.“, „B-Wert fehlt.“, ...<text:tab/>32</text:p>
          <text:p text:style-name="P9">4.6.2.4. „Keine weiteren Segmente ab Punkt … gefunden.“<text:tab/>32</text:p>
          <text:p text:style-name="P7">4.7. Aufruf von PathGCodeAdjustZ<text:tab/>32</text:p>
          <text:p text:style-name="P8">4.7.1. Aufrufparameter<text:tab/>32</text:p>
          <text:p text:style-name="P8">4.7.2. Maximale Z-Korrektur<text:tab/>32</text:p>
          <text:p text:style-name="P8">4.7.3. Ausgabe der Statistikzeilen<text:tab/>33</text:p>
          <text:p text:style-name="P8">4.7.4. Probleme und ihre Lösungen<text:tab/>33</text:p>
          <text:p text:style-name="P9">4.7.4.1. “Zeile hat nicht das Format '(Kommentar) #...=Wert'”<text:tab/>33</text:p>
          <text:p text:style-name="P7">4.8. Fräsen<text:tab/>33</text:p>
          <text:p text:style-name="P6">5. Programmdokumentation<text:tab/>34</text:p>
          <text:p text:style-name="P7">5.1. Überblick<text:tab/>34</text:p>
          <text:p text:style-name="P7">5.2. Github-Projekt<text:tab/>34</text:p>
          <text:p text:style-name="P7">5.3. Compiler-Phasen<text:tab/>34</text:p>
          <text:p text:style-name="P7">5.4. Grundlegende Datenstrukturen<text:tab/>35</text:p>
          <text:p text:style-name="P7">5.5. Spezielle Datenstrukturen und Algorithmen in PathDxf2GCode<text:tab/>35</text:p>
          <text:p text:style-name="P8">5.5.1. GCodeHelpers.cs<text:tab/>35</text:p>
          <text:p text:style-name="P9">5.5.1.1. Optimize<text:tab/>35</text:p>
          <text:p text:style-name="P8">5.5.2. MillGeometry.cs<text:tab/>35</text:p>
          <text:p text:style-name="P8">5.5.3. Params.cs<text:tab/>35</text:p>
          <text:p text:style-name="P8">5.5.4. PathModel.cs<text:tab/>36</text:p>
          <text:p text:style-name="P9">5.5.4.1. Innere Klasse RawPathModel<text:tab/>36</text:p>
          <text:p text:style-name="P9">5.5.4.2. Innere Klasse Collection<text:tab/>36</text:p>
          <text:p text:style-name="P9">5.5.4.3. CollectSegments<text:tab/>36</text:p>
          <text:p text:style-name="P9">5.5.4.4. NearestOverlapping&lt;T&gt;, NearestOverlappingCircle, ….Line, ...Arc, CircleOverlapsLine, ...Arc, DistanceToArcCircle, GetOverlapSurrounding<text:tab/>36</text:p>
          <text:p text:style-name="P9">5.5.4.5. CreatePathModel<text:tab/>36</text:p>
          <text:p text:style-name="P9">5.5.4.6. CollectAndOrderAllZProbes<text:tab/>36</text:p>
          <text:p text:style-name="P8">5.5.5. PathSegment.cs<text:tab/>37</text:p>
          <text:p text:style-name="P9">5.5.5.1. Innere RawSegment-Klassen<text:tab/>37</text:p>
          <text:p text:style-name="P9">5.5.5.2. MillChain.EmitGCode<text:tab/>37</text:p>
          <text:p text:style-name="P9">5.5.5.3. HelixSegment.EmitGCode<text:tab/>37</text:p>
          <text:p text:style-name="P9">5.5.5.4. SubPathSegment.EmitGCode<text:tab/>37</text:p>
          <text:p text:style-name="P8">5.5.6. Transformation2.cs<text:tab/>37</text:p>
          <text:p text:style-name="P8">5.5.7. Transformation3.cs<text:tab/>37</text:p>
          <text:p text:style-name="P7">5.6. Spezielle Datenstrukturen und Algorithmen in PathGCodeAdjustZ<text:tab/>37</text:p>
          <text:p text:style-name="P8">5.6.1. ExprEval.cs<text:tab/>37</text:p>
          <text:p text:style-name="P7">5.7. Aktuell bekannte oder vermutete Probleme<text:tab/>37</text:p>
          <text:p text:style-name="P7">5.8. Fehlende Features<text:tab/>37</text:p>
          <text:p text:style-name="P6">6. Referenzen<text:tab/>38</text:p>
          <text:p text:style-name="P7">6.1. Parameter-Buchstaben<text:tab/>38</text:p>
          <text:p text:style-name="P7">6.2. Linienarten<text:tab/>39</text:p>
        </text:index-body>
      </text:table-of-content>
      <text:p text:style-name="Text_20_body"/>
      <text:p text:style-name="P4"/>
      <text:h text:style-name="P10" text:outline-level="1"><text:bookmark-start text:name="__RefHeading___Toc2696_813158241"/>1. Problem<text:bookmark-end text:name="__RefHeading___Toc2696_813158241"/></text:h>
      <text:p text:style-name="Text_20_body">Mit einem CAD-Programm konstruiert man zuerst einmal „Bauteile“, also die <text:span text:style-name="T5">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text:style-name="L1">
        <text:list-item>
          <text:p text:style-name="P11">mit welcher Art von CNC-Maschine </text:p>
        </text:list-item>
        <text:list-item>
          <text:p text:style-name="P11">mit welchen Eigenschaften</text:p>
        </text:list-item>
        <text:list-item>
          <text:p text:style-name="P11">aus welchem Material</text:p>
        </text:list-item>
        <text:list-item>
          <text:p text:style-name="P1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0" text:outline-level="1"><text:bookmark-start text:name="__RefHeading___Toc2698_813158241"/>2. Herstellungsprozess<text:bookmark-end text:name="__RefHeading___Toc2698_813158241"/></text:h>
      <text:p text:style-name="Standard">Um die Frage aus dem letzten Abschnitt zu beantworten, muss ich zuerst den angedachten Herstellungsprozess beschreiben, der wiederum durch das Endergebnis getrieben ist. Hier sind relevante Eigenschaften dieses Prozesses:</text:p>
      <text:list text:style-name="L2">
        <text:list-item>
          <text:p text:style-name="P12">Was ich bauen will, sind einzelne, speziell projektierte mechanische <text:span text:style-name="T5">Modelle</text:span>, die aus vorkonstruierten<text:span text:style-name="T5"> Bauteilen </text:span>zusammengebaut werden.</text:p>
        </text:list-item>
        <text:list-item>
          <text:p text:style-name="P12">Aufgrund der relativ großen Anzahl verschiedener Bauteile ist deren Massenfertigung „auf Lager“ nicht sinnvoll – stattdessen werden bei der Projektierung die nötigen Bauteile eruiert und dann gefertigt. </text:p>
        </text:list-item>
        <text:list-item>
          <text:p text:style-name="P12">Die Herstellung der Bauteile erfolgt aus vorher bekannten, einfachen Halbzeugen (aktuell sind das Alu-Flach- und Winkelprofile). Die G-Code-Erzeugung kann und soll auf diese Halbzeuge abgestimmt werden.</text:p>
        </text:list-item>
        <text:list-item>
          <text:p text:style-name="P12">Die Bauteile sind in aller Regel klein (max. 100 mm lang, häufig unter 50 mm); die CNC-Fräse kann mit einem Aufspannen von Halbzeugen eine mittlere Anzahl (10...30) von Bauteilen fertigen. Es ist daher nötig, dass die <text:span text:style-name="T5">G-Code-Datei für einen Fertigungslauf </text:span>aus den Konstruktionsbeschreibungen mehrerer Bauteile <text:span text:style-name="T5">zusammengesetzt werden kann</text:span>.</text:p>
        </text:list-item>
        <text:list-item>
          <text:p text:style-name="P12">Manche Bauteile müssen umgespannt werden (i.d.R. alle Winkelprofile, um die zwei Schenkelseiten getrennt zu bearbeiten).</text:p>
        </text:list-item>
        <text:list-item>
          <text:p text:style-name="P12">In manchen Fällen ist ein Werkzeugwechsel nötig (von einem Schaftfräser zu einem Nutfräser).</text:p>
        </text:list-item>
      </text:list>
      <text:h text:style-name="Heading_20_1" text:outline-level="1"/>
      <text:h text:style-name="P10" text:outline-level="1"><text:bookmark-start text:name="__RefHeading___Toc2700_813158241"/>3. Lösungskonzept<text:bookmark-end text:name="__RefHeading___Toc2700_813158241"/></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text:style-name="L3">
        <text:list-item>
          <text:p text:style-name="P13">Erstens weil das einfacher ist;</text:p>
        </text:list-item>
        <text:list-item>
          <text:p text:style-name="P13">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text:style-name="L4">
        <text:list-item>
          <text:p text:style-name="P15">gerade Segmente,</text:p>
        </text:list-item>
        <text:list-item>
          <text:p text:style-name="P15">Kreissegmente und</text:p>
        </text:list-item>
        <text:list-item>
          <text:p text:style-name="P15">Bohrungen;</text:p>
        </text:list-item>
      </text:list>
      <text:p text:style-name="Text_20_body">b) Darstellung aller für die Fräspfade nötigen Werte (z.B. Tiefe einer Bohrung, Höhe einer Leerfahrt) über Parameter grafischer Objekte, die</text:p>
      <text:list text:style-name="L5">
        <text:list-item>
          <text:p text:style-name="P16">einfach über das CAD-Programm angegeben werden können,</text:p>
        </text:list-item>
        <text:list-item>
          <text:p text:style-name="P16">sich dort optisch erkennbar unterscheiden; und</text:p>
        </text:list-item>
        <text:list-item>
          <text:p text:style-name="P1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5">nicht </text:span>verlange, ist eine Anpassbarkeit an verschiedene Fräser-Durchmesser: Für einen anderen Fräser muss der Pfad neu konstruiert werden.</text:p>
      <text:p text:style-name="Text_20_body">Die folgenden zwei Kapitel beschreiben</text:p>
      <text:list text:style-name="L6">
        <text:list-item>
          <text:p text:style-name="P17">den Vorlaufprozess, um die G-Code-Dateien zu erzeugen (Kapitel 4); </text:p>
        </text:list-item>
        <text:list-item>
          <text:p text:style-name="P17">und dann den internen Aufbau des G-Code-Generators (Kapitel 5).</text:p>
        </text:list-item>
      </text:list>
      <text:h text:style-name="P10" text:outline-level="1"><text:bookmark-start text:name="__RefHeading___Toc2702_813158241"/>4. Benutzerdokumentation<text:bookmark-end text:name="__RefHeading___Toc2702_813158241"/></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text:bookmark-start text:name="__RefHeading___Toc2704_813158241"/>4.1. Arbeitsprozess<text:bookmark-end text:name="__RefHeading___Toc2704_813158241"/></text:h>
      <text:p text:style-name="Text_20_body">Der Konstruktions- und Herstellungsvorgang mit PathDxf2GCode läuft so ab:</text:p>
      <text:h text:style-name="Heading_20_3" text:outline-level="3"><text:bookmark-start text:name="__RefHeading___Toc2706_813158241"/>4.1.1. Bauteile konstruieren<text:bookmark-end text:name="__RefHeading___Toc2706_813158241"/></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5">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text:bookmark-start text:name="__RefHeading___Toc2708_813158241"/>4.1.3. Pfaddateien exportieren<text:bookmark-end text:name="__RefHeading___Toc2708_813158241"/></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1</text:bookmark-ref>), praktisch bewähren sich wohl zwei Strukturen:</text:p>
      <text:list text:style-name="L7">
        <text:list-item>
          <text:p text:style-name="P18">Für Projekte ohne vorkonstruierte Bauteile legt man jeweils ein neues Verzeichnis an, i.d.R. mit dem Datum im Verzeichnisnamen. Dort werden alle nötigen Pfaddateien abgelegt.</text:p>
        </text:list-item>
        <text:list-item>
          <text:p text:style-name="P18">Für vorkonstruierte Bauteile und daraus zusammengesetzte Projekte legt man</text:p>
          <text:list>
            <text:list-item>
              <text:p text:style-name="P18">die Bauteil-Pfade in ein Bauteil-Verzeichnis (oder einige wenige),</text:p>
            </text:list-item>
            <text:list-item>
              <text:p text:style-name="P18">die Projekt-Pfadzeichnungen wie oben in ein Projekt-Verzeichnis.</text:p>
            </text:list-item>
          </text:list>
        </text:list-item>
      </text:list>
      <text:p text:style-name="Text_20_body">Für jede DXF-Datei erzeugt man auch eine entsprechende PDF-Datei und legt sie mit ab. Sie hilft <text:soft-page-break/>später, die Halbzeuge abzulängen und aufzuspannen, Messfahrten für Z-Probes-Punkte durchzuführen und generell den Fräsprozess zu überwachen.</text:p>
      <text:h text:style-name="Heading_20_3" text:outline-level="3"><text:bookmark-start text:name="__RefHeading___Toc2710_813158241"/>4.1.4. G-Code erzeugen<text:bookmark-end text:name="__RefHeading___Toc2710_813158241"/></text:h>
      <text:p text:style-name="Text_20_body">Man ruft nun PathDxf2GCode für die exportierten DXF-Dateien auf (siehe S. <text:bookmark-ref text:reference-format="page" text:ref-name="__RefHeading__1108_1253387321">31</text:bookmark-ref>). Als Ergebnis entsteht jeweils eine G-Code-Datei mit demselben Namen, aber mit Erweiterung <text:span text:style-name="T6">.gcode</text:span>.</text:p>
      <text:p text:style-name="Text_20_body">Wenn bei der Umsetzung Fehler auftreten, muss man die Pfad-Konstruktion im CAD-Programm korrigieren (siehe dazu S. <text:bookmark-ref text:reference-format="page" text:ref-name="__RefHeading__1513_1392561347">32</text:bookmark-ref>) und erneut exportieren.</text:p>
      <text:h text:style-name="Heading_20_3" text:outline-level="3"><text:bookmark-start text:name="__RefHeading___Toc2712_813158241"/>4.1.5. Fräsen<text:bookmark-end text:name="__RefHeading___Toc2712_813158241"/></text:h>
      <text:p text:style-name="Text_20_body">Für jede G-Code-Datei <text:s/></text:p>
      <text:list text:style-name="L8">
        <text:list-item>
          <text:p text:style-name="P19">spannt man nun die Halbzeuge entsprechend auf oder um(für diesen manuelle Arbeit dienen die PDF-Dateien mit den enthaltenen Material-Beschreibungen und Bemaßungen), </text:p>
        </text:list-item>
        <text:list-item>
          <text:p text:style-name="P19">setzt den der Koordinaten-Ursprung der Fräsmaschine</text:p>
        </text:list-item>
        <text:list-item>
          <text:p text:style-name="P19">und führt dann den Fräsdurchgang durch.</text:p>
        </text:list-item>
      </text:list>
      <text:h text:style-name="Heading_20_2" text:outline-level="2"><text:bookmark-start text:name="__RefHeading___Toc2714_813158241"/>4.2. Pfadzeichnungen<text:bookmark-end text:name="__RefHeading___Toc2714_813158241"/></text:h>
      <text:p text:style-name="Text_20_body">Pfadzeichnungen legt man einerseits für einzelne Bauteile an. Wenn – wie auf S. <text:bookmark-ref text:reference-format="page" text:ref-name="__RefHeading__1369_695252532">7</text:bookmark-ref><text:s/>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6</text:bookmark-ref>) und Projekten (S. <text:bookmark-ref text:reference-format="page" text:ref-name="__RefHeading__1373_695252532">27</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2"><draw:image xlink:href="Pictures/1000000100000125000001410BC64A3F.png" xlink:type="simple" xlink:show="embed" xlink:actuate="onLoad" draw:mime-type="image/png"/></draw:frame></text:p>
      <text:p text:style-name="Text_20_body">Die Zeichnung für den zugehörigen Fräspfad (hier ein <text:span text:style-name="T5">Bauteilpfad) </text:span>sieht so aus (Zeichnung Nr. 2051 P1; P steht für „Pfad“):</text:p>
      <text:p text:style-name="Text_20_body"><draw:frame draw:style-name="fr1" draw:name="Grafik2" text:anchor-type="paragraph" svg:width="7.343cm" svg:height="6.126cm" draw:z-index="3"><draw:image xlink:href="Pictures/10000001000001BF00000177ED49C7F1.png" xlink:type="simple" xlink:show="embed" xlink:actuate="onLoad" draw:mime-type="image/png"/></draw:frame><text:soft-page-break/></text:p>
      <text:p text:style-name="Text_20_body">Einige wichtige Elemente jedes Pfades sind hier direkt erkennbar:</text:p>
      <text:p text:style-name="Text_20_body">a) Der Anfang eines Pfades (unter dem <text:span text:style-name="T7">braunen </text:span>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text:style-name="L9">
        <text:list-item>
          <text:p text:style-name="P2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7</text:bookmark-ref>).</text:p>
      <text:p text:style-name="Text_20_body">f) Eine strichpunktierte <text:span text:style-name="T5">Vertreterlinie</text:span><text:span text:style-name="T9">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text:style-name="L10">
        <text:list-item>
          <text:p text:style-name="P21">____ Durchgehende Linie = fräsen (Fräsfahrten)</text:p>
        </text:list-item>
        <text:list-item>
          <text:p text:style-name="P21">_ _ _ Strichlierte Linie = nicht fräsen (Leerfahrt)</text:p>
        </text:list-item>
        <text:list-item>
          <text:p text:style-name="P21">_.._.._ Strich-doppelpunktierte Linie = Halbfräsung; übliche Verwendungen sind:</text:p>
          <text:list>
            <text:list-item>
              <text:p text:style-name="P21">An den Rändern, wo das Halbzeug sich fortsetzt, wird dadurch verhindert, dass dieses „abgefräst“ wird und damit die Aufspannung verliert. Im Beispiel weiter oben ist das oben und unten an den nicht-schrägen Segmenten zu sehen.</text:p>
            </text:list-item>
            <text:list-item>
              <text:p text:style-name="P21">An anderen Stellen dient es dazu, „Markierungen“ für Folgebearbeitungen in das Material zu fräsen – im Beispiel für die mit der Bandsäge anzubringenden schmalen <text:soft-page-break/>Schlitze für das einzuschiebende Schlüsselrohr.</text:p>
            </text:list-item>
            <text:list-item>
              <text:p text:style-name="P21">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22">Jeder Pfad muss einen Pfadnamen haben, der dem regulären Pfadmuster-Ausdruck entspricht, der mit der Option /n an PathDxf2GCode übergeben wird. Der Standardwert dafür ist <text:span text:style-name="T10">([0-9]{4})[.]([0-9]+)([A-Z])</text:span><text:span text:style-name="T11">, gemäß diesem Muster muss ein Pfadname also aus drei Gruppen bestehen, deren erste zwei durch einen Punkt getrennt sind:</text:span></text:p>
      <text:p text:style-name="P23"><text:tab/>vierstellige Zahl . Zahl Großbuchstabe(nur A-Z)</text:p>
      <text:p text:style-name="P23">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22"><text:span text:style-name="T11">Durch Angabe der Optionen </text:span><text:span text:style-name="T12">/n</text:span><text:span text:style-name="T11"> und </text:span><text:span text:style-name="T12">/p</text:span><text:span text:style-name="T11"> kann man auch ganz andere Pfadnamenmuster festlegen (siehe S. </text:span><text:span text:style-name="T11"><text:bookmark-ref text:reference-format="page" text:ref-name="__RefHeading__1108_1253387321">31</text:bookmark-ref></text:span><text:span text:style-name="T11">). Die Muster müssen aufeinander abgestimmt sein, weil über sie die passenden Dateien für eine Teilpfad-Einbettung gesucht </text:span><text:span text:style-name="T13">werden</text:span><text:span text:style-name="T11"> (Details dazu siehe S. </text:span><text:span text:style-name="T11"><text:bookmark-ref text:reference-format="page" text:ref-name="__RefHeading__3237_207922309">20</text:bookmark-ref></text:span><text:span text:style-name="T11">).</text:span></text:p>
      <text:h text:style-name="Heading_20_3" text:outline-level="3"><text:bookmark-start text:name="__RefHeading___Toc2716_813158241"/>4.2.3. Pfadlayer<text:bookmark-end text:name="__RefHeading___Toc2716_813158241"/></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text:style-name="L11">
        <text:list-item>
          <text:p text:style-name="P24">Es gibt einen Haupt-Pfadlayer „Pfade“.</text:p>
        </text:list-item>
        <text:list-item>
          <text:p text:style-name="P24">Eine Pfad-Zeichnung für die Konstruktionen der Zeichnungen 1234 K erhält unter „Pfade“ einen <text:span text:style-name="T5">Gruppen-Pfadlayer</text:span> 1234.** (die zwei Sterne kennzeichen Gruppen-<text:span text:style-name="T5">Pfad</text:span>layer, im Gegensatz zu Gruppen-<text:span text:style-name="T14">Konstruktions</text:span>layern, die unter 1234.* gruppiert werden). Wenn eine Zeichnung mehrere Zeichnungsnummern umfasst, z.B. 1234 K und 2345 K, dann <text:span text:style-name="T15">legt man</text:span> dafür getrennte Gruppen-Pfadlayer 1234.** und 2345.** an.</text:p>
        </text:list-item>
        <text:list-item>
          <text:p text:style-name="P24">Unterhalb der Gruppen-Pfadlayer liegen die <text:span text:style-name="T5">Bauteil-Pfadlayer</text:span> für z.B. die Bauteile 1234.1, 1234.2 usw. Für Bauteile mit nur einem Pfadlayer <text:span text:style-name="T16">benenne ich diesen</text:span>mit 1234.1P, für Bauteile aus Winkelprofilen, die zwei Layer benötigen, <text:span text:style-name="T16">verwende ich </text:span>1234.2L und 1234.2R. In anderen Fällen (z.B. mehrere Pfade wegen Werkzeugwechsel) <text:span text:style-name="T16">verwende ich</text:span> auch andere Buchstab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4"><draw:image xlink:href="Pictures/10000001000001800000017F3FE38CE1.png" xlink:type="simple" xlink:show="embed" xlink:actuate="onLoad" draw:mime-type="image/png"/></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5">Pfad mit Anfangs- und Ende-Markierung sowie mit Pfadelementen:</text:p>
      <text:list xml:id="list1601569708" text:style-name="L12">
        <text:list-item>
          <text:list>
            <text:list-item>
              <text:list>
                <text:list-item>
                  <text:p text:style-name="P26">Leerfahrten</text:p>
                </text:list-item>
                <text:list-item>
                  <text:p text:style-name="P26">Fräsketten</text:p>
                </text:list-item>
              </text:list>
            </text:list-item>
          </text:list>
        </text:list-item>
      </text:list>
      <text:list text:style-name="L13">
        <text:list-item>
          <text:list>
            <text:list-item>
              <text:list>
                <text:list-item>
                  <text:p text:style-name="P27">Frässegmente: Strecken sowie Bögen; entweder volltief oder halbtief</text:p>
                </text:list-item>
              </text:list>
            </text:list-item>
          </text:list>
        </text:list-item>
      </text:list>
      <text:list text:continue-list="list1601569708" text:style-name="L12">
        <text:list-item>
          <text:list>
            <text:list-item>
              <text:list>
                <text:list-item>
                  <text:p text:style-name="P26">Bohrlöcher</text:p>
                </text:list-item>
                <text:list-item>
                  <text:p text:style-name="P26">Helixkreise</text:p>
                </text:list-item>
                <text:list-item>
                  <text:p text:style-name="P26">Unterpfad-Einbettungen</text:p>
                </text:list-item>
                <text:list-item>
                  <text:p text:style-name="P26">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text:bookmark-start text:name="__RefHeading___Toc2718_813158241"/>4.2.5.1. Aufbau von Parameter-Texten<text:bookmark-end text:name="__RefHeading___Toc2718_813158241"/></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4</text:bookmark-ref>), dann kann er mit einer Tilde (~) und eventuell folgenden Leerzeichen umgebrochen werden, z.B. hier bei der Definition der Werteliste für die Variable L:</text:p>
      <text:p text:style-name="P28">O2 T2<text:line-break/>S15 M...x2<text:line-break/>:L5,10,15,~<text:line-break/> <text:s text:c="2"/>20,25</text:p>
      <text:p text:style-name="Text_20_body">Der Ankerpunkt eines Textes muss momentan</text:p>
      <text:list text:style-name="L14">
        <text:list-item>
          <text:p text:style-name="P29">links unten</text:p>
        </text:list-item>
        <text:list-item>
          <text:p text:style-name="P29"><text:span text:style-name="T17">oder </text:span>rechts unten</text:p>
        </text:list-item>
        <text:list-item>
          <text:p text:style-name="P29"><text:span text:style-name="T17">oder </text:span>in der Mitte</text:p>
        </text:list-item>
      </text:list>
      <text:p text:style-name="Text_20_body">liegen. <text:span text:style-name="T18">Wenn der Anker nicht in der Mitte ist, darf </text:span>der Text <text:span text:style-name="T18">auch </text:span>nicht gedreht sein. <text:span text:style-name="T18">Zuletzt darf er</text:span> <text:span text:style-name="T18">nicht </text:span>von unten nach oben oder von rechts nach links orientiert sein. Am besten wählt man den Ankerpunkt in der Mitte, weil sich dann bei Textskalierungen der Mittelpunkt des Überlappungskreis des Textes nicht verschiebt, <text:span text:style-name="T18">und weil dann ein Drehen des Pfadtextes (i.d.R. zusammen mit dem Pfad) um 90° problemlos möglich ist</text:span>.</text:p>
      <text:p text:style-name="Text_20_body">Die Bilder <text:span text:style-name="T1">in vorhergehenden Abschnitten </text:span>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7</text:bookmark-ref>).</text:p>
      <text:h text:style-name="Heading_20_4" text:outline-level="4"><text:bookmark-start text:name="__RefHeading___Toc2720_813158241"/>4.2.5.2. Zuordnung zu Objekten nur mit Überlappung<text:bookmark-end text:name="__RefHeading___Toc2720_813158241"/></text:h>
      <text:p text:style-name="Standard">Parameter-Texte müssen so platziert werden, dass sie „ihr Element“ überlappen. Dabei muss darauf geachtet werden, dass</text:p>
      <text:list text:style-name="L15">
        <text:list-item>
          <text:p text:style-name="P30">der Text ebenfalls im Pfadlayer liegt;</text:p>
        </text:list-item>
        <text:list-item>
          <text:p text:style-name="P3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0">die Überlappung weit genug ist: Die Überlappung wird durch einen Kreis um den Textmittelpunkt geprüft, der sich allerdings vor allem bei breiten Texten nicht über die volle Textbreite erstreckt.</text:p>
        </text:list-item>
      </text:list>
      <text:h text:style-name="Heading_20_4" text:outline-level="4"><text:bookmark-start text:name="__RefHeading___Toc2722_813158241"/>4.2.5.3. Problemfälle und ihre Lösung<text:bookmark-end text:name="__RefHeading___Toc2722_813158241"/></text:h>
      <text:p text:style-name="Text_20_body">Hier sind einige Beispiele für Problemfälle und ihre Lösungen:</text:p>
      <text:list text:style-name="L16">
        <text:list-item>
          <text:p text:style-name="P31">Im folgenden Beispiel sollte sich der Text N1 auf die Strecke darunter beziehen; wegen der Bevorzugung von Kreisen funktioniert das aber nur, wenn man den Text ausschließlich über <text:soft-page-break/>der Strecke anordnet:</text:p>
        </text:list-item>
        <text:list-item>
          <text:p text:style-name="P31"><draw:frame draw:style-name="fr1" draw:name="Grafik5" text:anchor-type="paragraph" svg:width="6.95cm" svg:height="3.621cm" draw:z-index="29"><draw:image xlink:href="Pictures/200000070000518700002C7D83E120FA.svm" xlink:type="simple" xlink:show="embed" xlink:actuate="onLoad" draw:mime-type="image/x-svm"/><draw:image xlink:href="Pictures/10000001000003DB0000021B070A6619.png" xlink:type="simple" xlink:show="embed" xlink:actuate="onLoad" draw:mime-type="image/png"/></draw:frame>Der (der hier von Hand ergänzte) „Suchkreis“ des folgenden breiten Texts ist kleiner als der Text: Obwohl das P die Linie überlappt, findet PathDxf2GCode diese Zuordnung nicht. Abhilfe schafft eine kleine Verschiebung des Textes nach rechts:</text:p>
          <text:p text:style-name="P31"><draw:frame draw:style-name="fr2" draw:name="Grafik6" text:anchor-type="paragraph" svg:x="5.509cm" svg:y="0cm" svg:width="5.985cm" svg:height="3.789cm" draw:z-index="41"><draw:image xlink:href="Pictures/1000000100000173000000F0D124FC84.png" xlink:type="simple" xlink:show="embed" xlink:actuate="onLoad" draw:mime-type="image/png"/></draw:frame></text:p>
        </text:list-item>
      </text:list>
      <text:h text:style-name="Heading_20_4" text:outline-level="4"><text:bookmark-start text:name="__RefHeading___Toc2724_813158241"/>4.2.5.4. Zuordnung zu Objekten durch Parameter-Text-Layer<text:bookmark-end text:name="__RefHeading___Toc2724_813158241"/></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5">Parameter-Text-Layer</text:span>, in das sowohl das Element wie der Parameter-Text gelegt wird. Der Layername muss dazu mit einer Tilde und einem Buchstaben ergänzt werden:</text:p>
      <text:p text:style-name="P32">Pfadlayer-Name~Kleinbuchstaben</text:p>
      <text:p text:style-name="P33">Hier ist ein Beispiel dafür: Die folgende Konstruktion verbindet ein Durchgangsloch mit einem <text:s/>Stufe, die einen Teil des Lochs umfasst:</text:p>
      <text:p text:style-name="P33"><draw:frame draw:style-name="fr1" draw:name="Grafik10" text:anchor-type="paragraph" svg:width="6.699cm" svg:height="4.664cm" draw:z-index="40"><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ls Fräspfad ist ein Helixloch sowie ein Bogen nötig, wobei der Bogen durch die Parameterangabe B1 nur bis zur Mitte des Profils gefräst wird. Alle Pfadsegemente und auch die Parameter-Texte liegen in der folgenden Zeichnung auf dem Pfadlayer <text:span text:style-name="T6">2916.1P</text:span>. der in einem roten Farbton dargestellt ist – auch der Bogen und der Text B1. Ohne spezielle Zuordnung wird der Text vom Kreis des Helixloches „gefangen“, statt dem Bogen zugeordnet zu werden:</text:p>
      <text:p text:style-name="P33"><draw:frame draw:style-name="fr1" draw:name="Grafik11" text:anchor-type="paragraph" svg:width="6.246cm" svg:height="3.923cm" draw:z-index="30"><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3">Man kann das an der Ausgabe von PathDxf2GCode mit Option -x B1 sehen:</text:p>
      <text:p text:style-name="P28">Objekt<text:line-break/> <text:s text:c="2"/>Circle LAYER=2916_1P CODENAME=CIRCLE TYPE=Circle LINETYPE=…<text:line-break/>hat zugeordneten Text ''B1' @ [47.900|122.750] d=2.343'</text:p>
      <text:p text:style-name="P33">Abhilfe erreicht man durch die Zuordnung von Bogen und Text B1 zu einem eigenen Paramstext-Layer <text:span text:style-name="T19">2916.1P~</text:span><text:span text:style-name="T20">a</text:span> (der hier in der dafür üblichen blauen Farbe gezeigt wird). Dadurch kann der Text zuverlässig dem Bogen zugeordnet werden, obwohl er weitere Pfadsegmente überlappt:</text:p>
      <text:p text:style-name="P33"><draw:frame draw:style-name="fr3" draw:name="Grafik12" text:anchor-type="paragraph" svg:width="6.447cm" svg:height="4.103cm" draw:z-index="32"><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Standard">Die Ausgabe von PathDxf2GCode zeigt nun, dass der Text dem Bogen zugeordnet ist:</text:p>
      <text:p text:style-name="Standard"/>
      <text:p text:style-name="P28">Objekt<text:line-break/> <text:s text:c="2"/>Arc LAYER=2916_2P~A CODENAME=ARC TYPE=Arc LINETYPE=CONTINUOUS%1 …<text:line-break/>hat zugeordneten Text ''B1' @ [77.900|122.750] d=2.343'</text:p>
      <text:h text:style-name="Heading_20_3" text:outline-level="3"><text:bookmark-start text:name="__RefHeading___Toc2726_813158241"/>4.2.6. Geometrie der Fräsparameter<text:bookmark-end text:name="__RefHeading___Toc2726_813158241"/></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31"><draw:image xlink:href="Pictures/20000007000034420000300BF7F4890E.svm" xlink:type="simple" xlink:show="embed" xlink:actuate="onLoad" draw:mime-type="image/x-svm"/><draw:image xlink:href="Pictures/1000000100000279000002460F18B6EB.png" xlink:type="simple" xlink:show="embed" xlink:actuate="onLoad" draw:mime-type="image/png"/></draw:frame><text:soft-page-break/></text:p>
      <text:h text:style-name="Heading_20_3" text:outline-level="3"><text:bookmark-start text:name="__RefHeading__1649_1253387321"/>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21">≥</text:span></text:p>
      <text:list text:style-name="L17">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5">Keine weiteren Segmente ab Punkt … gefunden</text:span>“ (siehe auch S. <text:bookmark-ref text:reference-format="page" text:ref-name="__RefHeading__1951_1392561347">32</text:bookmark-ref>).</text:p>
      <text:p text:style-name="Text_20_body">Der Anfang und das Ende eines Pfades müssen speziell gekennzeichnet werden. Dazu dienen kleine Kreise mit Linientyp Strich-Doppelstrich (DXF: PHANTOM):</text:p>
      <text:list text:style-name="L18">
        <text:list-item>
          <text:p text:style-name="P35">Der Anfang wird durch einen Kreis mit Durchmesser 1 mm markiert;</text:p>
        </text:list-item>
        <text:list-item>
          <text:p text:style-name="P35">das Ende durch einen Kreis mit Durchmesser 2 mm;</text:p>
        </text:list-item>
        <text:list-item>
          <text:p text:style-name="P35"/>
        </text:list-item>
      </text:list>
      <text:p text:style-name="Text_20_body">Am Pfadanfang (d.h. in einem Parameter-Text über dem 1mm-Anfangskreis) können folgende Werte festgelegt werden („TOMBIFDUPSRAW“):</text:p>
      <text:list text:style-name="L19">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text:soft-page-break/>(siehe S. <text:bookmark-ref text:reference-format="page" text:ref-name="__RefHeading__1108_1253387321">31</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37">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text:continue-numbering="true" text:style-name="L19">
        <text:list-item>
          <text:p text:style-name="P36">P: Stützsteg-Länge; siehe Erklärung auf S. <text:bookmark-ref text:reference-format="page" text:ref-name="__RefHeading__2355_207922309">19</text:bookmark-ref>.</text:p>
        </text:list-item>
        <text:list-item>
          <text:p text:style-name="P36">U: Minimaler Stützsteg-Abstand; siehe Erklärung auf S. <text:bookmark-ref text:reference-format="page" text:ref-name="__RefHeading__2355_207922309">19</text:bookmark-ref>.</text:p>
        </text:list-item>
        <text:list-item>
          <text:p text:style-name="P36">S: Leerfahrt-Höhe; in dieser Höhe erfolgen Leerfahrten, wenn nicht bei einer Leerfahrt oder einem Frässegment ein abweichender S-Wert angegeben ist. Wenn die Angabe fehlt, wird</text:p>
          <text:list>
            <text:list-item>
              <text:p text:style-name="P36">bei Subpfaden oder bei Angabe des /c-Aufrufparameters (siehe S. <text:bookmark-ref text:reference-format="page" text:ref-name="__RefHeading__1108_1253387321">31</text:bookmark-ref>) die Summe aus T und O verwendet („ein kleines Stück höher als T“). Bei Verwendung dieses Defaults muss man sicherstellen, dass sich keine Befestigungsobjekte in der Arbeitsfläche des Pfades befinden;</text:p>
            </text:list-item>
            <text:list-item>
              <text:p text:style-name="P36">beim Top-Level-Pfad (Projektpfad) der Wert des /s-Aufrufparameters (siehe S. <text:bookmark-ref text:reference-format="page" text:ref-name="__RefHeading__1108_1253387321">31</text:bookmark-ref>) verwendet; </text:p>
            </text:list-item>
          </text:list>
        </text:list-item>
        <text:list-item>
          <text:p text:style-name="P38">R: Dateinamen-Ergänzung; dieser Text wird in die Namen der erzeugten Dateien aufgenommen. Der Zweck ist, über die Variablenbelegungen im Dateinamen zu informieren – siehe S. <text:bookmark-ref text:reference-format="page" text:ref-name="__RefHeading__2579_585828919">25</text:bookmark-ref>. Der Standardwert ist ein leerer Text, d.h. die Namen der erzeugten Dateien werden direkt aus dem Namen der DXF-Datei übernommen.</text:p>
        </text:list-item>
        <text:list-item>
          <text:p text:style-name="P3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38">A: Maximaler Helixkreisdurchmesser in mm; bei fehlender Angabe wird als Wert 4 <text:span text:style-name="T22">·</text:span><text:span text:style-name="T23"> O verwendet. Zur Verwendung dieses Wertes siehe S. </text:span><text:span text:style-name="T23"><text:bookmark-ref text:reference-format="page" text:ref-name="__RefHeading__2304_1453201033">18</text:bookmark-ref></text:span><text:span text:style-name="T23">.</text:span></text:p>
        </text:list-item>
        <text:list-item>
          <text:p text:style-name="P38"><text:span text:style-name="T23">W: Erste Frästiefe für leerfahrtloses Fräsen (siehe S. </text:span><text:span text:style-name="T23"><text:bookmark-ref text:reference-format="page" text:ref-name="__RefHeading__6323_207922309">20</text:bookmark-ref></text:span><text:span text:style-name="T23">); wenn diese Angabe beim Pfadstart steht, werden alle geraden und Bogen-Frässegmente leerfahrtlos gefräst (explizite Leerfahrten werden aber ausgeführt). Die nächsten Fräsfahrten werden wie üblich um die Zustellung I tiefer ausgeführt – ein “Bohren” auf diese nächsten Frästiefe muss also möglich sein, oder an einer schon ausgefrästen offenen Stelle durchgeführt werden.</text:span></text:p>
        </text:list-item>
      </text:list>
      <text:h text:style-name="P39" text:outline-level="3"><text:bookmark-start text:name="__RefHeading___Toc2728_813158241"/>4.2.8. <text:span text:style-name="T24">Pfadtext als @-Referenz</text:span><text:bookmark-end text:name="__RefHeading___Toc2728_813158241"/></text:h>
      <text:p text:style-name="P40">Häufig haben Pfade in einer Zeichnung identische Parameter, z.B. für die Pfade auf der linken und rechten Seite eines Winkelprofils oder für Teile, die aus demselben Profil gefräst werden. Statt an den Anfangspunkten aller solchen Pfade immer alle Parameter anzugeben, kann man nur einen Pfad vollständig parametrisieren und an anderen Anfangspunkten auf diesen Pfad verweisen. Dazu gibt man dort nur @<text:span text:style-name="T5">Pfadname</text:span> an. Hier ist ein Beispiel:</text:p>
      <text:p text:style-name="P41"><text:soft-page-break/><draw:frame draw:style-name="fr4" draw:name="Bild1" text:anchor-type="as-char" svg:width="6.669cm" svg:height="6.849cm" draw:z-index="39"><draw:image xlink:href="Pictures/1000000000000274000002857638C9C3.png" xlink:type="simple" xlink:show="embed" xlink:actuate="onLoad" draw:mime-type="image/png"/></draw:frame></text:p>
      <text:p text:style-name="P40">Eine solche @-Referenz darf keine weiteren Parameter enthalten, und der referenzierte Pfad muss sich in derselben DXF-Datei befinden.</text:p>
      <text:h text:style-name="P39" text:outline-level="3"><text:bookmark-start text:name="__RefHeading___Toc2730_813158241"/><text:span text:style-name="T24">4.2.9. </text:span>Leerfahrten<text:bookmark-end text:name="__RefHeading___Toc2730_813158241"/></text:h>
      <text:p text:style-name="Text_20_body">Leerfahrten werden durch strichlierte (DXF: DASHED) oder lang-gestrichtelte (DXF: HIDDEN) Linien dargestellt. Für strichlierte Leerfahrten können folgende Parameter angegeben werden:</text:p>
      <text:list text:style-name="L20">
        <text:list-item>
          <text:p text:style-name="P42">S: Leerfahrt-Höhe; wenn nicht angegeben, wird der Wert beim Pfad verwendet.</text:p>
        </text:list-item>
        <text:list-item>
          <text:p text:style-name="P42">N: Reihenfolge bei Verzweigungen; siehe S. <text:bookmark-ref text:reference-format="page" text:ref-name="__RefHeading__1863_2102980402">25</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text:s/>und <text:bookmark-ref text:reference-format="page" text:ref-name="__RefHeading__1245_1253387321">27</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1</text:bookmark-ref>).</text:p>
      <text:h text:style-name="Heading_20_3" text:outline-level="3"><text:bookmark-start text:name="__RefHeading__3017_1578383688"/>4.2.<text:span text:style-name="T25">10</text:span>.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5">aufeinanderfolgende Frässegmente </text:span>zu <text:span text:style-name="T5">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5</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5">Parameter einer Fräskette</text:span> werden beim ersten Frässegment angegeben; sie gelten <text:soft-page-break/>dann für die ganze Kette:</text:p>
      <text:list xml:id="list1265569417" text:style-name="L21">
        <text:list-item>
          <text:p text:style-name="P43">I: Zustellung in mm; wenn diese Angabe fehlt, wird der I-Wert des Pfades verwendet.</text:p>
        </text:list-item>
        <text:list-item>
          <text:p text:style-name="P4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text:style-name="L22">
        <text:list-item>
          <text:p text:style-name="P44">als durchgehende Linien (DXF: CONTINUOUS); für diese Fräsfahrten wird die Frästiefe mit dem B-Parameter festgelegt;</text:p>
        </text:list-item>
        <text:list-item>
          <text:p text:style-name="P44">als strich-doppelpunktierte Linien (DXF: DIVIDE) für „Markierungssegmente“; für diese Fräsfahrten wird die Frästiefe mit dem D-Parameter festgelegt;</text:p>
        </text:list-item>
        <text:list-item>
          <text:p text:style-name="P4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Durch diese zwei Segmentarten können häufige Fälle verschieden tiefer Fräsungen ohne allzuviele Einzelangaben beschrieben werden, z.B.</text:p>
      <text:list text:style-name="L23">
        <text:list-item>
          <text:p text:style-name="P45">Fräsungen von Markierungen</text:p>
        </text:list-item>
        <text:list-item>
          <text:p text:style-name="P45">evtl. auch Fräsungen mit Haltestegen, wenn keine Markierungsfräsungen nötig sind.</text:p>
        </text:list-item>
      </text:list>
      <text:p text:style-name="Text_20_body">Die <text:span text:style-name="T5">optionalen Parameter für einzelne Frässegmente </text:span>sind:</text:p>
      <text:list xml:id="list162710469790808" text:continue-list="list1265569417" text:style-name="L21">
        <text:list-item>
          <text:p text:style-name="P43">F: Fräsgeschwindigkeit in mm/min; wenn nicht angegeben, wird die Angabe beim Pfad oder, wenn diese auch fehlt, des /f-Aufrufparameters verwendet.</text:p>
        </text:list-item>
        <text:list-item>
          <text:p text:style-name="P43">B: (bei durchgehender Linie) bzw. D (bei Markierungslinie): Frästiefe in mm; wenn nicht angegeben, wird die Angabe beim Pfad verwendet.</text:p>
        </text:list-item>
        <text:list-item>
          <text:p text:style-name="P43">N: Reihenfolge bei Sternen (siehe S. <text:bookmark-ref text:reference-format="page" text:ref-name="__RefHeading__1863_2102980402">25</text:bookmark-ref>).</text:p>
        </text:list-item>
        <text:list-item>
          <text:p text:style-name="P43">Q: Kommentar, der in die G-Code-Datei übernommen wird.</text:p>
        </text:list-item>
      </text:list>
      <text:h text:style-name="Heading_20_3" text:outline-level="3"><text:bookmark-start text:name="__RefHeading___Toc2732_813158241"/>4.2.1<text:span text:style-name="T25">1</text:span>. Bohrlöcher<text:bookmark-end text:name="__RefHeading___Toc2732_813158241"/></text:h>
      <text:p text:style-name="Text_20_body">Bohrlöcher sind Löcher, die genau den Durchmesser des Fräsers haben (wo also der gezeichnete Durchmesser gleich dem O-Wert des Pfades ist); sie werden eher selten verwendet. Bohrlöcher können wie Frässegmente entweder mit durchgehender <text:span text:style-name="T26">Linie für Fräsung bis zur Tiefe B </text:span>oder strich-doppeltpunktierter Linie <text:span text:style-name="T26">für Fräsung bis zur Tiefe D </text:span>gezeichnet werden (siehe S. <text:bookmark-ref text:reference-format="page" text:ref-name="__RefHeading__3017_1578383688">17</text:bookmark-ref>). Für Bohrlöcher können folgende Parameter angegeben werden („FBQ“):</text:p>
      <text:list xml:id="list162711048606890"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Q: Kommentar, der in die G-Code-Datei übernommen wird.</text:p>
        </text:list-item>
        <text:list-item>
          <text:p text:style-name="P43">(C – derzeit noch nicht unterstützt: Angabe, ab welcher Tiefe G81 statt G01 verwendet werden soll).</text:p>
        </text:list-item>
      </text:list>
      <text:h text:style-name="Heading_20_3" text:outline-level="3"><text:bookmark-start text:name="__RefHeading__2304_1453201033"/>4.2.1<text:span text:style-name="T25">2</text:span>. Helixkreise<text:bookmark-end text:name="__RefHeading__2304_1453201033"/></text:h>
      <text:p text:style-name="Text_20_body">Helixkreise sind kreisförmige Fräsungen mit einem größerem Außendurchmesser als dem des Fräsers. Der gezeichnete Kreis gibt den <text:span text:style-name="T5">Außendurchmesser</text:span> der Fräsung an; das ist hilfreich bei der <text:soft-page-break/>häufigsten Anwendung, dem Fräsen eines Loches.</text:p>
      <text:p text:style-name="P25">Achtung: Alle anderen Fräspfade – insbesondere Bögen (ARC) – beschreiben die Bewegung des Fräser<text:span text:style-name="T5">zentrums</text:span>; nur bei den Helixpfaden wird der <text:span text:style-name="T5">äußere Rand der Fräsung </text:span>gezeichnet. Das ist verwirrend, weil man optisch einen (langen) Bogen nicht gut von einem Kreis unterscheiden kann. Ich lasse es aber wegen der häufigen Verwendung von Helixkreisen für Lochfräsungen so. </text:p>
      <text:p text:style-name="P25">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5">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Q/FDIQ“):</text:p>
      <text:list xml:id="list162710034716405"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I: Höhe eines Spiralganges in mm; wenn diese Angabe fehlt, wird der I-Wert des Pfades verwendet.</text:p>
        </text:list-item>
        <text:list-item>
          <text:p text:style-name="P43">Q: Kommentar, der in die G-Code-Datei übernommen wird.</text:p>
        </text:list-item>
      </text:list>
      <text:p text:style-name="Text_20_body">Für Helixkreise, deren Durchmesser größer ist als der doppelte Fräserdurchmesser, erzeugt PathDxf2GCode <text:span text:style-name="T5">keinen </text:span>G-Code zum Wegfräsen des entstehende Kerns – daher sind das auch <text:span text:style-name="T5">Kreise</text:span> und keine <text:span text:style-name="T5">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text:span text:style-name="T25">3</text:span>.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text:style-name="L24">
        <text:list-item>
          <text:p text:style-name="P46">gerade Linien</text:p>
        </text:list-item>
        <text:list-item>
          <text:p text:style-name="P46">Bögen</text:p>
        </text:list-item>
        <text:list-item>
          <text:p text:style-name="P4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7"><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Folgende Parameter müssen angegeben werden („PUBD“):</text:p>
      <text:p text:style-name="Standard"/>
      <text:list text:continue-list="list162710034716405" text:style-name="L21">
        <text:list-item>
          <text:p text:style-name="P43">P: Länge der Stützstege; die zwei äußersten Stützstege haben die halbe Länge (der Grund dafür ist, dass bei vollständigen Helixkreisen dadurch ein Stützsteg der Breite P entsteht).</text:p>
        </text:list-item>
        <text:list-item>
          <text:p text:style-name="P43">U: Minimaler Abstand der Stützstege. PathDxf2GCode versucht so viele Stützstege wie möglich in gleichen Abständen entlang der Linie unterzubringen; der Abstand zwischen zwei Stegen ist aber immer mindestens U.</text:p>
        </text:list-item>
        <text:list-item>
          <text:p text:style-name="P43">B: Frästiefe zwischen den Stützstegen.</text:p>
        </text:list-item>
        <text:list-item>
          <text:p text:style-name="P43">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 <text:span text:style-name="T27">Dann erhält man allerdings nicht die unter 45° verlaufenden Übergänge zwischen Stützstegen und tiefen Fräsungen, sondern vertikale Grenzen, die den Fräskopf zum Stillstand abbremsen und wieder anfahren lassen, was das Fräsen viel langsamer macht</text:span>.</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text:span text:style-name="T25">4</text:span>.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text:span text:style-name="T25">5</text:span>. Teilpfad-Einbettungen<text:bookmark-end text:name="__RefHeading__3237_207922309"/></text:h>
      <text:h text:style-name="Heading_20_4" text:outline-level="4"><text:bookmark-start text:name="__RefHeading___Toc11269_1113469703"/>4.2.15.1. Einbettung mit Fräsen<text:bookmark-end text:name="__RefHeading___Toc11269_1113469703"/></text:h>
      <text:p text:style-name="Text_20_body">Für das Fräsen mehrerer vorher konstruierter Bauteile müssen deren Pfad-Zeichnungen in Projekt-Zeichnungen referenziert werden können. Dies erfolgt mit einer strichpunktierten Linie (DXF: <text:soft-page-break/>DASHDOT) – sowohl eine gerade Strecke wie ein Bogen kann verwendet werden, <text:span text:style-name="T28">relevant sind nur Anfangs- und Endpunkt</text:span>.</text:p>
      <text:p text:style-name="Text_20_body">Am Subpfad-Element können folgende Optionen angegeben werden („TOM“):</text:p>
      <text:list text:style-name="L25">
        <text:list-item>
          <text:p text:style-name="P47">&gt;: Name des einzubettenden Teilpfades; Pflicht-Angabe. Der Teilpfad wird in allen passenden DXF-Dateien gesucht – siehe S. <text:bookmark-ref text:reference-format="page" text:ref-name="__RefHeading__1245_1253387321">27</text:bookmark-ref>. Der Teilpfad wird vom Anfangs- zum Endpunkt eingebettet.</text:p>
        </text:list-item>
        <text:list-item>
          <text:p text:style-name="P47">T: Materialdicke in mm; Pflicht-Angabe.</text:p>
        </text:list-item>
        <text:list-item>
          <text:p text:style-name="P47">O: Fräserdurchmesser in mm; Pflicht-Angabe.</text:p>
        </text:list-item>
        <text:list-item>
          <text:p text:style-name="P47">M: Materialangabe; Pflicht-Angabe.</text:p>
        </text:list-item>
        <text:list-item>
          <text:p text:style-name="P48">H: Zusätzliche Höhe <text:span text:style-name="T29">in mm </text:span>für Montierung des <text:span text:style-name="T30">Fräsm</text:span>aterials auf Unterlagen; <text:span text:style-name="T29">Standardwert 0.</text:span></text:p>
        </text:list-item>
      </text:list>
      <text:p text:style-name="Text_20_body">Für das Subpfad-Element gelten folgende Bedingungen:</text:p>
      <text:list text:style-name="L26">
        <text:list-item>
          <text:p text:style-name="P49">Die Angaben T, O und M beim Anfangskreis des eingebetteten Teilpfades müssen mit den entsprechenden Werten an der Einbettungsstelle übereinstimmen.</text:p>
        </text:list-item>
        <text:list-item>
          <text:p text:style-name="P49">Der Abstand von Anfangs- und Endpunkt des eingebetteten Teilpfades muss mit dem Abstand von Anfangs- und Endpunkt der Einbettungslinie übereinstimmen (d.h. eine Skalierung des eingebetteten Teilpfades ist nicht möglich).</text:p>
        </text:list-item>
        <text:list-item>
          <text:p text:style-name="P49">Die maximale Verschachtelungstiefe von Teilpfad-Einbettungen ist 9.</text:p>
        </text:list-item>
      </text:list>
      <text:h text:style-name="P50" text:outline-level="4"><text:bookmark-start text:name="__RefHeading___Toc7407_3755525066"/>4.2.15.2. Einschränkung erlaubter Subpfade<text:bookmark-end text:name="__RefHeading___Toc7407_3755525066"/></text:h>
      <text:p text:style-name="P51">Beim Kopieren von Projekten mit Subpfaden – insbesondere von Aufspannprojekten – für eine weiteren Fräsdurchgang vergisst man leicht die Umbenennung von Subpfaden; z.B. darf ein Aufspannprojekt für die „linke“ Seite von Profilen i.d.R. nur „linke“ Subpfade enthalten, das daraus durch Umkopieren erzeugte „rechte“ Aufspannprojekt dagegen nur „rechte“ Subpfade – das entsprechende Umbenennen ist aber fehleranfällig.</text:p>
      <text:p text:style-name="P51">Um solche Fehler abzufangen, können über Angabe von /e-Parametern Paare von regulären Ausdrücken angegeben werden, mit der Bedeutung, dass ein Pfad, der dem ersten Ausdruck eines Paares entspricht, nur Subpfade aufrufen darf, die dem zweiten Ausdruck entsprechen. Die Beispielregel kann folgendermaßen formuliert werden:</text:p>
      <text:p text:style-name="P52"><text:s text:c="3"/>/<text:span text:style-name="T31">e L$:L$ /e R$:R$</text:span></text:p>
      <text:p text:style-name="P51">Um diese globalen Regeln bei Bedarf bei einem Pfad anpassen zu können, kann dort der zweite reguläre Ausdruck über den E-Parameter übersteuert werden. So können z.B. mit dem folgenden Pfadparameter sowohl Pfade, die mit L enden, wie auch solche, die mit P enden, aufgerufen werden:</text:p>
      <text:p text:style-name="P53"><text:span text:style-name="T32"><text:s text:c="3"/></text:span><text:span text:style-name="T33">E[LP]$</text:span></text:p>
      <text:h text:style-name="Heading_20_4" text:outline-level="4"><text:bookmark-start text:name="__RefHeading___Toc11271_1113469703"/>4.2.15.<text:span text:style-name="T31">3</text:span>. Einbettung ohne Fräsen für „Korrekturfräsungen“<text:bookmark-end text:name="__RefHeading___Toc11271_1113469703"/></text:h>
      <text:p text:style-name="P54">Statt einer strichpunktierten Linie kann <text:span text:style-name="T34">ein Teilpfad auch mit </text:span>eine<text:span text:style-name="T34">r </text:span>punktierte<text:span text:style-name="T34">n</text:span> Linie (DXF: DOT) <text:span text:style-name="T34">gezeichnet </text:span>werden. In diesem Fall wird die Einbettung wie eine Leerfahrt ohne Parameter behandelt (siehe S.<text:bookmark-ref text:reference-format="page" text:ref-name="__RefHeading___Toc2730_813158241">17</text:bookmark-ref>).</text:p>
      <text:p text:style-name="P54">Dies ist hilfreich, wenn für eine Projektdatei mit mehreren Bauteilen (siehe S.<text:bookmark-ref text:reference-format="page" text:ref-name="__RefHeading__1245_1253387321">27</text:bookmark-ref>) nur einzelne Bauteile neu gefräst werden sollen, etwa weil dort ein Konstruktionsfehler vorlag oder weil ein weiteres Bauteil in der Projektdatei ergänzt wurde: Man kann dann die Bauteilpfade der schon <text:soft-page-break/>korrekt gefertigten Bauteile temporär punktiert zeichnen und erhält dann den G-Code nur für die neu zu fertigenden Bauteile; danach ersetzt man die Punktierung wi<text:span text:style-name="T35">eder</text:span> durch eine Strichpunktierung.</text:p>
      <text:p text:style-name="P55"><text:span text:style-name="T36">Auch in diesem Fall dürfen am Subpfad die Angaben für &gt;, T, O und M angegeben werden, sodass für das „Überspringen“ der Einbettung alleine die Umstellung auf eine punktierte Linie reicht. Die</text:span><text:span text:style-name="T35">se</text:span><text:span text:style-name="T36"> Angaben werden aber vollständig ignoriert.</text:span></text:p>
      <text:h text:style-name="Heading_20_3" text:outline-level="3"><text:bookmark-start text:name="__RefHeading___Toc7736_3755525066"/>4.2.1<text:span text:style-name="T25">6</text:span>. Teilpfad-Einbettungen mit Variablen<text:bookmark-end text:name="__RefHeading___Toc7736_3755525066"/></text:h>
      <text:h text:style-name="Heading_20_4" text:outline-level="4"><text:bookmark-start text:name="__RefHeading___Toc2736_813158241"/>4.2.1<text:span text:style-name="T25">6</text:span>.1. Beispiel für ein Aufspann- und <text:span text:style-name="T37">Variablenprojekt</text:span><text:bookmark-end text:name="__RefHeading___Toc2736_813158241"/></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36"><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8"><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un kann man sich fragen, ob man hier wirklich immer genau einmal 2051.1P und zweimal <text:soft-page-break/>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text:span text:style-name="T38">n</text:span>projekt definieren, damit Änderungen am Aufspannprojekt nicht an mehreren Stellen nachgezogen werden müssen.</text:p>
      <text:p text:style-name="Text_20_body">Die Lösung dafür ist, zwei getrennte Projekte zu haben:</text:p>
      <text:list text:style-name="L27">
        <text:list-item>
          <text:p text:style-name="P56">Im Aufspannprojekt werden die Pfade der Griffe nicht mehr fest definiert, sondern als Variablen angegeben.</text:p>
        </text:list-item>
        <text:list-item>
          <text:p text:style-name="P56">Das Aufspannprojekt definiert an seinem Startpunkt, welche Variablen und welche Werte zulässig sind.</text:p>
        </text:list-item>
        <text:list-item>
          <text:p text:style-name="P56">In einem umgebenden Variablenprojekt werden den Variablen bestimmte Werte zugewiesen.</text:p>
        </text:list-item>
        <text:list-item>
          <text:p text:style-name="P56">Die Namen der aus dem Variablenprojekt erzeugten Dateien enthalten eine Information über die verwendeten Variablenwerte.</text:p>
        </text:list-item>
      </text:list>
      <text:p text:style-name="Text_20_body">Hier sind diese Teile im Detail gezeigt:</text:p>
      <text:p text:style-name="P57">Ad 1. Im Aufspannprojekt sind die eingebetteten Pfade über =-Variablen angegeben,</text:p>
      <text:p text:style-name="P58">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0"><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59">Ad 3. Das Variablenprojekt besteht nur mehr aus einem Aufruf des Aufspannprojekts, wo man den Variablen Werte zuweist:</text:p>
      <text:p text:style-name="P60"><draw:frame draw:style-name="fr1" draw:name="Grafik17" text:anchor-type="paragraph" svg:width="6.341cm" svg:height="6.174cm" draw:z-index="1"><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soft-page-break/></text:p>
      <text:p text:style-name="P61">Ad 4. Mit Hilfe des R-Parameters ergänzt man im Pfad des Variablenprojekts eine (beliebige) Markierung, um im Dateinamen <text:span text:style-name="T39">der G-Code-Datei </text:span>über die gewählten Variablenwerte zu in<text:span text:style-name="T39">f</text:span>ormieren. Hier ist das die Zeichenfolge _112, mit der man die gewählten Variablenwerte P1, P1, P2 symbolisiert.</text:p>
      <text:h text:style-name="Heading_20_4" text:outline-level="4"><text:bookmark-start text:name="__RefHeading__4809_1371230396"/>4.2.1<text:span text:style-name="T25">6</text:span>.2. Definition von Variablen<text:bookmark-end text:name="__RefHeading__4809_1371230396"/></text:h>
      <text:p text:style-name="Text_20_body">Variablen werden am Startpunkt eines Pfades durch Texte der Form</text:p>
      <text:p text:style-name="Text_20_body"><text:tab/><text:span text:style-name="T40">:</text:span>&lt;Name&gt;&lt;Definition der zulässigen Werte&gt;</text:p>
      <text:p text:style-name="Text_20_body">definiert. Name ist ein einzelnes beliebiges Zeichen, üblicherweise sollen aber ein Buchstabe verwendet werden. </text:p>
      <text:p text:style-name="Text_20_body">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62">:B2051.P1,2051.P2 bedeutet, dass für die Variable B die Werte 2051.P1 und 2052.P2 zulässig sind.</text:p>
      <text:p text:style-name="Text_20_body">b) über eine Liste von einzelnen Zeichen nach einem Fragezeichen. Beispiel:</text:p>
      <text:p text:style-name="P25">:<text:span text:style-name="T41">C</text:span>?PQRS bedeutet, dass für die Variable <text:span text:style-name="T41">C</text:span> die Werte P, Q, <text:span text:style-name="T42">R</text:span> und <text:span text:style-name="T42">S</text:span> zulässig sind (was auch durch :<text:span text:style-name="T41">C</text:span>P,Q,R,S angegeben werden könnte).</text:p>
      <text:list text:style-name="L28">
        <text:list-header>
          <text:p text:style-name="P63">c) über einen Bereich von Zahlen im Format von~bis. Beispiel:</text:p>
        </text:list-header>
      </text:list>
      <text:p text:style-name="P25">:<text:span text:style-name="T41">D</text:span>-0,5~1,2 bedeutet, dass für die Variable <text:span text:style-name="T41">D </text:span>Zahlen zwischen –0,5 und 1,2 (jeweils inklusive) zulässig sind.</text:p>
      <text:h text:style-name="Heading_20_4" text:outline-level="4"><text:bookmark-start text:name="__RefHeading___Toc2738_813158241"/>4.2.1<text:span text:style-name="T25">6</text:span>.3. Verwendung der Variablen<text:bookmark-end text:name="__RefHeading___Toc2738_813158241"/></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text:soft-page-break/>Die Werte der Parameter N und O können keine Variablen enthalten. Angaben wie N=X oder O=O, wo dann beim Subpfad-Element :X1 oder :O4 angegeben wird, sind daher nicht möglich und führen zu einer Fehlermeldung.</text:p>
      <text:h text:style-name="Heading_20_4" text:outline-level="4"><text:bookmark-start text:name="__RefHeading__2579_585828919"/>4.2.1<text:span text:style-name="T25">6</text:span>.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Bei Verwendung von Variablenprojekten ist die Angabe des R-Parameters hilfreich: Sein Wert wird in die Namen der erzeugten Dateien übernommen, sodass man dort kennzeichnen kann, welche Variablenwerte zum erzeugten G-<text:span text:style-name="T43">C</text:span>ode geführt haben. </text:p>
      <text:h text:style-name="Heading_20_4" text:outline-level="4"><text:bookmark-start text:name="__RefHeading___Toc2740_813158241"/>4.2.1<text:span text:style-name="T25">6</text:span>.5. Prüfwerte für Variablen<text:bookmark-end text:name="__RefHeading___Toc2740_813158241"/></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text:style-name="L29">
        <text:list-item>
          <text:p text:style-name="P64">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text:span text:style-name="T44">nwerten</text:span> (wie etwa im Aufspannprojekt oben) möglichst verschiedene Werte zur Prüfung verwendet werden.</text:p>
        </text:list-item>
        <text:list-item>
          <text:p text:style-name="P64">Für die Bereiche von zulässigen Werten werden abwechselnd von- und bis-Wert der Bereiche verwendet.</text:p>
        </text:list-item>
      </text:list>
      <text:h text:style-name="Heading_20_3" text:outline-level="3"><text:bookmark-start text:name="__RefHeading__1863_2102980402"/>4.2.1<text:span text:style-name="T25">7</text:span>.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5">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5"><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soft-page-break/></text:p>
      <text:list text:style-name="L30">
        <text:list-item>
          <text:p text:style-name="P65">Nach der Leerfahrt vom Startpunkt zum linken Sternpunkt wird das Segment mit N1 gefräst.</text:p>
        </text:list-item>
        <text:list-item>
          <text:p text:style-name="P65">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5">Diese Fräsfahrt erreicht nun wieder den Sternpunkt links. Da hier nun beide markierten Segmente „verbraucht“ (weil schon befahren) sind, wird nun die Leerfahrt in der Mitte gewählt.</text:p>
        </text:list-item>
        <text:list-item>
          <text:p text:style-name="P65">Am rechten Sternpunkt bleibt schließlich nur mehr die Leerfahrt zum Pfadende übrig.</text:p>
        </text:list-item>
      </text:list>
      <text:h text:style-name="Heading_20_2" text:outline-level="2"><text:bookmark-start text:name="__RefHeading__1371_695252532"/>4.3. Bauteil<text:span text:style-name="T45">pfad-DXF-Dateien</text:span><text:bookmark-end text:name="__RefHeading__1371_695252532"/></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text:s/>ist beschrieben, dass <text:s/>ein Pfadname aus „Pfadnamen-Teilworten“ besteht; die genaue Zerlegung in Teilworte wird durch ein Muster (einen „regulären Ausdruck“) <text:s/>bestimmt. Wenn nun ein Pfad <text:span text:style-name="T46">zur Expandierung einer Subpfad-Einbettung </text:span>in <text:span text:style-name="T46">einer Menge von </text:span>Dateien gesucht <text:span text:style-name="T46">werden muss</text:span>, dann sucht PathDxf2GCode in den Dateinamen passende <text:span text:style-name="T5">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47">([0-9]{4})(?:[.]([0-9]+))?</text:span>, was folgende Pfadnamenmuster erlaubt:</text:p>
      <text:list text:style-name="L31">
        <text:list-item>
          <text:p text:style-name="P66">4-stellige Zahl</text:p>
        </text:list-item>
        <text:list-item>
          <text:p text:style-name="P66">4-stellige Zahl . Ziffern</text:p>
        </text:list-item>
      </text:list>
      <text:p text:style-name="Text_20_body">also z.B. 1234 oder 1234.1 .</text:p>
      <text:p text:style-name="P25">Im Detail enthält das Muster zwei „Gruppen“, die durch einen Punkt getrennt sind; wobei die zweite Gruppe samt dem Punkt optional ist.</text:p>
      <text:p text:style-name="Text_20_body">Ein DXF-Dateiname ist nun so aufgebaut:</text:p>
      <text:p text:style-name="Text_20_body"><text:tab/>...<text:span text:style-name="T5">Pfadnummernbereich</text:span>{,<text:span text:style-name="T5">Pfadnummernbereich</text:span>...}....DXF</text:p>
      <text:p text:style-name="Text_20_body">Ein Pfadnummernbereich hat dabei eine der folgenden zwei Formen und Bedeutungen:</text:p>
      <text:list text:style-name="L32">
        <text:list-item>
          <text:p text:style-name="P67"><text:soft-page-break/><text:span text:style-name="T5">Pfadnamenmuster</text:span>.</text:p>
          <text:list>
            <text:list-item>
              <text:p text:style-name="P67">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8">Pfadnamenuster–Pfadnnamenmuster</text:p>
          <text:list>
            <text:list-item>
              <text:p text:style-name="P67">Zwei Muster, getrennt durch ein Minus.</text:p>
            </text:list-item>
            <text:list-item>
              <text:p text:style-name="P67">Ein solcher Bereich zeigt an, dass die DXF-Datei Pfade in diesem <text:span text:style-name="T5">Bereich</text:span> enthält. Dabei werden Gruppen als Zahl verglichen, wenn sie nur aus Ziffern bestehen (was beim Standardwert für /p immer der Fall sein muss), andernfalls werden sie als Text verglichen. So kann eine Datei mit Namen <text:span text:style-name="T5">1234–1236.DXF </text:span><text:span text:style-name="T9">beliebige Pfade enthalten, die mit 1234 oder 1235 oder 1236 beginnen; also u.a. den Pf</text:span>ad 1234.8A , aber auch den Pfad 1235.99B oder <text:s/>1236.3C. Eine Datei mit Namen <text:span text:style-name="T5">1234.1–1234.10.DXF </text:span><text:span text:style-name="T9"><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5">1234.DXF</text:span> und <text:span text:style-name="T5">1234,1235.DXF </text:span>und <text:span text:style-name="T5">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5">1234.1 Motorgehäuse.DXF</text:span>. Damit ist es auch leicht möglich, mehrere Dateien (Zeichnungen) für gleiche Nummernbereiche zu haben, z.B. eine weitere Datei <text:s/><text:span text:style-name="T5">1234.1 Motorgehäuse-Befestigung.DXF.</text:span></text:p>
      <text:p text:style-name="Text_20_body">Zur Suche nach Subpfaden werden folgende Verzeichnisse durchsucht:</text:p>
      <text:list text:style-name="L33">
        <text:list-item>
          <text:p text:style-name="P69">Zuerst das Verzeichnis, wo die gerade verarbeitete DXF-Datei liegt;</text:p>
        </text:list-item>
        <text:list-item>
          <text:p text:style-name="P69">dann alle Verzeichnisse, die über /d-Parameter angegeben sind (siehe S. <text:bookmark-ref text:reference-format="page" text:ref-name="__RefHeading__1245_1253387321">27</text:bookmark-ref>).</text:p>
        </text:list-item>
      </text:list>
      <text:p text:style-name="Text_20_body">Der Dateiname soll in der Pfadzeichnung eingetragen werden, damit er beim DXF-Export ohne viel Nachdenken konsistent zu den Zeichnungsnummern gewählt wird.</text:p>
      <text:h text:style-name="Heading_20_2" text:outline-level="2"><text:bookmark-start text:name="__RefHeading__1373_695252532"/>4.4. Projekte<text:bookmark-end text:name="__RefHeading__1373_695252532"/></text:h>
      <text:h text:style-name="Heading_20_3" text:outline-level="3"><text:bookmark-start text:name="__RefHeading__1245_1253387321"/>4.4.<text:span text:style-name="T46">1</text:span>.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12"><draw:image xlink:href="Pictures/10000000000002C4000001E053CB3483.png" xlink:type="simple" xlink:show="embed" xlink:actuate="onLoad" draw:mime-type="image/png"/></draw:frame><text:soft-page-break/></text:p>
      <text:p text:style-name="Text_20_body">Bei einem Projektpfad müssen zumindest folgende Parameter angegeben werden:</text:p>
      <text:list xml:id="list3841998324" text:style-name="L34">
        <text:list-item>
          <text:p text:style-name="P70">O, weil der Fräsdurchmesser für einen Projekt-Fräsdurchgang fest ist; und gegen die O-Angabe in eingebettetem Pfaden geprüft werden muss;</text:p>
        </text:list-item>
        <text:list-item>
          <text:p text:style-name="P70">T, weil aus Sicherheitsgründen immer klar sein muss, ab welcher Tiefe bei senkrechten Fahrten ein Bohren (G01) statt einer Leerfahrt (G00) nötig ist;</text:p>
        </text:list-item>
        <text:list-item>
          <text:p text:style-name="P70">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5">Projektnummer</text:span>.<text:span text:style-name="T5">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text:style-name="L35">
        <text:list-item>
          <text:p text:style-name="P71">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text:soft-page-break/>und Endemarkierungen (1- und 2mm-Kreise) dabei <text:span text:style-name="T5">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 hinaus sollen auch PDFs der Projekt-Pfadzeichnungen auf dem Steuerrechner der Fräse abgespeichert werden, da sie die Arbeitsunterlage für das Auf- und Umspannen der Halbzeuge und Bauteile und ggf. den Fräsertausch bilden.</text:p>
      <text:h text:style-name="Heading_20_2" text:outline-level="2"><text:bookmark-start text:name="__RefHeading___Toc2746_813158241"/>4.5. Z-Probes<text:bookmark-end text:name="__RefHeading___Toc2746_813158241"/></text:h>
      <text:h text:style-name="Heading_20_3" text:outline-level="3"><text:bookmark-start text:name="__RefHeading___Toc2748_813158241"/>4.5.1. Grundlagen<text:bookmark-end text:name="__RefHeading___Toc2748_813158241"/></text:h>
      <text:p text:style-name="Text_20_body">An meiner Fräse habe ich ein Problem mit der Aufspannung: <text:span text:style-name="T48">Auch auf der abgerichteten Aufspannplatte liegen die Halbzeuge nicht in einer Ebene, sondern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text:style-name="L36">
        <text:list-item>
          <text:p text:style-name="P72">Eine Pfadzeichnung kann Z-Probe-Punkte enthalten, an denen vor dem eigentlichen Fräsvorgang durch eine Messfahrt der tatsächliche Z-Wert gemessen wird. <text:span text:style-name="T49">D</text:span>er Fräser fährt die Punkte mit einem G38.2 an, den von UGS angezeigten Wert <text:span text:style-name="T49">erfasse </text:span>ich manuell in einer Textdatei.</text:p>
        </text:list-item>
        <text:list-item>
          <text:p text:style-name="P73">In der G-Code-Datei, die PathDxf2GCode erzeugt, wird bei jeder Z-Koordinate ein Formelausdruck hinterlegt, der die Korrektur des Z-Wertes in Abhängigkeiten von den Messwerten an den Z-Probe-Punkten beschreibt.</text:p>
        </text:list-item>
        <text:list-item>
          <text:p text:style-name="P73">Nach der Messfahrt wird mit Hilfe eines weiteren Programms namens PathGCodeAdjustZ die G-Code-Datei mit den Werten aus der Textdatei und den Formeln “nachberechnet”.</text:p>
        </text:list-item>
        <text:list-item>
          <text:p text:style-name="P73">Den Fräsvorgang führe ich dann mit dieser verbesserten G-Code-Datei durch.</text:p>
        </text:list-item>
      </text:list>
      <text:p text:style-name="P74">Der gesamte Arbeitsablauf sieht so aus:</text:p>
      <text:p text:style-name="P74"/>
      <text:p text:style-name="P74"/>
      <text:p text:style-name="P74"><draw:custom-shape text:anchor-type="paragraph" draw:z-index="6" draw:name="Form1" draw:style-name="gr1" draw:text-style-name="P76" svg:width="3.121cm" svg:height="1.424cm" svg:x="6.022cm" svg:y="0.157cm"><text:p text:style-name="P75">..._Clean.gcode-</text:p><text:p text:style-name="P7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8" draw:name="Form2" draw:style-name="gr2" draw:text-style-name="P77" svg:width="2.477cm" svg:height="1.424cm" svg:x="12.942cm" svg:y="-0.019cm"><text:p text:style-name="P75">PathGCode-</text:p><text:p text:style-name="P75">AddZAdjusts</text:p></draw:rect></text:p>
      <text:p text:style-name="P74"><draw:custom-shape text:anchor-type="paragraph" draw:z-index="21" draw:name="Form3" draw:style-name="gr1" draw:text-style-name="P76" svg:width="2.408cm" svg:height="1.424cm" svg:x="0.086cm" svg:y="-0.194cm"><text:p text:style-name="P75">.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0" draw:name="Form4" draw:style-name="gr3" draw:text-style-name="P75" svg:x1="5.281cm" svg:y1="1.188cm" svg:x2="6.022cm" svg:y2="0.407cm"><text:p/></draw:line><draw:line text:anchor-type="paragraph" draw:z-index="24" draw:name="Form5" draw:style-name="gr3" draw:text-style-name="P75" svg:x1="9.142cm" svg:y1="0.035cm" svg:x2="12.941cm" svg:y2="-0.032cm"><text:p/></draw:line><draw:custom-shape text:anchor-type="paragraph" draw:z-index="7" draw:name="Form6" draw:style-name="gr1" draw:text-style-name="P76" svg:width="2.814cm" svg:height="1.424cm" svg:x="9.313cm" svg:y="0.469cm"><text:p text:style-name="P75">ergänzte</text:p><text:p text:style-name="P75">...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6" draw:name="Form7" draw:style-name="gr3" draw:text-style-name="P75" svg:x1="12.127cm" svg:y1="0.984cm" svg:x2="12.942cm" svg:y2="0.035cm"><text:p/></draw:line></text:p>
      <text:p text:style-name="Text_20_body"><draw:rect text:anchor-type="paragraph" draw:z-index="27" draw:name="Form8" draw:style-name="gr2" draw:text-style-name="P78" svg:width="2.211cm" svg:height="1.362cm" svg:x="3.071cm" svg:y="-0.009cm"><text:p text:style-name="P75"><text:span text:style-name="T50">PathDXF2-</text:span></text:p><text:p text:style-name="P75"><text:span text:style-name="T50">GCode</text:span></text:p></draw:rect><draw:line text:anchor-type="paragraph" draw:z-index="13" draw:name="Form9" draw:style-name="gr3" draw:text-style-name="P75" svg:x1="2.494cm" svg:y1="0.056cm" svg:x2="3.071cm" svg:y2="0.871cm"><text:p/></draw:line><draw:line text:anchor-type="paragraph" draw:z-index="17" draw:name="Form10" draw:style-name="gr3" draw:text-style-name="P75" svg:x1="14.231cm" svg:y1="0.007cm" svg:x2="14.469cm" svg:y2="1.065cm"><text:p/></draw:line></text:p>
      <text:p text:style-name="Text_20_body"><draw:custom-shape text:anchor-type="paragraph" draw:z-index="20" draw:name="Form11" draw:style-name="gr1" draw:text-style-name="P76" svg:width="3.121cm" svg:height="1.424cm" svg:x="12.908cm" svg:y="0.367cm"><text:p text:style-name="P75">..._Milling.gcode-</text:p><text:p text:style-name="P7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8" draw:name="Form12" draw:style-name="gr3" draw:text-style-name="P75" svg:x1="5.281cm" svg:y1="0.056cm" svg:x2="6.022cm" svg:y2="3.081cm"><text:p/></draw:line><draw:line text:anchor-type="paragraph" draw:z-index="23" draw:name="Form13" draw:style-name="gr3" draw:text-style-name="P75" svg:x1="5.281cm" svg:y1="0.056cm" svg:x2="6.362cm" svg:y2="1.453cm"><text:p/></draw:line></text:p>
      <text:p text:style-name="Text_20_body"><draw:custom-shape text:anchor-type="paragraph" draw:z-index="19" draw:name="Form14" draw:style-name="gr1" draw:text-style-name="P76" svg:width="2.952cm" svg:height="1.424cm" svg:x="6.362cm" svg:y="0.323cm"><text:p text:style-name="P75">Leere ..._Z.txt-</text:p><text:p text:style-name="P7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1" draw:name="Form15" draw:style-name="gr3" draw:text-style-name="P75" svg:x1="11.111cm" svg:y1="0.525cm" svg:x2="11.111cm" svg:y2="-0.203cm"><text:p/></draw:line></text:p>
      <text:p text:style-name="P74"><draw:line text:anchor-type="paragraph" draw:z-index="26" draw:name="Form16" draw:style-name="gr3" draw:text-style-name="P75" svg:x1="9.313cm" svg:y1="0.362cm" svg:x2="10.567cm" svg:y2="0.362cm"><text:p/></draw:line><draw:custom-shape text:anchor-type="paragraph" draw:z-index="22" draw:name="Form17" draw:style-name="gr4" draw:text-style-name="P79"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9" draw:name="Form18" draw:style-name="gr3" draw:text-style-name="P75" svg:x1="14.639cm" svg:y1="0.393cm" svg:x2="14.911cm" svg:y2="1.631cm"><text:p/></draw:line></text:p>
      <text:p text:style-name="Text_20_body"><draw:line text:anchor-type="paragraph" draw:z-index="14" draw:name="Form19" draw:style-name="gr3" draw:text-style-name="P75" svg:x1="11.144cm" svg:y1="0.959cm" svg:x2="11.144cm" svg:y2="0.153cm"><text:p/></draw:line></text:p>
      <text:p text:style-name="Text_20_body"><draw:custom-shape text:anchor-type="paragraph" draw:z-index="15" draw:name="Form20" draw:style-name="gr1" draw:text-style-name="P76" svg:width="3.121cm" svg:height="1.424cm" svg:x="6.022cm" svg:y="0.288cm"><text:p text:style-name="P75">..._Probing.gcode-</text:p><text:p text:style-name="P7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25" draw:name="Form21" draw:style-name="gr5" draw:text-style-name="P80" svg:width="2.477cm" svg:height="1.424cm" svg:x="10.024cm" svg:y="0.261cm"><text:p text:style-name="P75">Messfahrt</text:p></draw:rect><draw:rect text:anchor-type="paragraph" draw:z-index="28" draw:name="Form22" draw:style-name="gr5" draw:text-style-name="P80" svg:width="2.477cm" svg:height="1.424cm" svg:x="14.198cm" svg:y="0.235cm"><text:p text:style-name="P75">Fräsen</text:p></draw:rect></text:p>
      <text:p text:style-name="Text_20_body"><draw:line text:anchor-type="paragraph" draw:z-index="33" draw:name="Form23" draw:style-name="gr3" draw:text-style-name="P75" svg:x1="9.142cm" svg:y1="0.268cm" svg:x2="10.024cm" svg:y2="0.268cm"><text:p/></draw:line></text:p>
      <text:p text:style-name="Text_20_body"><text:soft-page-break/></text:p>
      <text:h text:style-name="Heading_20_3" text:outline-level="3"><text:bookmark-start text:name="__RefHeading___Toc2750_813158241"/>4.5.2. Pfad-Zeichnung<text:bookmark-end text:name="__RefHeading___Toc2750_813158241"/></text:h>
      <text:p text:style-name="P74">Die Z-Probe-Punkte werden in der Zeichnung durch Kreise mit Linientyp Strich-Doppelstrich (<text:span text:style-name="T51">DXF: </text:span>PHANTOM) <text:span text:style-name="T52">oder strichpunktiert (DXF: DASHDOT) – siehe dazu das Ende dieses Abschnitts – </text:span>und Durchmesser 6 mm gezeichnet. Sie können an beliebigen Stellen liegen (also nicht unbedingt am Fräspfad). Den Pfad für die Messfahrt in der _Probing.gcode-Datei berechnet PathDxf2GCode selbst, indem vom Anfangspunkt immer der jeweils näh<text:span text:style-name="T53">e</text:span>ste, noch nicht besuchte Z-Probe-Punkt angefahren wird; zum Schluss wird zum Anfangspunkt zurückgekehrt.</text:p>
      <text:p text:style-name="P74">Die Z-Probes können auf zwei Arten angeordnet werden:</text:p>
      <text:list text:style-name="L37">
        <text:list-item>
          <text:p text:style-name="P81">außerhalb der Halbzeuge; dann muss bei der Messfahrt der Messfühler an die jeweilige Stelle gelegt werden.</text:p>
        </text:list-item>
        <text:list-item>
          <text:p text:style-name="P81">auf einem Halbzeug; dann muss bei der Messfahrt ein leitender Kontakt von Halbzeug und Messfühler hergestellt werden.</text:p>
        </text:list-item>
      </text:list>
      <text:p text:style-name="P74">Bei eine<text:span text:style-name="T54">r</text:span> Z-Probe können folgende Parameter angegeben werden:</text:p>
      <text:list text:continue-list="list3841998324" text:style-name="L34">
        <text:list-item>
          <text:p text:style-name="P82">T: Messfühler- oder Materialdicke in mm; wenn die Angabe fehlt, wird die entsprechende Pfadangabe am Anfangspunkt übernommen.</text:p>
        </text:list-item>
        <text:list-item>
          <text:p text:style-name="P83">H: Zusätzliche Höhe <text:span text:style-name="T29">in mm </text:span>für Montierung des <text:span text:style-name="T30">Fräsm</text:span>aterials auf Unterlagen; <text:span text:style-name="T29">Standardwert 0.</text:span></text:p>
        </text:list-item>
        <text:list-item>
          <text:p text:style-name="P82">L: Name des Z-Probe-Punktes, der in der _Z.txt-Datei angezeigt wird.</text:p>
        </text:list-item>
        <text:list-item>
          <text:p text:style-name="P82">Z: Fühlgeschwindigkeit in mm/min; bei fehlender Angabe wird die entsprechende Pfadangabe am Anfangspunkt übernommen, wenn auch die fehlt, wird der <text:span text:style-name="T55">Wert der /z-Option verwendet</text:span>.</text:p>
        </text:list-item>
      </text:list>
      <text:p text:style-name="P74">Hier ist eine Pfadzeichnung, die zwei solche Z-Probes enthält (die orangen Kreise), jeweils in der Nähe von Subpfaden:</text:p>
      <text:p text:style-name="P74"><draw:frame draw:style-name="fr1" draw:name="Grafik9" text:anchor-type="paragraph" svg:width="11.07cm" svg:height="6.708cm" draw:z-index="34"><draw:image xlink:href="Pictures/10000000000002780000016FEB6A8305.png" xlink:type="simple" xlink:show="embed" xlink:actuate="onLoad" draw:mime-type="image/png"/></draw:frame></text:p>
      <text:p text:style-name="P84">Die _Z.txt-Datei, die daraus entsteht, sieht so aus:</text:p>
      <text:p text:style-name="P85">@[138.000|299.000] #2001=</text:p>
      <text:p text:style-name="P85">@[242.000|264.000] #2002=</text:p>
      <text:p text:style-name="P86">Z-Probes dürfen auch einen punktierten Umfang (DXF: DOT) haben, dann werden sie ignoriert. <text:soft-page-break/>Das ist hilfreich, damit ZProbes für Subpfade, die in Korrektur-Projektdateien durch Punktierung <text:span text:style-name="T56">übersprungen</text:span> werden, nicht angefahren werden.</text:p>
      <text:p text:style-name="P87">Für das Zurückeditieren einer Korrektur-Projektdatei ist es ein wenig hilfreich, dass Z-Probes auch strichpunktiert (DXF: DASHDOT) sein dürfen: Denn dann kann man alle punktierten Linien (sowohl der ignorierten Pfade wie der ignorierten Z-Probes) strichpunktieren, um sie wieder zu aktivieren.</text:p>
      <text:h text:style-name="P88" text:outline-level="3"><text:bookmark-start text:name="__RefHeading___Toc2752_813158241"/>4.5.3. Messfahrt<text:bookmark-end text:name="__RefHeading___Toc2752_813158241"/></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48">Wenn der Fräser dabei den Messfühler oder das Halbzeug berührt, bleibt er jeweils 4 Sekunden stehen, damit man den Z-Wert in die _Z.txt-Datei übernehmen kann. </text:span>Dazu wird dort manuell der in UGS abgelesene Z-Wert eingetragen, z.B. so:</text:p>
      <text:p text:style-name="P85">@[138.000|299.000] #2001=5,1</text:p>
      <text:p text:style-name="P85">@[242.000|264.000] #2002= 5.25</text:p>
      <text:p text:style-name="P74">Als Dezimalzeichen sind hier sowohl Komma wie auch Punkt erlaubt; und vor und nach den Zahlen können gerne Leerzeichen oder Tabs stehen.</text:p>
      <text:h text:style-name="Heading_20_3" text:outline-level="3"><text:bookmark-start text:name="__RefHeading___Toc2754_813158241"/>4.5.4. Erzeugen der Milling.gcode-Datei<text:bookmark-end text:name="__RefHeading___Toc2754_813158241"/></text:h>
      <text:p text:style-name="P74">Ein PathGCodeAdjustZ-Aufruf (siehe S. <text:bookmark-ref text:reference-format="page" text:ref-name="__RefHeading__6627_810929200">33</text:bookmark-ref>) erzeugt schlussendlich aus der _Clean- und der _Z.txt-Datei die endgültige _Milling.gcode-Datei.</text:p>
      <text:h text:style-name="Heading_20_2" text:outline-level="2"><text:bookmark-start text:name="__RefHeading___Toc2756_813158241"/>4.6. Aufruf von PathDxf2GCode<text:bookmark-end text:name="__RefHeading___Toc2756_813158241"/></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89"><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90"><text:s text:c="4"/>/h <text:s text:c="4"/>Hilfe-Anzeige</text:p>
      <text:p text:style-name="P90"><text:s text:c="4"/>/f 000 Fräsgeschwindigkeit in mm/min; Pflichtwert</text:p>
      <text:p text:style-name="P90"><text:s text:c="4"/>/v 000 Maximalgeschwindigkeit für Leerfahrten in mm/min; Pflichtwert</text:p>
      <text:p text:style-name="P90"><text:s text:c="4"/>/s 000 Vorgabe für Leerfahrt-Höhe in mm; Pflichtwert</text:p>
      <text:p text:style-name="P90"><text:s text:c="4"/>/c <text:s text:c="4"/>Überprüfen aller Pfade in der DXF-Datei ohne G-Code-Ausgabe; wenn /c nicht</text:p>
      <text:p text:style-name="P90"><text:s text:c="11"/>angegeben wird, dann darf die DXF-Datei nur einen Pfad enthalten</text:p>
      <text:p text:style-name="P90"><text:s text:c="4"/>/x zzz Gibt für alle auf diese Regex passenden Texte aus, welchem DXF-Objekt</text:p>
      <text:p text:style-name="P90"><text:s text:c="11"/>sie zugeordnet sind</text:p>
      <text:p text:style-name="P91"><text:s text:c="4"/>/d zzz Suchpfad für referenzierte DXF-Dateien <text:span text:style-name="T57">(Mehrfachangabe </text:span><text:span text:style-name="T58">möglich</text:span><text:span text:style-name="T57">)</text:span></text:p>
      <text:p text:style-name="P90"><text:s text:c="4"/>/n zzz Reg.Ausdruck für Pfadbezeichnungen in DXF-Dateien</text:p>
      <text:p text:style-name="P90"><text:s text:c="11"/>Standardwert ist <text:span text:style-name="T59">([0-9]{4})[.]([0-9]+)([A-Z])</text:span></text:p>
      <text:p text:style-name="P90"><text:s text:c="4"/>/p zzz Reg.Ausdruck für Pfadbezeichnungen in Dateinamen</text:p>
      <text:p text:style-name="P92"><text:s text:c="11"/>Standardwert ist <text:span text:style-name="T60">([0-9]{4})(?:[.]([0-9]+))?</text:span> <text:s text:c="3"/>/<text:span text:style-name="T57">e</text:span> zzz:<text:span text:style-name="T57">zzz</text:span> Reg.Ausdr<text:span text:style-name="T57">ücke, </text:span><text:soft-page-break/><text:span text:style-name="T57">die erlaubte Subpfade einschränken (Mehrfachangabe</text:span></text:p>
      <text:p text:style-name="P93"><text:s text:c="11"/><text:span text:style-name="T58">möglich</text:span>)</text:p>
      <text:p text:style-name="P92"><text:s text:c="4"/>/l zzz Meldungssprache; Standardwert ist die Betriebssystemsprache</text:p>
      <text:p text:style-name="P90"/>
      <text:p text:style-name="Text_20_body">Beispielaufrufe:</text:p>
      <text:p text:style-name="P89"><text:tab/>PathDxf2GCode /h</text:p>
      <text:p text:style-name="P89"><text:tab/>PathDxf2GCode /f150 /v1000 /s15 /d..\Bauteile “2913 Ph.DXF“</text:p>
      <text:p text:style-name="P89"><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text:bookmark-start text:name="__RefHeading___Toc2758_813158241"/>4.6.2.1. „Pfaddefinition … nicht gefunden.“<text:bookmark-end text:name="__RefHeading___Toc2758_813158241"/></text:h>
      <text:p text:style-name="Text_20_body">Grund: Ein Pfad mit diesem Namen wurde nicht erzeugt.</text:p>
      <text:p text:style-name="Text_20_body">Mögliche Auslöser:</text:p>
      <text:list xml:id="list307142152" text:style-name="L38">
        <text:list-item>
          <text:p text:style-name="P94">Anfangspunkt eines Pfades nicht mit Linienart „Strich-Doppelstrich“ (DXF: PHANTOM) versehen → Lösung: Anfangspunkt mit Linienart „Strich-Doppelstrich“ versehen.</text:p>
        </text:list-item>
      </text:list>
      <text:h text:style-name="Heading_20_4" text:outline-level="4"><text:bookmark-start text:name="__RefHeading___Toc2760_813158241"/>4.6.2.2. „Ende-Markierung fehlt.“<text:bookmark-end text:name="__RefHeading___Toc2760_813158241"/></text:h>
      <text:p text:style-name="Text_20_body">Grund: Ein Pfad enthält keine gültige Ende-Markierung.</text:p>
      <text:p text:style-name="Text_20_body">Mögliche Auslöser:</text:p>
      <text:list xml:id="list162710326222347" text:continue-numbering="true" text:style-name="L38">
        <text:list-item>
          <text:p text:style-name="P94">Endpunkt eines Pfades nicht mit Linienart „Strich-Doppelstrich“ (DXF: PHANTOM) versehen → Lösung: Endpunkt mit Linienart „Strich-Doppelstrich“ versehen.</text:p>
        </text:list-item>
      </text:list>
      <text:h text:style-name="Heading_20_4" text:outline-level="4"><text:bookmark-start text:name="__RefHeading___Toc2762_813158241"/>4.6.2.3. „S-Wert fehlt.“, „B-Wert fehlt.“, ...<text:bookmark-end text:name="__RefHeading___Toc2762_813158241"/></text:h>
      <text:p text:style-name="Text_20_body">Grund: Ein Segment kann den benötigten Wert nicht feststellen.</text:p>
      <text:p text:style-name="Text_20_body">Mögliche Auslöser:</text:p>
      <text:list text:continue-numbering="true" text:style-name="L38">
        <text:list-item>
          <text:p text:style-name="P94">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text:style-name="L39">
        <text:list-item>
          <text:p text:style-name="P95">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95">Doppelte Elemente, die genau übereinanderliegen; nach dem Befahren eines Elements und der Rückkehr über das andere „geht es nicht mehr weiter“ → Lösung: Doppelte Elemente entfernen.</text:p>
        </text:list-item>
        <text:list-item>
          <text:p text:style-name="P95">Eventuell liegt eine Linie nicht im Pfadlayer → Lösung: Punkt in der Zeichnung finden und Linie in korrekten Layer verlegen.</text:p>
        </text:list-item>
        <text:list-item>
          <text:p text:style-name="P95"><text:soft-page-break/>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48">.7.</text:span> Aufruf von <text:span text:style-name="T48">PathGCodeAdjustZ</text:span><text:bookmark-end text:name="__RefHeading__6627_810929200"/></text:h>
      <text:h text:style-name="Heading_20_3" text:outline-level="3"><text:bookmark-start text:name="__RefHeading___Toc2764_813158241"/>4<text:span text:style-name="T48">.7.</text:span>1. Aufrufparameter<text:bookmark-end text:name="__RefHeading___Toc2764_813158241"/></text:h>
      <text:p text:style-name="Text_20_body">Beim Aufruf werden i.d.R. <text:span text:style-name="T48">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89"><text:tab/>PathGCodeAdjustZ 8001.27.1P_Clean.gcode 8001.27.2P.DXF</text:p>
      <text:p text:style-name="Text_20_body">Zusätzlich können folgende Optionen angegeben werden:</text:p>
      <text:p text:style-name="P89"><text:s text:c="4"/>/h <text:s text:c="4"/>Hilfe-Anzeige<text:line-break/> <text:s text:c="3"/>/m 000 Maximale Korrektur von Z-Werten; Pflichtangabe<text:line-break/> <text:s text:c="3"/>/x zzz Regex für auszugebende Zeilen<text:line-break/> <text:s text:c="3"/>/l zzz Sprache</text:p>
      <text:h text:style-name="P96" text:outline-level="3"><text:bookmark-start text:name="__RefHeading___Toc2766_813158241"/>4.7.2. Maximale Z-Korrektur<text:bookmark-end text:name="__RefHeading___Toc2766_813158241"/></text:h>
      <text:p text:style-name="P74">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96" text:outline-level="3"><text:bookmark-start text:name="__RefHeading___Toc2768_813158241"/>4.7.3. Ausgabe der Statistikzeilen<text:bookmark-end text:name="__RefHeading___Toc2768_813158241"/></text:h>
      <text:p text:style-name="Standard"><text:span text:style-name="T48">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61">/x mm.*min</text:span><text:span text:style-name="T48"> sichtbar machen.</text:span></text:p>
      <text:h text:style-name="P96" text:outline-level="3"><text:bookmark-start text:name="__RefHeading___Toc2770_813158241"/>4.7.4. Probleme und ihre Lösungen<text:bookmark-end text:name="__RefHeading___Toc2770_813158241"/></text:h>
      <text:h text:style-name="P97" text:outline-level="4"><text:bookmark-start text:name="__RefHeading___Toc2772_813158241"/>4.7.4.1. “Zeile hat nicht das Format '(Kommentar) #...=Wert'”<text:bookmark-end text:name="__RefHeading___Toc2772_813158241"/></text:h>
      <text:p text:style-name="P74">Üblicherweise fehlen die Werte nach den Gleichheitszeichen.</text:p>
      <text:p text:style-name="P74">Wenn man ohne Z-Adjustments fräsen will, dann kann man auch direkt die jeweilige _Clean.gcode-Datei an die Fräse senden.</text:p>
      <text:h text:style-name="Heading_20_2" text:outline-level="2"><text:bookmark-start text:name="__RefHeading___Toc2774_813158241"/>4.<text:span text:style-name="T48">8</text:span>. Fräsen<text:bookmark-end text:name="__RefHeading___Toc2774_813158241"/></text:h>
      <text:p text:style-name="Text_20_body">Für den Fräsvorgang werden</text:p>
      <text:list text:style-name="L40">
        <text:list-item>
          <text:p text:style-name="P98">die erzeugten G-Code-Dateien</text:p>
        </text:list-item>
        <text:list-item>
          <text:p text:style-name="P98">und die zugehörigen PDFs der Pfad-Konstruktionen (sowohl Projekt-Pfadkonstruktionen wie Bauteil-Pfadkonstruktionen)</text:p>
        </text:list-item>
      </text:list>
      <text:p text:style-name="Text_20_body"><text:soft-page-break/>auf den Steuerrechner der Fräse übertragen.</text:p>
      <text:p text:style-name="Text_20_body">Der folgende Fräsvorgang wird hier nicht mehr beschrieben.</text:p>
      <text:h text:style-name="P10" text:outline-level="1"><text:bookmark-start text:name="__RefHeading___Toc2776_813158241"/>5. Programmdokumentation<text:bookmark-end text:name="__RefHeading___Toc2776_813158241"/></text:h>
      <text:h text:style-name="Heading_20_2" text:outline-level="2"><text:bookmark-start text:name="__RefHeading___Toc2778_813158241"/>5.1. Überblick<text:bookmark-end text:name="__RefHeading___Toc2778_813158241"/></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2780_813158241"/>5.2. Github-Projekt<text:bookmark-end text:name="__RefHeading___Toc2780_813158241"/></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text:bookmark-start text:name="__RefHeading___Toc2782_813158241"/>5.3. Compiler-Phasen<text:bookmark-end text:name="__RefHeading___Toc2782_813158241"/></text:h>
      <text:p text:style-name="P99">Die 6 Phasen sind:</text:p>
      <text:list text:style-name="L41">
        <text:list-item>
          <text:p text:style-name="P100">DXF-Datei → <text:span text:style-name="T62">DxfDocument</text:span>; dafür wird die netDxf-Bibliothek verwendet. Die zentrale Methode dieser Phase ist <text:span text:style-name="T62">DxfFile.LoadDxfDocument</text:span>.</text:p>
        </text:list-item>
      </text:list>
      <text:list text:style-name="L42">
        <text:list-item>
          <text:p text:style-name="P101"><text:span text:style-name="T6">DxfDocument</text:span> → <text:span text:style-name="T6">RawPathModel</text:span>; das <text:span text:style-name="T6">RawPathModel</text:span> ist eine temporäre Darstellung der Pfade aus einer Pfadzeichnung. Jeder Pfad besteht aus</text:p>
        </text:list-item>
      </text:list>
      <text:list text:style-name="L43">
        <text:list-item>
          <text:p text:style-name="P102">Pfadsegmenten (Typen: <text:span text:style-name="T6">MillSegment</text:span>, <text:span text:style-name="T6">SweepSegment</text:span>, <text:span text:style-name="T6">HelixSegment</text:span>, <text:span text:style-name="T6">DrillSegment</text:span><text:span text:style-name="T63"> </text:span>und <text:span text:style-name="T6">SubpathSegment</text:span>),</text:p>
          <text:list>
            <text:list-item>
              <text:p text:style-name="P102">wo MillSegmente eine <text:span text:style-name="T6">MillingGeometry</text:span> vom Typ <text:span text:style-name="T6">LineGeometry</text:span> oder <text:span text:style-name="T6">ArcGeometry</text:span> haben;</text:p>
            </text:list-item>
          </text:list>
        </text:list-item>
        <text:list-item>
          <text:p text:style-name="P102">Markierungen (Anfangs- und Endpunkt)</text:p>
        </text:list-item>
        <text:list-item>
          <text:p text:style-name="P102">und Pfadparametern.</text:p>
        </text:list-item>
      </text:list>
      <text:p text:style-name="P103">Die zentrale Methode dieser Phase ist <text:span text:style-name="T62">PathModel.TransformDxf2PathModel</text:span>.</text:p>
      <text:list text:style-name="L44">
        <text:list-item>
          <text:p text:style-name="P104">Zusammenfassung von Frässegmenten zu Fräsketten; die zentrale Methode dafür ist <text:span text:style-name="T62">PathModel.CreatePathModel</text:span>.</text:p>
        </text:list-item>
        <text:list-item>
          <text:p text:style-name="P104"><text:span text:style-name="T62">PathModel</text:span> → <text:span text:style-name="T62">GCode</text:span>-Liste; die zentrale Methode dieser Textausgabe ist <text:span text:style-name="T62">PathModel.EmitGCode</text:span> zusammen mit den <text:span text:style-name="T64">EmitGCode</text:span>-Methoden in der <text:span text:style-name="T6">GCode</text:span>-Hierarchie. </text:p>
        </text:list-item>
        <text:list-item>
          <text:p text:style-name="P104">Peephole-Optimizer der <text:span text:style-name="T62">GCode</text:span>-Liste (aktuell zur Zusammenfassung aufeinanderfolgender Leerfahrten); die zentrale Methode dafür ist <text:span text:style-name="T62">GCodeHelpers.Optimize</text:span>, zusammen mit der <text:span text:style-name="T62">GCode</text:span>-Klassenhierarchie.</text:p>
        </text:list-item>
        <text:list-item>
          <text:p text:style-name="P104">Ausgabe der G-Code-Datei; zentrale Methoden sind in der Klasse <text:span text:style-name="T62">Program</text:span><text:span text:style-name="T65"> </text:span><text:s/><text:span text:style-name="T62">WriteGCodes</text:span> und <text:span text:style-name="T6">WriteZProbingGCode</text:span>, die <text:span text:style-name="T62">AsString</text:span>-Methoden der <text:span text:style-name="T62">GCode</text:span>-Hierarchie und die <text:span text:style-name="T6">WriteEmptyZ</text:span>-Methoden.</text:p>
        </text:list-item>
      </text:list>
      <text:h text:style-name="Heading_20_2" text:outline-level="2"><text:bookmark-start text:name="__RefHeading___Toc2784_813158241"/><text:soft-page-break/>5.4. Grundlegende Datenstrukturen<text:bookmark-end text:name="__RefHeading___Toc2784_813158241"/></text:h>
      <text:p text:style-name="Text_20_body">Das folgende Diagramm zeigt beispielsartig ein Helix-, Strecken- und Bogensegment und die wichtigsten damit verknüpften Objekte:</text:p>
      <text:p text:style-name="P33"><text:s text:c="17"/><text:span text:style-name="T5">netDxf-EntityObjects <text:s text:c="3"/>RawSegments <text:s text:c="3"/>Segments</text:span></text:p>
      <text:p text:style-name="Text_20_body"><draw:frame draw:style-name="fr1" draw:name="Grafik18" text:anchor-type="paragraph" svg:width="12.755cm" svg:height="7.826cm" draw:z-index="35"><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2786_813158241"/>5.5. Spezielle Datenstrukturen und Algorithmen in PathDxf2GCode<text:bookmark-end text:name="__RefHeading___Toc2786_813158241"/></text:h>
      <text:h text:style-name="Heading_20_3" text:outline-level="3"><text:bookmark-start text:name="__RefHeading___Toc2788_813158241"/>5.5.1. GCodeHelpers.cs<text:bookmark-end text:name="__RefHeading___Toc2788_813158241"/></text:h>
      <text:h text:style-name="Heading_20_4" text:outline-level="4"><text:bookmark-start text:name="__RefHeading___Toc2790_813158241"/>5.5.1.1. Optimize<text:bookmark-end text:name="__RefHeading___Toc2790_813158241"/></text:h>
      <text:p text:style-name="Text_20_body">Diese Methode ist ein Peephole-Optimizer für die erzeugte <text:span text:style-name="T6">GCode</text:span>-Liste. Die Erkennung von zu optimierenden Mustern erfolgt über reguläre Expressions, wofür jedes <text:span text:style-name="T6">GCode</text:span>-Objekt durch ein Zeichen (Propery <text:span text:style-name="T6">Letter</text:span>) repräsentiert wird.</text:p>
      <text:list text:style-name="L45">
        <text:list-item>
          <text:p text:style-name="P105">Aktuell ist ein Peephole-Optimizer für die Zusammenfassung von Leerfahrten (mit dazwischenliegenden Kommentaren) implementiert.</text:p>
        </text:list-item>
      </text:list>
      <text:h text:style-name="Heading_20_3" text:outline-level="3"><text:bookmark-start text:name="__RefHeading___Toc2792_813158241"/>5.5.2. MillGeometry.cs<text:bookmark-end text:name="__RefHeading___Toc2792_813158241"/></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text:bookmark-start text:name="__RefHeading___Toc2794_813158241"/>5.5.3. Params.cs<text:bookmark-end text:name="__RefHeading___Toc2794_813158241"/></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text:style-name="L46">
        <text:list-item>
          <text:p text:style-name="P106"><text:span text:style-name="T6">ChainParams, SweepParams, HelixParams, DrillParams, SubpathParams, ZProbeParams</text:span> → <text:span text:style-name="T6">PathParams</text:span></text:p>
        </text:list-item>
        <text:list-item>
          <text:p text:style-name="P107"><text:soft-page-break/>MillParams<text:span text:style-name="T66"> → </text:span>ChainParams</text:p>
        </text:list-item>
      </text:list>
      <text:h text:style-name="Heading_20_3" text:outline-level="3"><text:bookmark-start text:name="__RefHeading___Toc2796_813158241"/>5.5.4. PathModel.cs<text:bookmark-end text:name="__RefHeading___Toc2796_813158241"/></text:h>
      <text:h text:style-name="Heading_20_4" text:outline-level="4"><text:bookmark-start text:name="__RefHeading___Toc2798_813158241"/>5.5.4.1. Innere Klasse RawPathModel<text:bookmark-end text:name="__RefHeading___Toc2798_813158241"/></text:h>
      <text:p text:style-name="Text_20_body">Rohe Modelle, die aus der DXF-Datei gelesen worden sind.</text:p>
      <text:h text:style-name="Heading_20_4" text:outline-level="4"><text:bookmark-start text:name="__RefHeading___Toc2800_813158241"/>5.5.4.2. Innere Klasse Collection<text:bookmark-end text:name="__RefHeading___Toc2800_813158241"/></text:h>
      <text:p text:style-name="Text_20_body">Cache für RawPathModels und PathModels.</text:p>
      <text:h text:style-name="Heading_20_4" text:outline-level="4"><text:bookmark-start text:name="__RefHeading___Toc2802_813158241"/>5.5.4.3. CollectSegments<text:bookmark-end text:name="__RefHeading___Toc2802_813158241"/></text:h>
      <text:p text:style-name="Text_20_body">Hier erfolgt </text:p>
      <text:list text:style-name="L47">
        <text:list-item>
          <text:p text:style-name="P108">das Aufsammeln aller EntityObjects auf Pfaden</text:p>
        </text:list-item>
        <text:list-item>
          <text:p text:style-name="P108">die Zuordnung von Parametertexten zu Objekten</text:p>
        </text:list-item>
        <text:list-item>
          <text:p text:style-name="P108">die Auswertung spezieller Marker (Start, Ende, ZProbes)</text:p>
        </text:list-item>
        <text:list-item>
          <text:p text:style-name="P108">das Laden von Subpfaden.</text:p>
        </text:list-item>
      </text:list>
      <text:p text:style-name="Text_20_body">Daraus entsteht ein <text:span text:style-name="T6">RawPathModel</text:span>.</text:p>
      <text:h text:style-name="Heading_20_4" text:outline-level="4"><text:bookmark-start text:name="__RefHeading___Toc2804_813158241"/>5.5.4.4. NearestOverlapping&lt;T&gt;, NearestOverlappingCircle, ….Line, ...Arc, CircleOverlapsLine, ...Arc, DistanceToArcCircle, GetOverlapSurrounding<text:bookmark-end text:name="__RefHeading___Toc2804_813158241"/></text:h>
      <text:p text:style-name="Text_20_body">Finden von Objekten für die Zuordnung von Parametertexten.</text:p>
      <text:h text:style-name="Heading_20_4" text:outline-level="4"><text:bookmark-start text:name="__RefHeading___Toc2806_813158241"/>5.5.4.5. CreatePathModel<text:bookmark-end text:name="__RefHeading___Toc2806_813158241"/></text:h>
      <text:p text:style-name="Text_20_body">Hier wird das eigentliche <text:span text:style-name="T6">PathModel</text:span> aus dem <text:span text:style-name="T6">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text:bookmark-start text:name="__RefHeading___Toc2808_813158241"/>5.5.4.6. CollectAndOrderAllZProbes<text:bookmark-end text:name="__RefHeading___Toc2808_813158241"/></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bookmark-start text:name="__RefHeading___Toc2810_813158241"/><text:soft-page-break/>5.5.5. PathSegment.cs<text:bookmark-end text:name="__RefHeading___Toc2810_813158241"/></text:h>
      <text:h text:style-name="Heading_20_4" text:outline-level="4"><text:bookmark-start text:name="__RefHeading___Toc2812_813158241"/>5.5.5.1. Innere RawSegment-Klassen<text:bookmark-end text:name="__RefHeading___Toc2812_813158241"/></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text:bookmark-start text:name="__RefHeading___Toc2814_813158241"/>5.5.5.2. MillChain.EmitGCode<text:bookmark-end text:name="__RefHeading___Toc2814_813158241"/></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bookmark-start text:name="__RefHeading___Toc2816_813158241"/>5.5.5.3. HelixSegment.EmitGCode<text:bookmark-end text:name="__RefHeading___Toc2816_813158241"/></text:h>
      <text:p text:style-name="Text_20_body">Eine Helix wird aus Halbkreisen zusammengesetzt, die jeweils um I/2 in die Tiefe fahren.</text:p>
      <text:h text:style-name="Heading_20_4" text:outline-level="4"><text:bookmark-start text:name="__RefHeading___Toc2818_813158241"/>5.5.5.4. SubPathSegment.EmitGCode<text:bookmark-end text:name="__RefHeading___Toc2818_813158241"/></text:h>
      <text:p text:style-name="Text_20_body">Zwischen dem SubPathSegment und dem referenzierten Pfad wird eine <text:span text:style-name="T6">Transformation3</text:span> erzeugt, die die Koordinaten in das aufrufende Modell umrechnet.</text:p>
      <text:h text:style-name="Heading_20_3" text:outline-level="3"><text:bookmark-start text:name="__RefHeading___Toc2820_813158241"/>5.5.6. Transformation2.cs<text:bookmark-end text:name="__RefHeading___Toc2820_813158241"/></text:h>
      <text:p text:style-name="Text_20_body">Der Winkel zwischen zwei Vektoren wird in netDxf nur über den Hauptast von arccos berechnet. Das ergibt immer nur Winkel-Werte zwischen 0 und <text:span text:style-name="T22">π</text:span>, was nicht korrekt ist. Mir ist nur eingefallen, das über einen „Drehversuch“ zu lösen: ersten Vektor um arccos und –arccos drehen und prüfen, welche Drehung tatsächlich den zweiten Vektor ergibt.</text:p>
      <text:h text:style-name="Heading_20_3" text:outline-level="3"><text:bookmark-start text:name="__RefHeading___Toc2822_813158241"/>5.5.7. Transformation3.cs<text:bookmark-end text:name="__RefHeading___Toc2822_813158241"/></text:h>
      <text:p text:style-name="Text_20_body">Die Z-Koordinate wird nicht einer üblichen Transformation unterzogen, sondern durch ZProbes angepasst.</text:p>
      <text:h text:style-name="Heading_20_2" text:outline-level="2"><text:bookmark-start text:name="__RefHeading___Toc2824_813158241"/>5.6. Spezielle Datenstrukturen und Algorithmen in PathGCodeAdjustZ<text:bookmark-end text:name="__RefHeading___Toc2824_813158241"/></text:h>
      <text:h text:style-name="Heading_20_3" text:outline-level="3"><text:bookmark-start text:name="__RefHeading___Toc2826_813158241"/>5.6.1. ExprEval.cs<text:bookmark-end text:name="__RefHeading___Toc2826_813158241"/></text:h>
      <text:p text:style-name="Text_20_body">Einfacher LL(1)-Parser für eine kleine Teilmenge der G-Code-Expressions, die für die Z-Adjustments verwendet wird. Als Klammerpaare sind sowohl […] wie auch (…) zulässig.</text:p>
      <text:h text:style-name="Heading_20_2" text:outline-level="2"><text:bookmark-start text:name="__RefHeading___Toc2828_813158241"/>5.7. Aktuell bekannte oder vermutete Probleme<text:bookmark-end text:name="__RefHeading___Toc2828_813158241"/></text:h>
      <text:p text:style-name="Text_20_body">Keine, die mich besonders stören würden. Details siehe Github-Projekt.</text:p>
      <text:h text:style-name="Heading_20_2" text:outline-level="2"><text:bookmark-start text:name="__RefHeading___Toc2830_813158241"/>5.8. Fehlende Features<text:bookmark-end text:name="__RefHeading___Toc2830_813158241"/></text:h>
      <text:p text:style-name="Text_20_body">Geplant ist die Verschiebung der T-Ebene bei Pfadeinbettungen.</text:p>
      <text:h text:style-name="P10" text:outline-level="1"><text:bookmark-start text:name="__RefHeading___Toc2832_813158241"/>6. Referenzen<text:bookmark-end text:name="__RefHeading___Toc2832_813158241"/></text:h>
      <text:h text:style-name="Heading_20_2" text:outline-level="2"><text:bookmark-start text:name="__RefHeading___Toc2834_813158241"/>6.1. Parameter-Buchstaben<text:bookmark-end text:name="__RefHeading___Toc2834_813158241"/></text:h>
      <text:p text:style-name="Text_20_body"/>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09"/>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10">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22">·</text:span><text:span text:style-name="T23"> </text:span>O</text:p>
          </table:table-cell>
        </table:table-row>
        <table:table-row>
          <table:table-cell table:style-name="Tabelle1.A2" office:value-type="string">
            <text:p text:style-name="P110">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0">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0">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0">E</text:p>
          </table:table-cell>
          <table:table-cell table:style-name="Tabelle1.A2" office:value-type="string">
            <text:p text:style-name="P111">Erlaubte Subpfade (Reg.Ausdruck)</text:p>
          </table:table-cell>
          <table:table-cell table:style-name="Tabelle1.A2" office:value-type="string">
            <text:p text:style-name="P111">Text</text:p>
          </table:table-cell>
          <table:table-cell table:style-name="Tabelle1.D2" office:value-type="string">
            <text:p text:style-name="Table_20_Contents">/<text:span text:style-name="T67">e</text:span></text:p>
          </table:table-cell>
        </table:table-row>
        <table:table-row>
          <table:table-cell table:style-name="Tabelle1.A2" office:value-type="string">
            <text:p text:style-name="P110">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10">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0">H</text:p>
          </table:table-cell>
          <table:table-cell table:style-name="Tabelle1.A2" office:value-type="string">
            <text:p text:style-name="P112">Höhe</text:p>
          </table:table-cell>
          <table:table-cell table:style-name="Tabelle1.A2" office:value-type="string">
            <text:p text:style-name="P113">mm</text:p>
          </table:table-cell>
          <table:table-cell table:style-name="Tabelle1.D2" office:value-type="string">
            <text:p text:style-name="P113">0</text:p>
          </table:table-cell>
        </table:table-row>
        <table:table-row>
          <table:table-cell table:style-name="Tabelle1.A2" office:value-type="string">
            <text:p text:style-name="P110">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0">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0">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0">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P113">keine</text:p>
          </table:table-cell>
        </table:table-row>
        <table:table-row>
          <table:table-cell table:style-name="Tabelle1.A2" office:value-type="string">
            <text:p text:style-name="P110">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0">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0">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0">P</text:p>
          </table:table-cell>
          <table:table-cell table:style-name="Tabelle1.A2" office:value-type="string">
            <text:p text:style-name="P114">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0">Q</text:p>
          </table:table-cell>
          <table:table-cell table:style-name="Tabelle1.A2" office:value-type="string">
            <text:p text:style-name="Table_20_Contents">Kommentar in G-Code-Datei</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0">R</text:p>
          </table:table-cell>
          <table:table-cell table:style-name="Tabelle1.A2" office:value-type="string">
            <text:p text:style-name="P114">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110">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10">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0">U</text:p>
          </table:table-cell>
          <table:table-cell table:style-name="Tabelle1.A2" office:value-type="string">
            <text:p text:style-name="P114">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0">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0">W</text:p>
          </table:table-cell>
          <table:table-cell table:style-name="Tabelle1.A2" office:value-type="string">
            <text:p text:style-name="P114">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0">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0">Y</text:p>
          </table:table-cell>
          <table:table-cell table:style-name="Tabelle1.A2" office:value-type="string">
            <text:p text:style-name="P115"/>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0">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text:span text:style-name="T68">z</text:span></text:p>
          </table:table-cell>
        </table:table-row>
        <table:table-row>
          <table:table-cell table:style-name="Tabelle1.A2" office:value-type="string">
            <text:p text:style-name="P110">&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0">:</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text:span text:style-name="T68">v</text:span></text:p>
          </table:table-cell>
        </table:table-row>
      </table:table>
      <text:h text:style-name="Heading_20_2" text:outline-level="2"><text:bookmark-start text:name="__RefHeading___Toc2836_813158241"/><text:soft-page-break/>6.2. Linienarten<text:bookmark-end text:name="__RefHeading___Toc2836_813158241"/></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14">BORDER</text:p>
          </table:table-cell>
          <table:table-cell table:style-name="Tabelle2.A2" office:value-type="string">
            <text:p text:style-name="P114">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ext:p text:style-name="P116">Z-Probe</text:p>
          </table:table-cell>
          <table:table-cell table:style-name="Tabelle2.D2" office:value-type="string">
            <text:p text:style-name="P117">&gt; M T O <text:span text:style-name="T69">H</text:span></text:p>
            <text:p text:style-name="P118">T L Z <text:span text:style-name="T69">H</text:span></text:p>
          </table:table-cell>
        </table:table-row>
        <table:table-row>
          <table:table-cell table:style-name="Tabelle2.A2" office:value-type="string">
            <text:p text:style-name="Table_20_Contents">‍……….</text:p>
          </table:table-cell>
          <table:table-cell table:style-name="Tabelle2.A2" office:value-type="string">
            <text:p text:style-name="P119">DOT</text:p>
          </table:table-cell>
          <table:table-cell table:style-name="Tabelle2.A2" office:value-type="string">
            <text:p text:style-name="P119">Subpfad als Leerfahrt</text:p>
            <text:p text:style-name="P120">Ignorierter Z-Probe-Punkt</text:p>
          </table:table-cell>
          <table:table-cell table:style-name="Tabelle2.D2" office:value-type="string">
            <text:p text:style-name="P117">&gt; <text:span text:style-name="T70">M T O </text:span><text:span text:style-name="T71">H</text:span></text:p>
            <text:p text:style-name="P121">T L Z <text:span text:style-name="T71">H</text:span></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117">T O M B I F D U P S A W</text:p>
            <text:p text:style-name="Table_20_Contents"/>
            <text:p text:style-name="Table_20_Contents">T L Z <text:span text:style-name="T71">H</text:span></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5-08T16:27:08.632956600</dc:date>
    <meta:editing-duration>P20DT1H8M52S</meta:editing-duration>
    <meta:editing-cycles>947</meta:editing-cycles>
    <meta:generator>LibreOffice/25.8.5.2$Windows_X86_64 LibreOffice_project/9c8b85f387cc00a89945a79c9e6239f32e450ac2</meta:generator>
    <meta:print-date>2025-11-19T07:19:51.487511500</meta:print-date>
    <meta:printed-by>PDF-Dateien</meta:printed-by>
    <meta:document-statistic meta:table-count="2" meta:image-count="19" meta:object-count="0" meta:page-count="40" meta:paragraph-count="765" meta:word-count="10073" meta:character-count="72281" meta:non-whitespace-character-count="62859"/>
  </office:meta>
</office:document-meta>
</file>