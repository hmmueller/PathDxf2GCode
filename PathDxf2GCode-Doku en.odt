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1800000017F3FE38CE1.png" manifest:media-type="image/png"/>
  <manifest:file-entry manifest:full-path="Pictures/1000000100000155000000E781BA2152.png" manifest:media-type="image/png"/>
  <manifest:file-entry manifest:full-path="Pictures/1000000100000125000001410BC64A3F.png" manifest:media-type="image/png"/>
  <manifest:file-entry manifest:full-path="Pictures/10000001000001BF00000177ED49C7F1.png" manifest:media-type="image/png"/>
  <manifest:file-entry manifest:full-path="Pictures/2000000700002AD50000202BC70A36AF.svm" manifest:media-type="image/x-svm"/>
  <manifest:file-entry manifest:full-path="Pictures/200000070000518700002C7D83E120FA.svm" manifest:media-type="image/x-svm"/>
  <manifest:file-entry manifest:full-path="Pictures/2000000700006C3C00006648D2CB3CFF.svm" manifest:media-type="image/x-svm"/>
  <manifest:file-entry manifest:full-path="Pictures/10000001000003DB0000021B070A6619.png" manifest:media-type="image/png"/>
  <manifest:file-entry manifest:full-path="Pictures/2000000700004055000025F5334A78AF.svm" manifest:media-type="image/x-svm"/>
  <manifest:file-entry manifest:full-path="Pictures/1000000100000173000000F0D124FC84.png" manifest:media-type="image/png"/>
  <manifest:file-entry manifest:full-path="Pictures/20000007000030C900001384AFA2F0A0.svm" manifest:media-type="image/x-svm"/>
  <manifest:file-entry manifest:full-path="Pictures/10000001000002070000018624B21CA7.png" manifest:media-type="image/png"/>
  <manifest:file-entry manifest:full-path="Pictures/2000000700001C1E00001305522408FB.svm" manifest:media-type="image/x-svm"/>
  <manifest:file-entry manifest:full-path="Pictures/2000000700001C5D0000129CF20D9B77.svm" manifest:media-type="image/x-svm"/>
  <manifest:file-entry manifest:full-path="Pictures/200000070000311E00003020C22C4AC2.svm" manifest:media-type="image/x-svm"/>
  <manifest:file-entry manifest:full-path="Pictures/20000007000049EC000042FA6D4ACF47.svm" manifest:media-type="image/x-svm"/>
  <manifest:file-entry manifest:full-path="Pictures/1000000100000158000000E2815F6383.png" manifest:media-type="image/png"/>
  <manifest:file-entry manifest:full-path="Pictures/100000010000051E000004D67F4F068B.png" manifest:media-type="image/png"/>
  <manifest:file-entry manifest:full-path="Pictures/1000000000000274000002857638C9C3.png" manifest:media-type="image/png"/>
  <manifest:file-entry manifest:full-path="Pictures/10000001000002930000027FF426455C.png" manifest:media-type="image/png"/>
  <manifest:file-entry manifest:full-path="Pictures/100000010000024F000000EDBFD7ADB3.png" manifest:media-type="image/png"/>
  <manifest:file-entry manifest:full-path="Pictures/1000000100000396000001AD66EAA339.png" manifest:media-type="image/png"/>
  <manifest:file-entry manifest:full-path="Pictures/2000000700004BD300002364DCE02A83.svm" manifest:media-type="image/x-svm"/>
  <manifest:file-entry manifest:full-path="Pictures/100000010000037F0000032BDB7DE2C4.png" manifest:media-type="image/png"/>
  <manifest:file-entry manifest:full-path="Pictures/2000000700003669000034C14EE2598E.svm" manifest:media-type="image/x-svm"/>
  <manifest:file-entry manifest:full-path="Pictures/100000010000025300000247C97F3CD3.png" manifest:media-type="image/png"/>
  <manifest:file-entry manifest:full-path="Pictures/2000000700002A56000011C83513B04B.svm" manifest:media-type="image/x-svm"/>
  <manifest:file-entry manifest:full-path="Pictures/1000000100000201000000D8DEA22FD7.png" manifest:media-type="image/png"/>
  <manifest:file-entry manifest:full-path="Pictures/10000000000002780000016FEB6A8305.png" manifest:media-type="image/png"/>
  <manifest:file-entry manifest:full-path="Pictures/10000000000002C4000001E053CB3483.png" manifest:media-type="image/png"/>
  <manifest:file-entry manifest:full-path="Pictures/100000010000030B000001CC003BCA94.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Cascadia Mono" svg:font-family="'Cascadia Mono'"/>
    <style:font-face style:name="Cascadia Mono1" svg:font-family="'Cascadia Mono'" style:font-family-generic="modern" style:font-pitch="fixed"/>
    <style:font-face style:name="Courier New" svg:font-family="'Courier New'" style:font-family-generic="modern" style:font-pitch="fixed"/>
    <style:font-face style:name="Microsoft YaHei" svg:font-family="'Microsoft YaHei'" style:font-family-generic="system" style:font-pitch="variable"/>
    <style:font-face style:name="OpenSymbol" svg:font-family="OpenSymbol"/>
    <style:font-face style:name="SimSun" svg:font-family="SimSun" style:font-family-generic="system" style:font-pitch="variable"/>
    <style:font-face style:name="Times New Roman" svg:font-family="'Times New Roman'" style:font-family-generic="roman" style:font-pitch="variable"/>
    <style:font-face style:name="Trebuchet MS" svg:font-family="'Trebuchet MS'" style:font-family-generic="swiss" style:font-pitch="variable"/>
  </office:font-face-decls>
  <office:automatic-styles>
    <style:style style:name="Tabelle1" style:family="table">
      <style:table-properties style:width="12.938cm" fo:margin-left="0.513cm" fo:margin-right="3.549cm" table:align="margins"/>
    </style:style>
    <style:style style:name="Tabelle1.A" style:family="table-column">
      <style:table-column-properties style:column-width="0.818cm" style:rel-column-width="4145*"/>
    </style:style>
    <style:style style:name="Tabelle1.B" style:family="table-column">
      <style:table-column-properties style:column-width="6.895cm" style:rel-column-width="34925*"/>
    </style:style>
    <style:style style:name="Tabelle1.C" style:family="table-column">
      <style:table-column-properties style:column-width="2.18cm" style:rel-column-width="11043*"/>
    </style:style>
    <style:style style:name="Tabelle1.D" style:family="table-column">
      <style:table-column-properties style:column-width="3.044cm" style:rel-column-width="15422*"/>
    </style:style>
    <style:style style:name="Tabelle1.A1" style:family="table-cell">
      <style:table-cell-properties fo:padding="0.097cm" fo:border-left="0.05pt solid #000000" fo:border-right="none" fo:border-top="0.05pt solid #000000" fo:border-bottom="0.05pt solid #000000"/>
    </style:style>
    <style:style style:name="Tabelle1.D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D2" style:family="table-cell">
      <style:table-cell-properties fo:padding="0.097cm" fo:border-left="0.05pt solid #000000" fo:border-right="0.05pt solid #000000" fo:border-top="none" fo:border-bottom="0.05pt solid #000000"/>
    </style:style>
    <style:style style:name="Tabelle2" style:family="table">
      <style:table-properties style:width="16.258cm" fo:margin-left="0.407cm" fo:margin-right="0.335cm" table:align="margins"/>
    </style:style>
    <style:style style:name="Tabelle2.A" style:family="table-column">
      <style:table-column-properties style:column-width="2.353cm" style:rel-column-width="9485*"/>
    </style:style>
    <style:style style:name="Tabelle2.B" style:family="table-column">
      <style:table-column-properties style:column-width="3.799cm" style:rel-column-width="15315*"/>
    </style:style>
    <style:style style:name="Tabelle2.C" style:family="table-column">
      <style:table-column-properties style:column-width="5.004cm" style:rel-column-width="20171*"/>
    </style:style>
    <style:style style:name="Tabelle2.D" style:family="table-column">
      <style:table-column-properties style:column-width="5.101cm" style:rel-column-width="20564*"/>
    </style:style>
    <style:style style:name="Tabelle2.A1" style:family="table-cell">
      <style:table-cell-properties fo:padding="0.097cm" fo:border-left="0.05pt solid #000000" fo:border-right="none" fo:border-top="0.05pt solid #000000" fo:border-bottom="0.05pt solid #000000"/>
    </style:style>
    <style:style style:name="Tabelle2.D1" style:family="table-cell">
      <style:table-cell-properties fo:padding="0.097cm" fo:border="0.05pt solid #000000"/>
    </style:style>
    <style:style style:name="Tabelle2.A2" style:family="table-cell">
      <style:table-cell-properties fo:padding="0.097cm" fo:border-left="0.05pt solid #000000" fo:border-right="none" fo:border-top="none" fo:border-bottom="0.05pt solid #000000"/>
    </style:style>
    <style:style style:name="Tabelle2.D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style:text-position="super 58%" style:font-name="Trebuchet MS" fo:font-size="32pt" fo:font-weight="bold" style:font-size-asian="32pt" style:font-weight-asian="bold" style:font-size-complex="32pt" style:font-weight-complex="bold"/>
    </style:style>
    <style:style style:name="P2" style:family="paragraph" style:parent-style-name="Standard">
      <style:paragraph-properties fo:text-align="center" style:justify-single-word="false"/>
      <style:text-properties style:font-name="Trebuchet MS" fo:font-size="32pt" fo:font-weight="bold" style:font-size-asian="32pt" style:font-weight-asian="bold" style:font-size-complex="32pt" style:font-weight-complex="bold"/>
    </style:style>
    <style:style style:name="P3" style:family="paragraph" style:parent-style-name="Standard">
      <style:paragraph-properties fo:text-align="center" style:justify-single-word="false"/>
      <style:text-properties style:font-name="Trebuchet MS" fo:font-size="24pt" fo:font-weight="bold" style:font-size-asian="24pt" style:font-weight-asian="bold" style:font-size-complex="24pt" style:font-weight-complex="bold"/>
    </style:style>
    <style:style style:name="P4" style:family="paragraph" style:parent-style-name="Standard">
      <style:paragraph-properties fo:text-align="center" style:justify-single-word="false"/>
    </style:style>
    <style:style style:name="P5" style:family="paragraph" style:parent-style-name="Text_20_body">
      <style:text-properties fo:font-style="italic" style:font-style-asian="italic" style:font-style-complex="italic"/>
    </style:style>
    <style:style style:name="P6" style:family="paragraph" style:parent-style-name="Contents_20_Heading">
      <style:paragraph-properties fo:break-before="page"/>
    </style:style>
    <style:style style:name="P7" style:family="paragraph" style:parent-style-name="Contents_20_1">
      <style:paragraph-properties>
        <style:tab-stops>
          <style:tab-stop style:position="16.999cm" style:type="right" style:leader-style="dotted" style:leader-text="."/>
        </style:tab-stops>
      </style:paragraph-properties>
    </style:style>
    <style:style style:name="P8" style:family="paragraph" style:parent-style-name="Contents_20_2">
      <style:paragraph-properties>
        <style:tab-stops>
          <style:tab-stop style:position="16.499cm" style:type="right" style:leader-style="dotted" style:leader-text="."/>
        </style:tab-stops>
      </style:paragraph-properties>
    </style:style>
    <style:style style:name="P9" style:family="paragraph" style:parent-style-name="Contents_20_3">
      <style:paragraph-properties>
        <style:tab-stops>
          <style:tab-stop style:position="16cm" style:type="right" style:leader-style="dotted" style:leader-text="."/>
        </style:tab-stops>
      </style:paragraph-properties>
    </style:style>
    <style:style style:name="P10" style:family="paragraph" style:parent-style-name="Contents_20_4">
      <style:paragraph-properties>
        <style:tab-stops>
          <style:tab-stop style:position="15.501cm" style:type="right" style:leader-style="dotted" style:leader-text="."/>
        </style:tab-stops>
      </style:paragraph-properties>
    </style:style>
    <style:style style:name="P11" style:family="paragraph" style:parent-style-name="Heading_20_1">
      <style:paragraph-properties fo:break-before="page"/>
    </style:style>
    <style:style style:name="P12" style:family="paragraph" style:parent-style-name="Text_20_body" style:list-style-name="L1"/>
    <style:style style:name="P13" style:family="paragraph" style:parent-style-name="Standard" style:list-style-name="L2"/>
    <style:style style:name="P14" style:family="paragraph" style:parent-style-name="Text_20_body" style:list-style-name="L3"/>
    <style:style style:name="P15" style:family="paragraph" style:parent-style-name="Text_20_body">
      <style:paragraph-properties fo:text-align="start" style:justify-single-word="false"/>
    </style:style>
    <style:style style:name="P16" style:family="paragraph" style:parent-style-name="Text_20_body" style:list-style-name="L4"/>
    <style:style style:name="P17" style:family="paragraph" style:parent-style-name="Text_20_body" style:list-style-name="L5"/>
    <style:style style:name="P18" style:family="paragraph" style:parent-style-name="Text_20_body" style:list-style-name="L6"/>
    <style:style style:name="P19" style:family="paragraph" style:parent-style-name="Text_20_body" style:list-style-name="L7"/>
    <style:style style:name="P20" style:family="paragraph" style:parent-style-name="Text_20_body" style:list-style-name="L8"/>
    <style:style style:name="P21" style:family="paragraph" style:parent-style-name="Text_20_body" style:list-style-name="L9"/>
    <style:style style:name="P22" style:family="paragraph" style:parent-style-name="Text_20_body">
      <style:text-properties style:use-window-font-color="true" loext:opacity="0%"/>
    </style:style>
    <style:style style:name="P23" style:family="paragraph" style:parent-style-name="Text_20_body">
      <style:text-properties style:use-window-font-color="true" loext:opacity="0%" style:font-name="Times New Roman" fo:font-size="12pt" style:font-name-asian="Cascadia Mono" style:font-size-asian="12pt" style:font-name-complex="Cascadia Mono" style:font-size-complex="12pt"/>
    </style:style>
    <style:style style:name="P24" style:family="paragraph" style:parent-style-name="Text_20_body" style:list-style-name="L10"/>
    <style:style style:name="P25" style:family="paragraph" style:parent-style-name="Text_20_body">
      <style:paragraph-properties fo:margin-left="1.251cm" fo:margin-right="0cm" fo:text-indent="0cm" style:auto-text-indent="false"/>
    </style:style>
    <style:style style:name="P26" style:family="paragraph" style:parent-style-name="Text_20_body" style:list-style-name="L11"/>
    <style:style style:name="P27" style:family="paragraph" style:parent-style-name="Text_20_body" style:list-style-name="L12"/>
    <style:style style:name="P28" style:family="paragraph" style:parent-style-name="Text_20_body">
      <style:paragraph-properties fo:margin-left="1.251cm" fo:margin-right="0cm" fo:text-indent="0cm" style:auto-text-indent="false"/>
      <style:text-properties style:font-name="Cascadia Mono1" fo:font-size="10pt" style:font-size-asian="10pt" style:font-size-complex="10pt"/>
    </style:style>
    <style:style style:name="P29" style:family="paragraph" style:parent-style-name="Text_20_body" style:list-style-name="L13"/>
    <style:style style:name="P30" style:family="paragraph" style:parent-style-name="Text_20_body" style:list-style-name="L14"/>
    <style:style style:name="P31" style:family="paragraph" style:parent-style-name="Text_20_body" style:list-style-name="L15"/>
    <style:style style:name="P32" style:family="paragraph" style:parent-style-name="Text_20_body">
      <style:paragraph-properties fo:margin-left="1.251cm" fo:margin-right="0cm" fo:text-indent="0cm" style:auto-text-indent="false"/>
      <style:text-properties style:font-name="Cascadia Mono1" fo:font-size="11pt" style:font-size-asian="11pt" style:font-size-complex="11pt"/>
    </style:style>
    <style:style style:name="P33" style:family="paragraph" style:parent-style-name="Text_20_body">
      <style:paragraph-properties fo:margin-left="0cm" fo:margin-right="0cm" fo:text-indent="0cm" style:auto-text-indent="false"/>
    </style:style>
    <style:style style:name="P34" style:family="paragraph" style:parent-style-name="Standard">
      <style:paragraph-properties fo:margin-left="0cm" fo:margin-right="0cm" fo:text-indent="0cm" style:auto-text-indent="false"/>
    </style:style>
    <style:style style:name="P35" style:family="paragraph" style:parent-style-name="Text_20_body" style:list-style-name="L16"/>
    <style:style style:name="P36" style:family="paragraph" style:parent-style-name="Text_20_body" style:list-style-name="L17"/>
    <style:style style:name="P37" style:family="paragraph" style:parent-style-name="Text_20_body" style:list-style-name="L18"/>
    <style:style style:name="P38" style:family="paragraph" style:parent-style-name="Text_20_body">
      <style:paragraph-properties fo:margin-left="2.501cm" fo:margin-right="0cm" fo:text-indent="0cm" style:auto-text-indent="false"/>
    </style:style>
    <style:style style:name="P39" style:family="paragraph" style:parent-style-name="Text_20_body" style:list-style-name="L18">
      <style:text-properties fo:language="en" fo:country="GB"/>
    </style:style>
    <style:style style:name="P40" style:family="paragraph" style:parent-style-name="Heading_20_3">
      <style:text-properties officeooo:rsid="000eb703" officeooo:paragraph-rsid="000eb703"/>
    </style:style>
    <style:style style:name="P41" style:family="paragraph" style:parent-style-name="Text_20_body">
      <style:text-properties officeooo:rsid="000eb703" officeooo:paragraph-rsid="000eb703"/>
    </style:style>
    <style:style style:name="P42" style:family="paragraph" style:parent-style-name="Text_20_body">
      <style:paragraph-properties fo:text-align="center" style:justify-single-word="false"/>
      <style:text-properties officeooo:rsid="0017e84f" officeooo:paragraph-rsid="000eb703"/>
    </style:style>
    <style:style style:name="P43" style:family="paragraph" style:parent-style-name="Text_20_body">
      <style:text-properties officeooo:rsid="0017e84f" officeooo:paragraph-rsid="000eb703"/>
    </style:style>
    <style:style style:name="P44" style:family="paragraph" style:parent-style-name="Text_20_body" style:list-style-name="L19"/>
    <style:style style:name="P45" style:family="paragraph" style:parent-style-name="Text_20_body" style:list-style-name="L20"/>
    <style:style style:name="P46" style:family="paragraph" style:parent-style-name="Text_20_body" style:list-style-name="L21"/>
    <style:style style:name="P47" style:family="paragraph" style:parent-style-name="Text_20_body" style:list-style-name="L22"/>
    <style:style style:name="P48" style:family="paragraph" style:parent-style-name="Text_20_body" style:list-style-name="L23"/>
    <style:style style:name="P49" style:family="paragraph" style:parent-style-name="Text_20_body" style:list-style-name="L24"/>
    <style:style style:name="P50" style:family="paragraph" style:parent-style-name="Text_20_body" style:list-style-name="L25"/>
    <style:style style:name="P51" style:family="paragraph" style:parent-style-name="Text_20_body" style:list-style-name="L25">
      <style:text-properties fo:language="en" fo:country="GB" officeooo:paragraph-rsid="0039b2dd"/>
    </style:style>
    <style:style style:name="P52" style:family="paragraph" style:parent-style-name="Text_20_body" style:list-style-name="L26"/>
    <style:style style:name="P53" style:family="paragraph" style:parent-style-name="Text_20_body" style:list-style-name="L26">
      <style:text-properties officeooo:rsid="00450407" officeooo:paragraph-rsid="00450407"/>
    </style:style>
    <style:style style:name="P54" style:family="paragraph" style:parent-style-name="Heading_20_4">
      <style:text-properties officeooo:paragraph-rsid="003e40e3"/>
    </style:style>
    <style:style style:name="P55" style:family="paragraph" style:parent-style-name="Text_20_body">
      <style:text-properties officeooo:rsid="006c8dae" officeooo:paragraph-rsid="003ff118"/>
    </style:style>
    <style:style style:name="P56" style:family="paragraph" style:parent-style-name="Standard">
      <style:text-properties style:font-name="Cascadia Mono1" fo:font-size="10pt" officeooo:paragraph-rsid="003e40e3" style:font-size-asian="10pt" style:font-size-complex="10pt"/>
    </style:style>
    <style:style style:name="P57" style:family="paragraph" style:parent-style-name="Text_20_body">
      <style:text-properties officeooo:rsid="006c8dae" officeooo:paragraph-rsid="003e40e3"/>
    </style:style>
    <style:style style:name="P58" style:family="paragraph" style:parent-style-name="Standard">
      <style:text-properties officeooo:paragraph-rsid="003e40e3"/>
    </style:style>
    <style:style style:name="P59" style:family="paragraph" style:parent-style-name="Heading_20_4">
      <style:text-properties officeooo:paragraph-rsid="0017f6ec"/>
    </style:style>
    <style:style style:name="P60" style:family="paragraph" style:parent-style-name="Text_20_body">
      <style:text-properties officeooo:paragraph-rsid="001b7b42"/>
    </style:style>
    <style:style style:name="P61" style:family="paragraph" style:parent-style-name="Text_20_body" style:list-style-name="L27"/>
    <style:style style:name="P62" style:family="paragraph" style:parent-style-name="Text_20_body" style:master-page-name="">
      <style:paragraph-properties fo:margin-left="1.251cm" fo:margin-right="0cm" fo:margin-top="0cm" fo:margin-bottom="0.212cm" style:contextual-spacing="false" fo:text-indent="-0.582cm" style:auto-text-indent="false" style:page-number="auto"/>
    </style:style>
    <style:style style:name="P63" style:family="paragraph" style:parent-style-name="Text_20_body">
      <style:paragraph-properties fo:margin-left="1.251cm" fo:margin-right="0cm" fo:margin-top="0cm" fo:margin-bottom="0.212cm" style:contextual-spacing="false" fo:text-indent="-0.582cm" style:auto-text-indent="false"/>
    </style:style>
    <style:style style:name="P64" style:family="paragraph" style:parent-style-name="Text_20_body" style:master-page-name="">
      <style:paragraph-properties fo:margin-left="1.27cm" fo:margin-right="0cm" fo:margin-top="0cm" fo:margin-bottom="0.212cm" style:contextual-spacing="false" fo:text-indent="-0.609cm" style:auto-text-indent="false" style:page-number="auto"/>
    </style:style>
    <style:style style:name="P65" style:family="paragraph" style:parent-style-name="Text_20_body">
      <style:paragraph-properties fo:margin-left="0cm" fo:margin-right="0cm" fo:margin-top="0cm" fo:margin-bottom="0.212cm" style:contextual-spacing="false" fo:text-indent="0cm" style:auto-text-indent="false"/>
    </style:style>
    <style:style style:name="P66" style:family="paragraph" style:parent-style-name="Text_20_body" style:list-style-name="L28"/>
    <style:style style:name="P67" style:family="paragraph" style:parent-style-name="Text_20_body" style:list-style-name="L29"/>
    <style:style style:name="P68" style:family="paragraph" style:parent-style-name="Text_20_body" style:list-style-name="L30"/>
    <style:style style:name="P69" style:family="paragraph" style:parent-style-name="Text_20_body" style:list-style-name="L31">
      <style:text-properties fo:font-style="italic" style:font-style-asian="italic" style:font-style-complex="italic"/>
    </style:style>
    <style:style style:name="P70" style:family="paragraph" style:parent-style-name="Text_20_body" style:list-style-name="L31"/>
    <style:style style:name="P71" style:family="paragraph" style:parent-style-name="Text_20_body" style:list-style-name="L32"/>
    <style:style style:name="P72" style:family="paragraph" style:parent-style-name="Text_20_body" style:list-style-name="L33"/>
    <style:style style:name="P73" style:family="paragraph" style:parent-style-name="Text_20_body" style:list-style-name="L34"/>
    <style:style style:name="P74" style:family="paragraph" style:parent-style-name="Text_20_body">
      <style:text-properties fo:language="en" fo:country="GB"/>
    </style:style>
    <style:style style:name="P75" style:family="paragraph" style:parent-style-name="Text_20_body" style:list-style-name="L35">
      <style:text-properties fo:language="en" fo:country="GB"/>
    </style:style>
    <style:style style:name="P76" style:family="paragraph">
      <style:paragraph-properties fo:text-align="center"/>
    </style:style>
    <style:style style:name="P77" style:family="paragraph">
      <style:paragraph-properties fo:text-align="center" style:writing-mode="lr-tb"/>
    </style:style>
    <style:style style:name="P78" style:family="paragraph">
      <loext:graphic-properties draw:fill-color="#ccffff"/>
      <style:paragraph-properties fo:text-align="center"/>
    </style:style>
    <style:style style:name="P79" style:family="paragraph">
      <loext:graphic-properties draw:fill-color="#ccffff"/>
      <style:paragraph-properties fo:text-align="center"/>
      <style:text-properties fo:font-size="12pt"/>
    </style:style>
    <style:style style:name="P80" style:family="paragraph">
      <loext:graphic-properties draw:fill-color="#83caff"/>
    </style:style>
    <style:style style:name="P81" style:family="paragraph">
      <loext:graphic-properties draw:fill-color="#ffffcc"/>
      <style:paragraph-properties fo:text-align="center"/>
    </style:style>
    <style:style style:name="P82" style:family="paragraph" style:parent-style-name="Text_20_body" style:list-style-name="L36">
      <style:text-properties fo:language="en" fo:country="GB"/>
    </style:style>
    <style:style style:name="P83" style:family="paragraph" style:parent-style-name="Text_20_body" style:list-style-name="L33">
      <style:text-properties fo:language="en" fo:country="GB"/>
    </style:style>
    <style:style style:name="P84" style:family="paragraph" style:parent-style-name="Text_20_body" style:list-style-name="L33">
      <style:text-properties fo:language="en" fo:country="GB" officeooo:paragraph-rsid="0036199f"/>
    </style:style>
    <style:style style:name="P85" style:family="paragraph" style:parent-style-name="Text_20_body">
      <style:paragraph-properties fo:margin-left="1.251cm" fo:margin-right="0cm" fo:text-indent="0cm" style:auto-text-indent="false"/>
      <style:text-properties style:font-name="Courier New" fo:font-size="11pt" fo:language="en" fo:country="GB" style:font-size-asian="11pt" style:font-size-complex="11pt"/>
    </style:style>
    <style:style style:name="P86" style:family="paragraph" style:parent-style-name="Text_20_body">
      <style:text-properties fo:language="en" fo:country="GB" officeooo:rsid="005119f7" officeooo:paragraph-rsid="0022a007"/>
    </style:style>
    <style:style style:name="P87" style:family="paragraph" style:parent-style-name="Text_20_body">
      <style:text-properties fo:language="en" fo:country="GB" officeooo:rsid="002be1a5" officeooo:paragraph-rsid="002be1a5"/>
    </style:style>
    <style:style style:name="P88" style:family="paragraph" style:parent-style-name="Text_20_body">
      <style:text-properties style:font-name="Cascadia Mono1" fo:font-size="10pt" style:font-size-asian="10pt" style:font-size-complex="10pt"/>
    </style:style>
    <style:style style:name="P89" style:family="paragraph" style:parent-style-name="Standard">
      <style:paragraph-properties style:text-autospace="none"/>
      <style:text-properties fo:color="#000000" loext:opacity="100%" style:font-name="Cascadia Mono" fo:font-size="9.5pt" style:font-name-asian="Cascadia Mono" style:font-size-asian="9.5pt" style:font-name-complex="Cascadia Mono" style:font-size-complex="9.5pt"/>
    </style:style>
    <style:style style:name="P90" style:family="paragraph" style:parent-style-name="Text_20_body" style:list-style-name="L37"/>
    <style:style style:name="P91" style:family="paragraph" style:parent-style-name="Text_20_body" style:list-style-name="L38"/>
    <style:style style:name="P92" style:family="paragraph" style:parent-style-name="Heading_20_3">
      <style:text-properties fo:language="en" fo:country="GB"/>
    </style:style>
    <style:style style:name="P93" style:family="paragraph" style:parent-style-name="Heading_20_4">
      <style:text-properties fo:language="en" fo:country="GB"/>
    </style:style>
    <style:style style:name="P94" style:family="paragraph" style:parent-style-name="Text_20_body" style:list-style-name="L39"/>
    <style:style style:name="P95" style:family="paragraph" style:parent-style-name="Text_20_body">
      <style:text-properties fo:font-size="12pt" style:font-size-asian="12pt" style:font-size-complex="12pt"/>
    </style:style>
    <style:style style:name="P96" style:family="paragraph" style:parent-style-name="Text_20_body" style:list-style-name="L40">
      <style:text-properties fo:font-size="12pt" style:font-size-asian="12pt" style:font-size-complex="12pt"/>
    </style:style>
    <style:style style:name="P97" style:family="paragraph" style:parent-style-name="Text_20_body" style:list-style-name="L41">
      <style:text-properties fo:font-size="12pt" style:font-size-asian="12pt" style:font-size-complex="12pt"/>
    </style:style>
    <style:style style:name="P98" style:family="paragraph" style:parent-style-name="Text_20_body" style:list-style-name="L42">
      <style:text-properties fo:font-size="12pt" style:font-size-asian="12pt" style:font-size-complex="12pt"/>
    </style:style>
    <style:style style:name="P99" style:family="paragraph" style:parent-style-name="Text_20_body">
      <style:paragraph-properties fo:margin-left="1.251cm" fo:margin-right="0cm" fo:text-indent="0cm" style:auto-text-indent="false"/>
      <style:text-properties fo:font-size="12pt" style:font-size-asian="12pt" style:font-size-complex="12pt"/>
    </style:style>
    <style:style style:name="P100" style:family="paragraph" style:parent-style-name="Text_20_body" style:list-style-name="L43">
      <style:text-properties fo:font-size="12pt" style:font-size-asian="12pt" style:font-size-complex="12pt"/>
    </style:style>
    <style:style style:name="P101" style:family="paragraph" style:parent-style-name="Text_20_body" style:list-style-name="L44"/>
    <style:style style:name="P102" style:family="paragraph" style:parent-style-name="Text_20_body" style:list-style-name="L45"/>
    <style:style style:name="P103" style:family="paragraph" style:parent-style-name="Text_20_body" style:list-style-name="L45">
      <style:text-properties style:font-name="Cascadia Mono1" fo:font-size="11pt" style:font-size-asian="11pt" style:font-size-complex="11pt"/>
    </style:style>
    <style:style style:name="P104" style:family="paragraph" style:parent-style-name="Text_20_body" style:list-style-name="L46"/>
    <style:style style:name="P105" style:family="paragraph" style:parent-style-name="Table_20_Heading">
      <style:paragraph-properties fo:text-align="center" style:justify-single-word="false"/>
    </style:style>
    <style:style style:name="P106" style:family="paragraph" style:parent-style-name="Table_20_Contents">
      <style:paragraph-properties fo:text-align="center" style:justify-single-word="false"/>
    </style:style>
    <style:style style:name="P107" style:family="paragraph" style:parent-style-name="Table_20_Contents">
      <style:text-properties officeooo:rsid="0069e89e" officeooo:paragraph-rsid="0069e89e"/>
    </style:style>
    <style:style style:name="P108" style:family="paragraph" style:parent-style-name="Table_20_Contents">
      <style:text-properties style:text-line-through-style="none" style:text-line-through-type="none" officeooo:rsid="0034b160" officeooo:paragraph-rsid="0034b160"/>
    </style:style>
    <style:style style:name="P109" style:family="paragraph" style:parent-style-name="Table_20_Contents">
      <style:text-properties officeooo:rsid="0034b160" officeooo:paragraph-rsid="0034b160"/>
    </style:style>
    <style:style style:name="P110" style:family="paragraph" style:parent-style-name="Table_20_Contents">
      <style:text-properties style:text-line-through-style="none" style:text-line-through-type="none"/>
    </style:style>
    <style:style style:name="P111" style:family="paragraph" style:parent-style-name="Table_20_Contents">
      <style:text-properties style:text-line-through-style="solid" style:text-line-through-type="single"/>
    </style:style>
    <style:style style:name="P112" style:family="paragraph" style:parent-style-name="Table_20_Contents">
      <style:text-properties officeooo:rsid="002d5c4a" officeooo:paragraph-rsid="002d5c4a"/>
    </style:style>
    <style:style style:name="P113" style:family="paragraph" style:parent-style-name="Table_20_Contents">
      <style:text-properties fo:font-weight="normal" style:font-weight-asian="normal" style:font-weight-complex="normal"/>
    </style:style>
    <style:style style:name="P114" style:family="paragraph" style:parent-style-name="Table_20_Contents">
      <style:text-properties fo:font-weight="normal" officeooo:rsid="002d5c4a" officeooo:paragraph-rsid="002d5c4a" style:font-weight-asian="normal" style:font-weight-complex="normal"/>
    </style:style>
    <style:style style:name="P115" style:family="paragraph" style:parent-style-name="Table_20_Contents">
      <style:text-properties officeooo:rsid="0014c3a5" officeooo:paragraph-rsid="0014c3a5"/>
    </style:style>
    <style:style style:name="P116" style:family="paragraph" style:parent-style-name="Table_20_Contents">
      <style:text-properties officeooo:rsid="002218e0" officeooo:paragraph-rsid="002218e0"/>
    </style:style>
    <style:style style:name="P117" style:family="paragraph" style:parent-style-name="Table_20_Contents">
      <style:text-properties fo:font-weight="normal" officeooo:rsid="002218e0" officeooo:paragraph-rsid="002218e0" style:font-weight-asian="normal" style:font-weight-complex="normal"/>
    </style:style>
    <style:style style:name="T1" style:family="text">
      <style:text-properties officeooo:rsid="002a03ad"/>
    </style:style>
    <style:style style:name="T2" style:family="text">
      <style:text-properties officeooo:rsid="003e40e3"/>
    </style:style>
    <style:style style:name="T3" style:family="text">
      <style:text-properties officeooo:rsid="00450407"/>
    </style:style>
    <style:style style:name="T4" style:family="text">
      <style:text-properties officeooo:rsid="001d85a7"/>
    </style:style>
    <style:style style:name="T5" style:family="text">
      <style:text-properties fo:font-style="italic" style:font-style-asian="italic" style:font-style-complex="italic"/>
    </style:style>
    <style:style style:name="T6" style:family="text">
      <style:text-properties fo:font-family="'Times New Roman'" style:font-family-generic="roman" style:font-family-asian="'Times New Roman'" style:font-family-generic-asian="roman" style:font-family-complex="'Times New Roman'" style:font-family-generic-complex="roman"/>
    </style:style>
    <style:style style:name="T7" style:family="text">
      <style:text-properties style:font-name="Cascadia Mono1" fo:font-size="11pt" style:font-size-asian="11pt" style:font-size-complex="11pt"/>
    </style:style>
    <style:style style:name="T8" style:family="text">
      <style:text-properties fo:font-style="normal" style:font-style-asian="normal" style:font-style-complex="normal"/>
    </style:style>
    <style:style style:name="T9" style:family="text">
      <style:text-properties officeooo:rsid="0009dff9"/>
    </style:style>
    <style:style style:name="T10" style:family="text">
      <style:text-properties style:font-name="Cascadia Mono" fo:font-size="9.5pt" style:font-name-asian="Cascadia Mono" style:font-size-asian="9.5pt" style:font-name-complex="Cascadia Mono" style:font-size-complex="9.5pt"/>
    </style:style>
    <style:style style:name="T11" style:family="text">
      <style:text-properties style:font-name="Times New Roman" fo:font-size="12pt" style:font-name-asian="Cascadia Mono" style:font-size-asian="12pt" style:font-name-complex="Cascadia Mono" style:font-size-complex="12pt"/>
    </style:style>
    <style:style style:name="T12" style:family="text">
      <style:text-properties style:font-name="Cascadia Mono1" fo:font-size="10pt" style:font-name-asian="Cascadia Mono" style:font-size-asian="10pt" style:font-name-complex="Cascadia Mono" style:font-size-complex="10pt"/>
    </style:style>
    <style:style style:name="T13" style:family="text">
      <style:text-properties officeooo:rsid="00414dff"/>
    </style:style>
    <style:style style:name="T14" style:family="text">
      <style:text-properties officeooo:rsid="00429850"/>
    </style:style>
    <style:style style:name="T15" style:family="text">
      <style:text-properties style:font-name="Cascadia Mono1" fo:font-size="10.5pt" style:font-size-asian="10.5pt" style:font-size-complex="10.5pt"/>
    </style:style>
    <style:style style:name="T16" style:family="text">
      <style:text-properties fo:language="en" fo:country="GB"/>
    </style:style>
    <style:style style:name="T17" style:family="text">
      <style:text-properties fo:font-family="'Times New Roman'" style:font-family-generic="roman"/>
    </style:style>
    <style:style style:name="T18" style:family="text">
      <style:text-properties style:font-name="Times New Roman"/>
    </style:style>
    <style:style style:name="T19" style:family="text">
      <style:text-properties officeooo:rsid="00116559"/>
    </style:style>
    <style:style style:name="T20" style:family="text">
      <style:text-properties officeooo:rsid="0017e84f"/>
    </style:style>
    <style:style style:name="T21" style:family="text">
      <style:text-properties officeooo:rsid="000eb703"/>
    </style:style>
    <style:style style:name="T22" style:family="text">
      <style:text-properties officeooo:rsid="000fc49f"/>
    </style:style>
    <style:style style:name="T23" style:family="text">
      <style:text-properties style:font-name="Times New Roman" fo:language="en" fo:country="GB"/>
    </style:style>
    <style:style style:name="T24" style:family="text">
      <style:text-properties officeooo:rsid="001b7b42"/>
    </style:style>
    <style:style style:name="T25" style:family="text">
      <style:text-properties officeooo:rsid="00639376"/>
    </style:style>
    <style:style style:name="T26" style:family="text">
      <style:text-properties officeooo:rsid="0039b2dd"/>
    </style:style>
    <style:style style:name="T27" style:family="text">
      <style:text-properties officeooo:rsid="00645474"/>
    </style:style>
    <style:style style:name="T28" style:family="text">
      <style:text-properties officeooo:rsid="006c8dae"/>
    </style:style>
    <style:style style:name="T29" style:family="text">
      <style:text-properties officeooo:rsid="003ff118"/>
    </style:style>
    <style:style style:name="T30" style:family="text">
      <style:text-properties style:font-name="Arial1" fo:font-size="11.8999996185303pt" fo:font-style="italic" fo:font-weight="bold" officeooo:rsid="003ff118" style:font-name-asian="Microsoft YaHei" style:font-size-asian="11.8999996185303pt" style:font-style-asian="italic" style:font-weight-asian="bold" style:font-name-complex="Arial2" style:font-size-complex="11.8999996185303pt" style:font-style-complex="italic" style:font-weight-complex="bold"/>
    </style:style>
    <style:style style:name="T31" style:family="text">
      <style:text-properties style:font-name="Cascadia Mono1" fo:font-size="10pt" style:font-size-asian="10pt" style:font-size-complex="10pt"/>
    </style:style>
    <style:style style:name="T32" style:family="text">
      <style:text-properties style:font-name="Cascadia Mono1" fo:font-size="10pt" officeooo:rsid="006c8dae" style:font-size-asian="10pt" style:font-size-complex="10pt"/>
    </style:style>
    <style:style style:name="T33" style:family="text">
      <style:text-properties officeooo:rsid="001973fa"/>
    </style:style>
    <style:style style:name="T34" style:family="text">
      <style:text-properties officeooo:rsid="0019f08c"/>
    </style:style>
    <style:style style:name="T35" style:family="text">
      <style:text-properties officeooo:rsid="0019a1e2"/>
    </style:style>
    <style:style style:name="T36" style:family="text">
      <style:text-properties style:font-name="Arial1" fo:font-size="11.8999996185303pt" fo:font-style="italic" fo:font-weight="bold" style:font-name-asian="Microsoft YaHei" style:font-size-asian="11.8999996185303pt" style:font-style-asian="italic" style:font-weight-asian="bold" style:font-name-complex="Arial2" style:font-size-complex="11.8999996185303pt" style:font-style-complex="italic" style:font-weight-complex="bold"/>
    </style:style>
    <style:style style:name="T37" style:family="text">
      <style:text-properties officeooo:rsid="001f6add"/>
    </style:style>
    <style:style style:name="T38" style:family="text">
      <style:text-properties fo:color="#a31515" loext:opacity="100%" style:font-name="Cascadia Mono" fo:font-size="9.5pt" style:font-name-asian="Cascadia Mono" style:font-size-asian="9.5pt" style:font-name-complex="Cascadia Mono" style:font-size-complex="9.5pt"/>
    </style:style>
    <style:style style:name="T39" style:family="text">
      <style:text-properties fo:font-size="12pt"/>
    </style:style>
    <style:style style:name="T40" style:family="text">
      <style:text-properties officeooo:rsid="002aa951"/>
    </style:style>
    <style:style style:name="T41" style:family="text">
      <style:text-properties officeooo:rsid="002be1a5"/>
    </style:style>
    <style:style style:name="T42" style:family="text">
      <style:text-properties officeooo:rsid="0036199f"/>
    </style:style>
    <style:style style:name="T43" style:family="text">
      <style:text-properties officeooo:rsid="00371447"/>
    </style:style>
    <style:style style:name="T44" style:family="text">
      <style:text-properties officeooo:rsid="0038dd61"/>
    </style:style>
    <style:style style:name="T45" style:family="text">
      <style:text-properties officeooo:rsid="0028e662"/>
    </style:style>
    <style:style style:name="T46" style:family="text">
      <style:text-properties officeooo:rsid="0022a007"/>
    </style:style>
    <style:style style:name="T47" style:family="text">
      <style:text-properties officeooo:rsid="00260afb"/>
    </style:style>
    <style:style style:name="T48" style:family="text">
      <style:text-properties officeooo:rsid="00270284"/>
    </style:style>
    <style:style style:name="T49" style:family="text">
      <style:text-properties style:font-name="Cascadia Mono1" fo:font-size="11pt" fo:language="en" fo:country="GB" style:font-size-asian="11pt" style:font-size-complex="11pt"/>
    </style:style>
    <style:style style:name="T50" style:family="text">
      <style:text-properties fo:color="#000000" loext:opacity="100%" style:font-name="Cascadia Mono" fo:font-size="11pt" style:font-name-asian="Cascadia Mono" style:font-size-asian="11pt" style:font-name-complex="Cascadia Mono" style:font-size-complex="11pt"/>
    </style:style>
    <style:style style:name="T51" style:family="text">
      <style:text-properties fo:font-size="11pt" style:font-size-asian="11pt" style:font-size-complex="11pt"/>
    </style:style>
    <style:style style:name="T52" style:family="text">
      <style:text-properties fo:color="#000000" loext:opacity="100%" style:font-name="Cascadia Mono" style:font-name-asian="Cascadia Mono" style:font-name-complex="Cascadia Mono"/>
    </style:style>
    <style:style style:name="T53" style:family="text">
      <style:text-properties fo:color="#000000" loext:opacity="100%" style:font-name="Times New Roman" style:font-name-asian="Cascadia Mono" style:font-name-complex="Cascadia Mono"/>
    </style:style>
    <style:style style:name="T54" style:family="text">
      <style:text-properties style:font-name="Times New Roman" fo:font-size="12pt" style:font-size-asian="12pt" style:font-size-complex="12pt"/>
    </style:style>
    <style:style style:name="T55" style:family="text">
      <style:text-properties officeooo:rsid="0031b938"/>
    </style:style>
    <style:style style:name="T56" style:family="text">
      <style:text-properties officeooo:rsid="00339bd5"/>
    </style:style>
    <style:style style:name="T57" style:family="text">
      <style:text-properties officeooo:rsid="002d5c4a"/>
    </style:style>
    <style:style style:name="T58" style:family="text">
      <style:text-properties officeooo:rsid="0014c3a5"/>
    </style:style>
    <style:style style:name="T59" style:family="text">
      <style:text-properties officeooo:rsid="0034290f"/>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number text:level="1" text:style-name="Numbering_20_Symbols" loext:num-list-format="%1%."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3">
      <text:list-level-style-number text:level="1" text:style-name="Numbering_20_Symbols" loext:num-list-format="%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justify" draw:textarea-vertical-align="middle" draw:auto-grow-height="false" fo:min-height="0cm" fo:min-width="0cm"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fill-color="#ccffff"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marker-end="Arrow"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fill-color="#83caff" draw:textarea-horizontal-align="justify" draw:textarea-vertical-align="middle" draw:auto-grow-height="false" fo:min-height="0cm" fo:min-width="0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draw:fill-color="#ffffcc"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tracked-changes>
        <text:changed-region xml:id="ct2969530338640" text:id="ct2969530338640">
          <text:insertion>
            <office:change-info>
              <dc:creator>Unbekannter Autor</dc:creator>
              <dc:date>2026-05-17T19:32:59</dc:date>
            </office:change-info>
          </text:insertion>
        </text:changed-region>
        <text:changed-region xml:id="ct2969530335760" text:id="ct2969530335760">
          <text:deletion>
            <office:change-info>
              <dc:creator>Unbekannter Autor</dc:creator>
              <dc:date>2026-05-17T19:32:57</dc:date>
            </office:change-info>
            <text:p text:style-name="P4"><text:span text:style-name="T2">0</text:span><text:span text:style-name="T13">8</text:span></text:p>
          </text:deletion>
        </text:changed-region>
        <text:changed-region xml:id="ct2969530356208" text:id="ct2969530356208">
          <text:insertion>
            <office:change-info>
              <dc:creator>Unbekannter Autor</dc:creator>
              <dc:date>2026-05-17T19:34:21</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2"/>
      <text:p text:style-name="P2">PathDxf2GCode</text:p>
      <text:p text:style-name="P3"/>
      <text:p text:style-name="P3">Utility for graphical definition of milling paths</text:p>
      <text:p text:style-name="P3"/>
      <text:p text:style-name="P4">H.M.Müller, 202<text:span text:style-name="T1">6</text:span>-<text:span text:style-name="T1">0</text:span><text:span text:style-name="T2">5-</text:span><text:change-start text:change-id="ct2969530338640"/><text:span text:style-name="T3">17</text:span><text:change-end text:change-id="ct2969530338640"/><text:change text:change-id="ct2969530335760"/></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Text_20_body"/>
      <text:p text:style-name="Text_20_body"/>
      <text:p text:style-name="Text_20_body"/>
      <text:p text:style-name="Text_20_body"/>
      <text:p text:style-name="Text_20_body"/>
      <text:p text:style-name="Text_20_body"/>
      <text:p text:style-name="P5">Translated with <text:span text:style-name="T4">support by</text:span> <text:a xlink:type="simple" xlink:href="https://DeepL.com/" text:style-name="Internet_20_link" text:visited-style-name="Visited_20_Internet_20_Link">https://DeepL.com</text:a></text:p>
      <text:table-of-content text:style-name="Sect1" text:protected="true" text:name="Inhaltsverzeichnis1">
        <text:table-of-content-source text:outline-level="10">
          <text:index-title-template text:style-name="Contents_20_Heading">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rotected="true">
            <text:p text:style-name="P6">Contents</text:p>
          </text:index-title>
          <text:p text:style-name="P7">1. Problem<text:tab/>4</text:p>
          <text:p text:style-name="P7">2. Manufacturing process<text:tab/>5</text:p>
          <text:p text:style-name="P7">3. Solution concept<text:tab/>6</text:p>
          <text:p text:style-name="P7">4. User documentation<text:tab/>7</text:p>
          <text:p text:style-name="P8">4.1. Main process<text:tab/>7</text:p>
          <text:p text:style-name="P9">4.1.1. Designing components<text:tab/>7</text:p>
          <text:p text:style-name="P9">4.1.2. Constructing the project<text:tab/>7</text:p>
          <text:p text:style-name="P9">4.1.3. Exporting path files<text:tab/>7</text:p>
          <text:p text:style-name="P9">4.1.4. Generate G-code<text:tab/>8</text:p>
          <text:p text:style-name="P9">4.1.5. Milling<text:tab/>8</text:p>
          <text:p text:style-name="P8">4.2. Path drawings<text:tab/>8</text:p>
          <text:p text:style-name="P9">4.2.1. An example<text:tab/>8</text:p>
          <text:p text:style-name="P9">4.2.2. Path names<text:tab/>10</text:p>
          <text:p text:style-name="P9">4.2.3. Path layers<text:tab/>10</text:p>
          <text:p text:style-name="P9">4.2.4. Structure of a path construction<text:tab/>11</text:p>
          <text:p text:style-name="P9">4.2.5. Parameter texts<text:tab/>12</text:p>
          <text:p text:style-name="P10">4.2.5.1. Structure of parameter texts<text:tab/>12</text:p>
          <text:p text:style-name="P10">4.2.4.2. Assignment of parameter texts with overlapping only<text:tab/>12</text:p>
          <text:p text:style-name="P10">4.2.5.3. Some problematic cases and solutions<text:tab/>12</text:p>
          <text:p text:style-name="P10">4.2.5.4. Assignment of parameter texts with parameter text layers<text:tab/>13</text:p>
          <text:p text:style-name="P9">4.2.6. Geometry of the milling parameters<text:tab/>14</text:p>
          <text:p text:style-name="P9">4.2.7. Paths<text:tab/>15</text:p>
          <text:p text:style-name="P9">4.2.8. Specifying path parameters with a @ reference<text:tab/>16</text:p>
          <text:p text:style-name="P9">4.2.9. Sweeps<text:tab/>17</text:p>
          <text:p text:style-name="P9">4.2.10. Milling chains and milling segments<text:tab/>17</text:p>
          <text:p text:style-name="P9">4.2.11. Drilled holes<text:tab/>18</text:p>
          <text:p text:style-name="P9">4.2.12. Helical circles<text:tab/>18</text:p>
          <text:p text:style-name="P9">4.2.13. Support bars<text:tab/>19</text:p>
          <text:p text:style-name="P9">4.2.14. Sweepless milling („slow milling“)<text:tab/>20</text:p>
          <text:p text:style-name="P9">4.2.15. Subpath embeddings<text:tab/>20</text:p>
          <text:p text:style-name="P10">4.2.15.1. Milled subpath embeddings<text:tab/>20</text:p>
          <text:p text:style-name="P10">4.2.15.2. R<text:span text:style-name="T5">e</text:span>stricting called subpaths<text:tab/>21</text:p>
          <text:p text:style-name="P10">4.2.15.3. Embedding without milling for “correction milling”<text:tab/>21</text:p>
          <text:p text:style-name="P9">4.2.16. Subpath embeddings with variables<text:tab/>22</text:p>
          <text:p text:style-name="P10">4.2.16.1. Example for a combined clamping and <text:span text:style-name="T5">variables project</text:span><text:tab/>22</text:p>
          <text:p text:style-name="P10">4.2.16.2. Definition of variables<text:tab/>24</text:p>
          <text:p text:style-name="P10">4.2.16.3. Usage of variables<text:tab/>24</text:p>
          <text:p text:style-name="P10">4.2.16.4. Setting the values<text:tab/>24</text:p>
          <text:p text:style-name="P10">4.2.16.5. Check values for variables<text:tab/>25</text:p>
          <text:p text:style-name="P9">4.2.17. Star-shaped paths<text:tab/>25</text:p>
          <text:p text:style-name="P8">4.3. Component path DXF files<text:tab/>25</text:p>
          <text:p text:style-name="P8">4.4. Projects<text:tab/>27</text:p>
          <text:p text:style-name="P9">4.4.1. Project numbers<text:tab/>27</text:p>
          <text:p text:style-name="P9">4.4.2. Project path drawings and subpaths<text:tab/>27</text:p>
          <text:p text:style-name="P8">4.5. Z-Probes<text:tab/>28</text:p>
          <text:p text:style-name="P9">4.5.1. Basics<text:tab/>28</text:p>
          <text:p text:style-name="P9">4.5.2. Path drawing with Z probes<text:tab/>29</text:p>
          <text:p text:style-name="P9">4.5.3. Measuring run<text:tab/>30</text:p>
          <text:p text:style-name="P9"><text:soft-page-break/>4.5.4. Creating the _Milling.gcode file<text:tab/>30</text:p>
          <text:p text:style-name="P8">4.6. Calling PathDxf2GCode<text:tab/>30</text:p>
          <text:p text:style-name="P9">4.6.1. Command line options<text:tab/>30</text:p>
          <text:p text:style-name="P9">4.6.2. Problems and their solutions<text:tab/>31</text:p>
          <text:p text:style-name="P10">4.6.2.1. „Path definition … not found.“<text:tab/>31</text:p>
          <text:p text:style-name="P10">4.6.2.2. „End marker missing.“<text:tab/>31</text:p>
          <text:p text:style-name="P10">4.6.2.3. “S value missing.”, “B value missing.”, ...<text:tab/>31</text:p>
          <text:p text:style-name="P10">4.6.2.4. „No further segments” at the specified point.“<text:tab/>31</text:p>
          <text:p text:style-name="P8">4.7. Calling PathGCodeAdjustZ<text:tab/>32</text:p>
          <text:p text:style-name="P9">4.7.1. Command line options<text:tab/>32</text:p>
          <text:p text:style-name="P9">4.7.2. Maximum Z correction<text:tab/>32</text:p>
          <text:p text:style-name="P9">4.7.3. Emitting statistics lines<text:tab/>32</text:p>
          <text:p text:style-name="P9">4.7.4. Problems and their solutions<text:tab/>32</text:p>
          <text:p text:style-name="P10">4.7.4.1. “Line does not have the format ‘(comment) #...=value’”<text:tab/>32</text:p>
          <text:p text:style-name="P8">4.8. Milling run<text:tab/>32</text:p>
          <text:p text:style-name="P7">5. Program documentation<text:tab/>34</text:p>
          <text:p text:style-name="P8">5.1. Overview<text:tab/>34</text:p>
          <text:p text:style-name="P8">5.2. Github project<text:tab/>34</text:p>
          <text:p text:style-name="P8">5.3. Compiler passes<text:tab/>34</text:p>
          <text:p text:style-name="P8">5.4. Basic data structures<text:tab/>34</text:p>
          <text:p text:style-name="P8">5.5. Special data structures and algorithms in PathDxf2GCode<text:tab/>35</text:p>
          <text:p text:style-name="P9">5.5.1. GCodeHelpers.cs<text:tab/>35</text:p>
          <text:p text:style-name="P10">5.5.1.1. Optimize<text:tab/>35</text:p>
          <text:p text:style-name="P9">5.5.2. MillGeometry.cs<text:tab/>35</text:p>
          <text:p text:style-name="P9">5.5.3. Params.cs<text:tab/>35</text:p>
          <text:p text:style-name="P9">5.5.4. PathModel.cs<text:tab/>36</text:p>
          <text:p text:style-name="P10">5.5.4.1. Inner class RawPathModel<text:tab/>36</text:p>
          <text:p text:style-name="P10">5.5.4.2. Inner class Collection<text:tab/>36</text:p>
          <text:p text:style-name="P10">5.5.4.3. CollectSegments<text:tab/>36</text:p>
          <text:p text:style-name="P10">5.5.4.4. NearestOverlapping&lt;T&gt;, NearestOverlappingCircle, ….Line, ...Arc, CircleOverlapsLine, ...Arc, DistanceToArcCircle, GetOverlapSurrounding<text:tab/>36</text:p>
          <text:p text:style-name="P10">5.5.4.5. CreatePathModel<text:tab/>36</text:p>
          <text:p text:style-name="P10">5.5.4.6. CollectAndOrderAllZProbes<text:tab/>36</text:p>
          <text:p text:style-name="P9">5.5.5. PathSegment.cs<text:tab/>36</text:p>
          <text:p text:style-name="P10">5.5.5.1. Internal RawSegment classes<text:tab/>36</text:p>
          <text:p text:style-name="P10">5.5.5.2. MillChain.EmitGCode<text:tab/>37</text:p>
          <text:p text:style-name="P10">5.5.5.3. HelixSegment.EmitGCode<text:tab/>37</text:p>
          <text:p text:style-name="P10">5.5.5.4. SubPathSegment.EmitGCode<text:tab/>37</text:p>
          <text:p text:style-name="P9">5.5.6. Transformation2.cs<text:tab/>37</text:p>
          <text:p text:style-name="P9">5.5.7. Transformation3.cs<text:tab/>37</text:p>
          <text:p text:style-name="P8">5.6. Special data structures and algorithms in <text:span text:style-name="T5">PathGCodeAdjustZ</text:span><text:tab/>37</text:p>
          <text:p text:style-name="P9">5.6.1. ExprEval.cs<text:tab/>37</text:p>
          <text:p text:style-name="P8">5.7. Currently known or suspected problems<text:tab/>37</text:p>
          <text:p text:style-name="P8">5.8. Missing features<text:tab/>37</text:p>
          <text:p text:style-name="P7">6. Tables<text:tab/>38</text:p>
          <text:p text:style-name="P8">6.1. Parameters<text:tab/>38</text:p>
          <text:p text:style-name="P8">6.2. Line types<text:tab/>39</text:p>
        </text:index-body>
      </text:table-of-content>
      <text:p text:style-name="Text_20_body"/>
      <text:h text:style-name="P11" text:outline-level="1"><text:bookmark-start text:name="__RefHeading___Toc5521_2169950967"/>1. Problem<text:bookmark-end text:name="__RefHeading___Toc5521_2169950967"/></text:h>
      <text:p text:style-name="Text_20_body">A CAD program is typically used to design the results of a manufacturing process. In a subsequent (or parallel) step, one must then also describe that process itself, which might require additional designs<text:span text:style-name="T6">—</text:span>for example special tools, intermediate manufacturing results or, in the case of CNC manufacturing, „CNC programs“ that control the movement of such machines.</text:p>
      <text:p text:style-name="Text_20_body">Nowadays, the construction typically results in a DXF file, which must then be converted to a G-code file. Of course, this conversion depends on the specific manufacturing process. Among other factors, one has to consider</text:p>
      <text:list text:style-name="L1">
        <text:list-item>
          <text:p text:style-name="P12">the type of CNC machine </text:p>
        </text:list-item>
        <text:list-item>
          <text:p text:style-name="P12">its properties</text:p>
        </text:list-item>
        <text:list-item>
          <text:p text:style-name="P12">the materials used</text:p>
        </text:list-item>
        <text:list-item>
          <text:p text:style-name="P12">the necessary manufacturing precision:</text:p>
        </text:list-item>
      </text:list>
      <text:p text:style-name="Text_20_body">For the same final result, a 3D printer needs a different G-code file than a CNC milling machine or (if manufacturing is possible with it) a CNC lathe. But not only the machine is relevant: If a CNC milling machine is to mill a component out of block material, different G-code is required than for manufacturing from profiles. Finally, many specific parameters of a CNC machine determine the creation of correct and efficient G-code.</text:p>
      <text:p text:style-name="Text_20_body">The basic question I had to answer for my mechanical designs was, then: Could I use a standard program for G-code creation, or would I need a homegrown solution?</text:p>
      <text:h text:style-name="Heading_20_1" text:outline-level="1"/>
      <text:h text:style-name="P11" text:outline-level="1"><text:bookmark-start text:name="__RefHeading___Toc5523_2169950967"/>2. Manufacturing process<text:bookmark-end text:name="__RefHeading___Toc5523_2169950967"/></text:h>
      <text:p text:style-name="Standard">To answer the question at the end of the previous section, it is necessary to talk about my manufacturing process, which is once again influenced by the final results I want to manufacture. Here are <text:s/>relevant properties of this process:</text:p>
      <text:list text:style-name="L2">
        <text:list-item>
          <text:p text:style-name="P13">I want to build special mechanical <text:span text:style-name="T5">models </text:span>which are assembled from somewhat standardized <text:span text:style-name="T5">components</text:span>.</text:p>
        </text:list-item>
        <text:list-item>
          <text:p text:style-name="P13">Due to the fact that the number of component designs is quite large (100s), I do not want to mass-produce them; rather, after designing a specific model from the components, they are specifically manufactured for that model. </text:p>
        </text:list-item>
        <text:list-item>
          <text:p text:style-name="P13">The components are milled from a few types of aluminum profiles (angle profiles and flat sections). The resulting G-code must be based on milling these profiles.</text:p>
        </text:list-item>
        <text:list-item>
          <text:p text:style-name="P13">Most components are quite small (about 100 mm in length, often below 50 mm). One milling run on the CNC router can therefore create a medium number (10...30) of components. Thus, the G-code program for a single run must be assembled from the designs of multiple components.</text:p>
        </text:list-item>
        <text:list-item>
          <text:p text:style-name="P13">Some components need two milling runs; e.g., components milled from an angle profile require a separate run for each side of the profile.</text:p>
        </text:list-item>
        <text:list-item>
          <text:p text:style-name="P13">In rare cases, it is necessary to change the milling bit between two runs on the same components (e.g. if both a straight bit and a T-slot bit are necessary).</text:p>
        </text:list-item>
      </text:list>
      <text:h text:style-name="Heading_20_1" text:outline-level="1"/>
      <text:h text:style-name="P11" text:outline-level="1"><text:bookmark-start text:name="__RefHeading___Toc5525_2169950967"/>3. Solution concept<text:bookmark-end text:name="__RefHeading___Toc5525_2169950967"/></text:h>
      <text:p text:style-name="Text_20_body">Above all, the profiles that I want to use on my CNC milling machine are specific to my designs. There are certainly professional G-code generators that can be taught to use profiles; I'd rather not know the license costs on the one hand, and the configuration effort on the other ... (which may be wrong, because I'm overlooking an elegant solution; nevertheless, I'll take a chance; I could perhaps do some further research here: <text:a xlink:type="simple" xlink:href="https://all3dp.com/2/dxf-to-gcode-convert-files/" text:style-name="Internet_20_link" text:visited-style-name="Visited_20_Internet_20_Link">How to Convert DXF to G-code: 4 Easy Ways | All3DP</text:a>).</text:p>
      <text:p text:style-name="Text_20_body">Moreover, I only trust automatically generated G-code to a limited extent. Later, when I really understand the behavior of my machine, I will get involved<text:span text:style-name="T6">—</text:span>but for now I want to have every movement of the machine “specified by myself”.</text:p>
      <text:p text:style-name="Text_20_body">That's why I've made my decision: I want to write the G-code generator myself.</text:p>
      <text:p text:style-name="Text_20_body">However, I don't want to use more or less “intelligence” to back-calculate the milling paths from the final description of a component: I want to design these paths by hand too, using the same CAD tool that I use for component design:</text:p>
      <text:list text:style-name="L3">
        <text:list-item>
          <text:p text:style-name="P14">Primarily because it is easier;</text:p>
        </text:list-item>
        <text:list-item>
          <text:p text:style-name="P14">but also because of the aforementioned “full control” requirement.</text:p>
        </text:list-item>
      </text:list>
      <text:p text:style-name="Text_20_body">The rough requirements for my manufacturing process and then the G-code generator look like this:</text:p>
      <text:p text:style-name="P15">a) Representation of all path elements required for the milling paths in the CAD program; currently these are:</text:p>
      <text:list text:style-name="L4">
        <text:list-item>
          <text:p text:style-name="P16">straight segments,</text:p>
        </text:list-item>
        <text:list-item>
          <text:p text:style-name="P16">circular segments and</text:p>
        </text:list-item>
        <text:list-item>
          <text:p text:style-name="P16">drilled holes.</text:p>
        </text:list-item>
      </text:list>
      <text:p text:style-name="Text_20_body">b) Representation <text:s/>of all values required for the milling paths (e.g. depth of a hole, height of a sweep) via parameters of graphic objects that</text:p>
      <text:list text:style-name="L5">
        <text:list-item>
          <text:p text:style-name="P17">can be easily specified via the CAD program,</text:p>
        </text:list-item>
        <text:list-item>
          <text:p text:style-name="P17">are visually distinguishable there; and</text:p>
        </text:list-item>
        <text:list-item>
          <text:p text:style-name="P17">can be read stably by the program from the generated DXF file;</text:p>
        </text:list-item>
      </text:list>
      <text:p text:style-name="Text_20_body">c) for each path, the addition of start and end points and a readable designation that can be used to link paths in a compound drawing.</text:p>
      <text:p text:style-name="Text_20_body">What I do <text:span text:style-name="T5">not </text:span>require is adaptability to different cutter diameters: the path must be redesigned for a different cutter.</text:p>
      <text:p text:style-name="Text_20_body">The following two chapters describe</text:p>
      <text:list text:style-name="L6">
        <text:list-item>
          <text:p text:style-name="P18">the process to generate the G-code files from a user perspective (chapter 4);</text:p>
        </text:list-item>
        <text:list-item>
          <text:p text:style-name="P18">and then the internal structure of the G-code generator (Chapter 5).</text:p>
        </text:list-item>
      </text:list>
      <text:h text:style-name="P11" text:outline-level="1"><text:bookmark-start text:name="__RefHeading___Toc5527_2169950967"/>4. User documentation<text:bookmark-end text:name="__RefHeading___Toc5527_2169950967"/></text:h>
      <text:p text:style-name="Text_20_body">Remark: In the following I will use „you“ when something is done by, well, you (or some other person); and I will use passive when the program does something. „You create a file“ is done by a person, „a file is created“ is done by a program.</text:p>
      <text:h text:style-name="Heading_20_2" text:outline-level="2"><text:bookmark-start text:name="__RefHeading___Toc5529_2169950967"/>4.1. Main process<text:bookmark-end text:name="__RefHeading___Toc5529_2169950967"/></text:h>
      <text:p text:style-name="Text_20_body">The design and manufacturing process with PathDxf2GCode is as follows:</text:p>
      <text:h text:style-name="Heading_20_3" text:outline-level="3"><text:bookmark-start text:name="__RefHeading___Toc5531_2169950967"/>4.1.1. Designing components<text:bookmark-end text:name="__RefHeading___Toc5531_2169950967"/></text:h>
      <text:p text:style-name="Text_20_body">You construct the components<text:note text:id="ftn1" text:note-class="footnote"><text:note-citation>1</text:note-citation><text:note-body><text:p text:style-name="Footnote">I use the (old-fashioned) Becker-CAD 2D software, creating „classic“ two-dimensional projection drawings.</text:p></text:note-body></text:note>. You designate <text:s/>these <text:span text:style-name="T5">construction layers</text:span><text:note text:id="ftn2" text:note-class="footnote"><text:note-citation>2</text:note-citation><text:note-body><text:p text:style-name="Footnote">In Becker-CAD, layers are called „Folien“.</text:p></text:note-body></text:note> with numbers without letters at the end, e.g. 2913 or 2913.4. <text:s/></text:p>
      <text:p text:style-name="Text_20_body">After this, you create separate path drawings for each “path dimension”, i.e. multiple milling runs for a project on the same parts. As a rule, only one path drawing (one mounting) is required for components made of flat profiles, while two path drawings are required for components made of angle profiles (which I usually designate as L and R). Several path drawings are also necessary for components that require several different milling cutters (e.g. wheels with a groove created with a T-milling cutter).</text:p>
      <text:h text:style-name="Heading_20_3" text:outline-level="3"><text:bookmark-start text:name="__RefHeading__1369_695252532"/>4.1.2. Constructing the project<text:bookmark-end text:name="__RefHeading__1369_695252532"/></text:h>
      <text:p text:style-name="Text_20_body">For my mechanical models, I will create a group of components together in one milling pass. Therefore, a <text:span text:style-name="T5">compound project design </text:span>is required that connects the milling paths for all these components.</text:p>
      <text:p text:style-name="Text_20_body">For this purpose, you create project path drawings for each path dimension, which collect the respective paths of all components to be produced on the sacrificial plate (mounting plate) and link them together consecutively for a milling run. The project path drawings also show the dimensioned arrangement of the profiles on the mounting plate as well as the position of the milling coordinate check point and origin.</text:p>
      <text:p text:style-name="Text_20_body">If you create only one component, the component path file is sufficient as input for the G-code generation.</text:p>
      <text:h text:style-name="Heading_20_3" text:outline-level="3"><text:bookmark-start text:name="__RefHeading___Toc5533_2169950967"/>4.1.3. Exporting path files<text:bookmark-end text:name="__RefHeading___Toc5533_2169950967"/></text:h>
      <text:p text:style-name="Text_20_body">You export the path drawings as DXF files. The directory structure can be arbitrary (see also /d parameters on p. <text:bookmark-ref text:reference-format="number" text:ref-name="__RefHeading__1108_1253387321"/><text:bookmark-ref text:reference-format="number" text:ref-name="__RefHeading__1108_1253387321"/><text:bookmark-ref text:reference-format="number" text:ref-name="__RefHeading__1108_1253387321"/><text:bookmark-ref text:reference-format="page" text:ref-name="__RefHeading__1108_1253387321">30</text:bookmark-ref>), but two structures have proven themselves in practice:</text:p>
      <text:list text:style-name="L7">
        <text:list-item>
          <text:p text:style-name="P19">For projects without pre-constructed components, a new directory is created, usually with the date in the directory name. All necessary path files are stored there.</text:p>
        </text:list-item>
        <text:list-item>
          <text:p text:style-name="P19">For pre-constructed components and projects assembled from them, you create</text:p>
          <text:list>
            <text:list-item>
              <text:p text:style-name="P19">the component paths in a component directory (or a few),</text:p>
            </text:list-item>
            <text:list-item>
              <text:p text:style-name="P19">the project path drawings in a project directory as above.</text:p>
            </text:list-item>
          </text:list>
        </text:list-item>
      </text:list>
      <text:p text:style-name="Text_20_body">For each DXF file, you also create and store a corresponding PDF file. You need this for preparing <text:soft-page-break/>and mounting the profiles, checking Z probe positions and overall visual control of the milling process.</text:p>
      <text:h text:style-name="Heading_20_3" text:outline-level="3"><text:bookmark-start text:name="__RefHeading___Toc5535_2169950967"/>4.1.4. Generate G-code<text:bookmark-end text:name="__RefHeading___Toc5535_2169950967"/></text:h>
      <text:p text:style-name="Text_20_body">You call PathDxf2GCode for each exported DXF file (see p. <text:bookmark-ref text:reference-format="page" text:ref-name="__RefHeading__1108_1253387321">30</text:bookmark-ref>). The result is a G-code file with the same name but with file extension <text:span text:style-name="T7">.gcode</text:span>.</text:p>
      <text:p text:style-name="Text_20_body">If errors occur during conversion, you must correct the path construction in the CAD program (see p. <text:bookmark-ref text:reference-format="page" text:ref-name="__RefHeading__1513_1392561347">31</text:bookmark-ref>) and export it again.</text:p>
      <text:h text:style-name="Heading_20_3" text:outline-level="3"><text:bookmark-start text:name="__RefHeading___Toc5537_2169950967"/>4.1.5. Milling<text:bookmark-end text:name="__RefHeading___Toc5537_2169950967"/></text:h>
      <text:p text:style-name="Text_20_body">For each G-code file you </text:p>
      <text:list text:style-name="L8">
        <text:list-item>
          <text:p text:style-name="P20">mount (or remount) the profiles accordingly (you can use the exported PDF files with the material descriptions and dimensions for this manual step), </text:p>
        </text:list-item>
        <text:list-item>
          <text:p text:style-name="P20">set the coordinate origin of the milling machine,</text:p>
        </text:list-item>
        <text:list-item>
          <text:p text:style-name="P20">and finally start the milling process.</text:p>
        </text:list-item>
      </text:list>
      <text:h text:style-name="Heading_20_2" text:outline-level="2"><text:bookmark-start text:name="__RefHeading___Toc5539_2169950967"/>4.2. Path drawings<text:bookmark-end text:name="__RefHeading___Toc5539_2169950967"/></text:h>
      <text:p text:style-name="Text_20_body">You create path drawings for individual components. If—as described on p. <text:bookmark-ref text:reference-format="page" text:ref-name="__RefHeading__1369_695252532">7</text:bookmark-ref>—you combine these into projects, you also have to create path drawings for the projects (which then contain partial path embeddings for the components—see p. <text:bookmark-ref text:reference-format="page" text:ref-name="__RefHeading__1263_1253387321">20</text:bookmark-ref>). This section describes the general elements of path drawings; their use is described in separate sections on components (p. <text:bookmark-ref text:reference-format="page" text:ref-name="__RefHeading__1371_695252532">25</text:bookmark-ref>) and projects (p. <text:bookmark-ref text:reference-format="page" text:ref-name="__RefHeading__1373_695252532">Fehler: Verweis nicht gefunden</text:bookmark-ref>).</text:p>
      <text:h text:style-name="Heading_20_3" text:outline-level="3"><text:bookmark-start text:name="__RefHeading__5930_1401316154"/>4.2.1. An example<text:bookmark-end text:name="__RefHeading__5930_1401316154"/></text:h>
      <text:p text:style-name="Text_20_body">Here is an example of a construction—in this case a component (drawing no. 2050+2051 K; K stands for “construction”):</text:p>
      <text:p text:style-name="Text_20_body"><draw:frame draw:style-name="fr1" draw:name="Grafik1" text:anchor-type="paragraph" svg:width="4.703cm" svg:height="5.29cm" draw:z-index="6"><draw:image xlink:href="Pictures/1000000100000125000001410BC64A3F.png" xlink:type="simple" xlink:show="embed" xlink:actuate="onLoad" draw:mime-type="image/png"/></draw:frame></text:p>
      <text:p text:style-name="Text_20_body">The drawing for the associated milling path (here a component path) looks like this (drawing no. 2051 P1; P is the abbreviation of “path”):</text:p>
      <text:p text:style-name="Text_20_body"><draw:frame draw:style-name="fr2" draw:name="Grafik2" text:anchor-type="paragraph" svg:width="7.343cm" svg:height="6.126cm" draw:z-index="33"><draw:image xlink:href="Pictures/10000001000001BF00000177ED49C7F1.png" xlink:type="simple" xlink:show="embed" xlink:actuate="onLoad" draw:mime-type="image/png"/></draw:frame><text:soft-page-break/></text:p>
      <text:p text:style-name="Text_20_body">Some important elements of each path are directly recognizable here:</text:p>
      <text:p text:style-name="Text_20_body">a) The start of a path (under the text M20x2...) is marked by a small circle with a diameter of 1mm. A number of parameters must be specified there, including the material (flat stock with dimensions 20x2), the upper edge of the profile (here T2 = 2 mm above the zero plane), the cutter diameter (O2=2mm) and others.</text:p>
      <text:p text:style-name="Text_20_body">The basic idea is that all essential parameters for milling are described at this one point.</text:p>
      <text:p text:style-name="Text_20_body">b) For contour milling paths—especially on straight edges—the component path is drawn along the component at the radius distance of the milling cutter (here 1 mm, due to the 2 mm end mill).</text:p>
      <text:p text:style-name="Text_20_body">c) Holes are drawn in the path with their actual diameter (the example shows a 2.5 mm hole at the tip of the component).</text:p>
      <text:p text:style-name="Text_20_body">d) The end of the path is marked by a circle with a diameter of 2 mm.</text:p>
      <text:p text:style-name="Text_20_body">e) The start and end markers are arranged so that the component path can be “stacked”: A copy of the component path—or another path for the same profile—can be placed with its start point on the previous end point. This enables simple construction of the project path drawings (see p. <text:bookmark-ref text:reference-format="page" text:ref-name="__RefHeading__1245_1253387321">27</text:bookmark-ref>). </text:p>
      <text:p text:style-name="Text_20_body">f) A dash-dotted <text:span text:style-name="T5">proxy line</text:span><text:span text:style-name="T8"> (_ . _) from </text:span>the start to the end circle is intended to be copied into a project drawing using this component. The proxy line can be a straight line or an arc, whatever is more pleasing visually. The &gt; sign in front of the path name is explained in the section on subpaths (see p. <text:bookmark-ref text:reference-format="page" text:ref-name="__RefHeading__1263_1253387321">20</text:bookmark-ref>). Further path parameters are specified on the line, which are used to check the embedding in project path drawings (here, a material specification indicated by M).</text:p>
      <text:p text:style-name="Text_20_body">g) Line types indicate the type of movement:</text:p>
      <text:list text:style-name="L9">
        <text:list-item>
          <text:p text:style-name="P21">____ Continuous line = milling (milling movements)</text:p>
        </text:list-item>
        <text:list-item>
          <text:p text:style-name="P21">_ _ _ Dashed line = do not mill (sweep)</text:p>
        </text:list-item>
        <text:list-item>
          <text:p text:style-name="P21">_.._.._ Dash-double dotted line = half milling; common uses are:</text:p>
          <text:list>
            <text:list-item>
              <text:p text:style-name="P21">At the edges where the profile continues, this prevents it from being “milled off” and thus losing the mounting. In the example above, this can be seen at the top and bottom of the non-beveled segments.</text:p>
            </text:list-item>
            <text:list-item>
              <text:p text:style-name="P21">In other places, it is used to mill “markings” into the material for subsequent processing—in the example for the narrow slots to be made with the band saw for the key tube to be inserted.</text:p>
            </text:list-item>
          </text:list>
        </text:list-item>
        <text:list-item>
          <text:p text:style-name="P21">_ _ . _ _ Double-dash dotted line = support bar milling; see p. <text:bookmark-ref text:reference-format="page" text:ref-name="__RefHeading__5343_207922309">19</text:bookmark-ref>.</text:p>
        </text:list-item>
      </text:list>
      <text:p text:style-name="Text_20_body"><text:soft-page-break/>h) The path diagram contains dimensions of the external dimensions in order to estimate how much material is required and to ensure that the component can be placed within the working area of the milling machine.</text:p>
      <text:h text:style-name="Heading_20_3" text:outline-level="3"><text:bookmark-start text:name="__RefHeading__8255_1487761246"/>4.2.2. Path names<text:bookmark-end text:name="__RefHeading__8255_1487761246"/></text:h>
      <text:p text:style-name="P22">Each path must have a name that matches the path name pattern passed with option /n. T<text:span text:style-name="T9">h</text:span>e default value for this option is <text:span text:style-name="T10">([0-9]{4})[.]([0-9]+)([A-Z])</text:span><text:span text:style-name="T11">, thus a standard path name must consist of three groups, with a period between the first two:</text:span></text:p>
      <text:p text:style-name="P23"><text:tab/>4-digit-number . number uppercase-letter(only A-Z)</text:p>
      <text:p text:style-name="P23">Two allowed path names that match this pattern are 1234.1A or 2055.999B. Path names which are not allowed are e.g. 2345 (period and rest is missing), 3456.9 (uppercase letter is missing), 4567.8Ä (umlauts are not allowed) or 5678.9AB (two letters at the end).</text:p>
      <text:p text:style-name="P22"><text:span text:style-name="T11">You can use the options </text:span><text:span text:style-name="T12">/n</text:span><text:span text:style-name="T11"> and </text:span><text:span text:style-name="T12">/p</text:span><text:span text:style-name="T11"> to specify other path name patterns (see p. </text:span><text:span text:style-name="T11"><text:bookmark-ref text:reference-format="page" text:ref-name="__RefHeading__1108_1253387321">30</text:bookmark-ref></text:span><text:span text:style-name="T11">). The patterns must correspond with each other, as they are used to find the DXF files that contains paths in subpath embeddings (for details, see p. </text:span><text:span text:style-name="T11"><text:bookmark-ref text:reference-format="page" text:ref-name="__RefHeading__1263_1253387321">20</text:bookmark-ref></text:span><text:span text:style-name="T11">).</text:span></text:p>
      <text:h text:style-name="Heading_20_3" text:outline-level="3"><text:bookmark-start text:name="__RefHeading___Toc5541_2169950967"/>4.2.3. Path layers<text:bookmark-end text:name="__RefHeading___Toc5541_2169950967"/></text:h>
      <text:p text:style-name="Text_20_body">What is not directly visible in the path drawing: The path lines and markings (but not the representative line for naming—see p. <text:bookmark-ref text:reference-format="page" text:ref-name="__RefHeading__1263_1253387321">20</text:bookmark-ref>) must be on a layer<text:note text:id="ftn3" text:note-class="footnote"><text:note-citation>3</text:note-citation><text:note-body><text:p text:style-name="Footnote">In Becker-CAD: „Folie“.</text:p></text:note-body></text:note> that is named with the path name, in this case 2051.2.</text:p>
      <text:p text:style-name="Text_20_body">As quite a few layers are created in a CAD file in this way (one for each milling path, i.e. usually one or two for each component), these path layers must be organized sensibly. I follow the following structure:</text:p>
      <text:list text:style-name="L10">
        <text:list-item>
          <text:p text:style-name="P24">There is a main layer „Pfade“ („Paths“).</text:p>
        </text:list-item>
        <text:list-item>
          <text:p text:style-name="P24">A path drawing for the designs of drawings 1234 K receives a <text:span text:style-name="T5">parent path layer </text:span>1234.** under “Pfade” (the two asterisks indicate path layers, in contrast to construction layers, which are grouped under 1234.*). If a drawing comprises several drawing numbers, e.g. 1234 K and 2345 K, separate construction path layers 1234.** and 2345.** are created for them.</text:p>
        </text:list-item>
        <text:list-item>
          <text:p text:style-name="P24">The <text:span text:style-name="T5">component path layers </text:span>for e.g. components 1234.1, 1234.2 etc. are located below the respective parent path layer. For components with only one path layer, the component path layer is named 1234.1P; for components made of angle profiles that require two layers, 1234.2L and 1234.2R are used. In other cases (e.g. several paths due to tool changes), other letters can also be appended. Layer names without letters at the end (e.g. 1234.1) are reserved for the construction layers.</text:p>
        </text:list-item>
      </text:list>
      <text:p text:style-name="Text_20_body">The path can be checked visually by displaying only the component path layer. For the component above it looks like this:</text:p>
      <text:p text:style-name="Text_20_body"><draw:frame draw:style-name="fr2" draw:name="Grafik3" text:anchor-type="paragraph" svg:width="6.098cm" svg:height="6.216cm" draw:z-index="32"><draw:image xlink:href="Pictures/10000001000001800000017F3FE38CE1.png" xlink:type="simple" xlink:show="embed" xlink:actuate="onLoad" draw:mime-type="image/png"/></draw:frame><text:soft-page-break/></text:p>
      <text:p text:style-name="Text_20_body">I place the proxy path (the dash-dotted line) in the **-path layer of the component (one could place it in any layer; when copying to a project path drawing, you have to place it in the project path layer there anyway).</text:p>
      <text:h text:style-name="Heading_20_3" text:outline-level="3"><text:bookmark-start text:name="__RefHeading__1305_1253387321"/>4.2.4. Structure of a path construction<text:bookmark-end text:name="__RefHeading__1305_1253387321"/></text:h>
      <text:p text:style-name="Text_20_body">Following the exemplary overview in the last sections, here is a complete description of how a path construction must be structured so that it can be processed by PathDxf2GCode.</text:p>
      <text:p text:style-name="Text_20_body">Each path construction has the following structure:</text:p>
      <text:p text:style-name="P25">Path with start and end markers and the following path elements:</text:p>
      <text:list xml:id="list2002977620" text:style-name="L11">
        <text:list-item>
          <text:list>
            <text:list-item>
              <text:list>
                <text:list-item>
                  <text:p text:style-name="P26">Sweeps</text:p>
                </text:list-item>
                <text:list-item>
                  <text:p text:style-name="P26">Milling chains with</text:p>
                </text:list-item>
              </text:list>
            </text:list-item>
          </text:list>
        </text:list-item>
      </text:list>
      <text:list text:style-name="L12">
        <text:list-item>
          <text:list>
            <text:list-item>
              <text:list>
                <text:list-item>
                  <text:p text:style-name="P27">milling segments: Straight lines and arcs, either full-depth or half-depth</text:p>
                </text:list-item>
              </text:list>
            </text:list-item>
          </text:list>
        </text:list-item>
      </text:list>
      <text:list text:continue-list="list2002977620" text:style-name="L11">
        <text:list-item>
          <text:list>
            <text:list-item>
              <text:list>
                <text:list-item>
                  <text:p text:style-name="P26">Drilled holes</text:p>
                </text:list-item>
                <text:list-item>
                  <text:p text:style-name="P26">Helical circles</text:p>
                </text:list-item>
                <text:list-item>
                  <text:p text:style-name="P26">Subpath embeddings</text:p>
                </text:list-item>
                <text:list-item>
                  <text:p text:style-name="P26">Z Probes</text:p>
                </text:list-item>
              </text:list>
            </text:list-item>
          </text:list>
        </text:list-item>
      </text:list>
      <text:p text:style-name="Text_20_body">Paths and their elements have parameters that control milling. For example, milling segments have a milling depth, milling chains have an infeed, helical circles have a diameter. Some of the parameters are specified directly geometrically (such as the hole diameter), others are determined by texts that lie above the respective element (see p. <text:bookmark-ref text:reference-format="page" text:ref-name="__RefHeading__1303_1253387321">12</text:bookmark-ref>).</text:p>
      <text:p text:style-name="Text_20_body">Some parameters can be inherited via the path structure. For example, the milling depth for an entire component can be determined for the path; however, if individual holes are to be milled as blind holes, the milling depth can be changed locally. </text:p>
      <text:p text:style-name="Text_20_body">The following sections describe the path elements and their parameters as well as the options for defining them in detail.</text:p>
      <text:h text:style-name="Heading_20_3" text:outline-level="3"><text:bookmark-start text:name="__RefHeading__1303_1253387321"/><text:soft-page-break/>4.2.5. Parameter texts<text:bookmark-end text:name="__RefHeading__1303_1253387321"/></text:h>
      <text:h text:style-name="Heading_20_4" text:outline-level="4"><text:bookmark-start text:name="__RefHeading___Toc5543_2169950967"/>4.2.5.1. Structure of parameter texts<text:bookmark-end text:name="__RefHeading___Toc5543_2169950967"/></text:h>
      <text:p text:style-name="Text_20_body">Formally, a parameter text consists of a sequence of parameter definitions, each of which consists of a parameter letter and a value. There must be no space between the letter and the value; the individual definitions are separated by line breaks or spaces. If a value becomes very long (this can easily happen with variable definitions; see p. <text:bookmark-ref text:reference-format="page" text:ref-name="__RefHeading__7148_1371230396">24</text:bookmark-ref>), it can be broken up with a tilde (~) and possibly a space, e.g. here in the definition of the value list for the variable L:</text:p>
      <text:p text:style-name="P28">O2 T2<text:line-break/>S15 M...x2<text:line-break/>:L5,10,15,~<text:line-break/> <text:s text:c="2"/>20,25</text:p>
      <text:p text:style-name="Text_20_body">The anchor point of a text must currently be located</text:p>
      <text:list text:style-name="L13">
        <text:list-item>
          <text:p text:style-name="P29">at the bottom left</text:p>
        </text:list-item>
        <text:list-item>
          <text:p text:style-name="P29"><text:span text:style-name="T13">or </text:span>at the bottom right</text:p>
        </text:list-item>
        <text:list-item>
          <text:p text:style-name="P29">or at the center.</text:p>
        </text:list-item>
      </text:list>
      <text:p text:style-name="Text_20_body"><text:span text:style-name="T13">If the anchor is not at the center, </text:span>the text must not be rotated. <text:span text:style-name="T13">Finally, it must not be </text:span>oriented from bottom to top or from right to left. <text:s/>In practice, it is best to choose the anchor point <text:span text:style-name="T13">at </text:span>the <text:span text:style-name="T13">center</text:span>, because then the center of the overlapping circle of the text does not move when scaling the text, <text:span text:style-name="T13">or when the path, together with its text, is rotated by 90°</text:span>.</text:p>
      <text:p text:style-name="Text_20_body">The images <text:span text:style-name="T14">shown in previous sections</text:span> show definitions of one (N1), two (&gt;8998.2P M20x0.1) and eight (see the image on p. <text:bookmark-ref text:reference-format="page" text:ref-name="__RefHeading__1305_1253387321">11</text:bookmark-ref>) parameters. Most parameters are numerical values; they can be written with a point or a comma as a decimal separator. Material specifications can be any character string, path specifications after &gt; must correspond to the regular expression for paths (see p. <text:bookmark-ref text:reference-format="page" text:ref-name="__RefHeading__1245_1253387321">27</text:bookmark-ref>).</text:p>
      <text:h text:style-name="Heading_20_4" text:outline-level="4"><text:bookmark-start text:name="__RefHeading___Toc5545_2169950967"/>4.2.4.2. Assignment of parameter texts with overlapping only <text:bookmark-end text:name="__RefHeading___Toc5545_2169950967"/></text:h>
      <text:p text:style-name="Text_20_body">Parameter texts must be placed in such a way that they overlap “their element”. Care must be taken to ensure that</text:p>
      <text:list text:style-name="L14">
        <text:list-item>
          <text:p text:style-name="P30">the text is also in the path layer;</text:p>
        </text:list-item>
        <text:list-item>
          <text:p text:style-name="P30">if possible, only one text overlaps the element. However, PathDxf2GCode attempts to resolve multiple overlaps in this way: A text is assigned to the closest circle if possible; if there is no overlapping circle, to the closest arc; if none is found either, to the closest straight line.</text:p>
        </text:list-item>
        <text:list-item>
          <text:p text:style-name="P30">the overlap is wide enough: The overlap is checked by a circle around the center of the text, which, however, does not extend over the full width of the text, especially in the case of wide texts.</text:p>
        </text:list-item>
      </text:list>
      <text:h text:style-name="Heading_20_4" text:outline-level="4"><text:bookmark-start text:name="__RefHeading___Toc5547_2169950967"/>4.2.5.3. Some problematic cases and solutions<text:bookmark-end text:name="__RefHeading___Toc5547_2169950967"/></text:h>
      <text:p text:style-name="Text_20_body">Here are some examples of problem cases and their solutions:</text:p>
      <text:list text:style-name="L15">
        <text:list-item>
          <text:p text:style-name="P31">In the following example, the text N1 should refer to the line below; however, due to the preference for circles, this only works if the text is placed exclusively above the line, i.e., it does not intersect the circle:</text:p>
        </text:list-item>
        <text:list-item>
          <text:p text:style-name="P31"><draw:frame draw:style-name="fr1" draw:name="Grafik5" text:anchor-type="paragraph" svg:width="6.95cm" svg:height="3.621cm" draw:z-index="34"><draw:image xlink:href="Pictures/200000070000518700002C7D83E120FA.svm" xlink:type="simple" xlink:show="embed" xlink:actuate="onLoad" draw:mime-type="image/x-svm"/><draw:image xlink:href="Pictures/10000001000003DB0000021B070A6619.png" xlink:type="simple" xlink:show="embed" xlink:actuate="onLoad" draw:mime-type="image/png"/></draw:frame><text:soft-page-break/>-The “search circle” (added here by hand) of the following wide text is smaller than the text: Although the P overlaps the line on the right, PathDxf2GCode does not find this assignment. This can be remedied by moving the text slightly to the right:</text:p>
        </text:list-item>
      </text:list>
      <text:p text:style-name="Text_20_body"><draw:frame draw:style-name="fr2" draw:name="Grafik6" text:anchor-type="paragraph" svg:width="5.985cm" svg:height="3.789cm" draw:z-index="39"><draw:image xlink:href="Pictures/1000000100000173000000F0D124FC84.png" xlink:type="simple" xlink:show="embed" xlink:actuate="onLoad" draw:mime-type="image/png"/></draw:frame></text:p>
      <text:h text:style-name="Heading_20_4" text:outline-level="4"><text:bookmark-start text:name="__RefHeading___Toc5549_2169950967"/>4.2.5.4. Assignment of parameter texts with parameter text layers<text:bookmark-end text:name="__RefHeading___Toc5549_2169950967"/></text:h>
      <text:p text:style-name="Text_20_body">In some cases, correct assignment is only possible through suitable overlapping—for example, if a circle is too close to the element that is to be provided with a parameter text. A solution to this is a separate parameter text layer in which both the element and the parameter text are placed. The layer name must be structured as follows:</text:p>
      <text:p text:style-name="P32">Path-layer-name ~ Lowercase-letters</text:p>
      <text:p text:style-name="P33">Here is an example: The following construction connects a hole with a step that surrounds part of the hole:</text:p>
      <text:p text:style-name="P33"><draw:frame draw:style-name="fr2" draw:name="Grafik10" text:anchor-type="paragraph" svg:width="6.699cm" svg:height="4.664cm" draw:z-index="38"><draw:image xlink:href="Pictures/2000000700002AD50000202BC70A36AF.svm" xlink:type="simple" xlink:show="embed" xlink:actuate="onLoad" draw:mime-type="image/x-svm"/><draw:image xlink:href="Pictures/10000001000002070000018624B21CA7.png" xlink:type="simple" xlink:show="embed" xlink:actuate="onLoad" draw:mime-type="image/png"/></draw:frame></text:p>
      <text:p text:style-name="P33">A helix hole and an arc are required as a milling path, whereby the arc is only milled up to the middle of the profile due to the parameter specification B1. In the following drawing, all path segments and also the parameter texts are located on the path layer 2916.1P, which is shown in a red color—including the arc and the text B1. Without a special assignment, the text is “caught” by the circle of the helix hole instead of being assigned to the arc:</text:p>
      <text:p text:style-name="P33"><draw:frame draw:style-name="fr1" draw:name="Grafik11" text:anchor-type="paragraph" svg:width="6.5cm" svg:height="4.314cm" draw:z-index="37"><draw:image xlink:href="Pictures/2000000700001C1E00001305522408FB.svm" xlink:type="simple" xlink:show="embed" xlink:actuate="onLoad" draw:mime-type="image/x-svm"/><draw:image xlink:href="Pictures/1000000100000155000000E781BA2152.png" xlink:type="simple" xlink:show="embed" xlink:actuate="onLoad" draw:mime-type="image/png"/></draw:frame><text:soft-page-break/></text:p>
      <text:p text:style-name="P34">You can see this in the output of PathDxf2GCode with option -x B1:</text:p>
      <text:p text:style-name="P34"/>
      <text:p text:style-name="P28">Object<text:line-break/> <text:s text:c="2"/>Circle LAYER=2916_1P CODENAME=CIRCLE TYPE=Circle LINETYPE=…<text:line-break/>is assigned text ''B1' @ [77.900|122.750] d=2.343'</text:p>
      <text:p text:style-name="P33">This can be remedied by assigning both the arc and text B1 to a separate parameter text layer<text:line-break/> <text:span text:style-name="T15">2916.1P~A</text:span> (which is shwon here in the customary blue color). With this, a reliable assignment of the B1 text to the arc is possible:</text:p>
      <text:p text:style-name="P33"><draw:frame draw:style-name="fr1" draw:name="Grafik12" text:anchor-type="paragraph" svg:width="6.597cm" svg:height="4.722cm" draw:z-index="40"><draw:image xlink:href="Pictures/2000000700001C5D0000129CF20D9B77.svm" xlink:type="simple" xlink:show="embed" xlink:actuate="onLoad" draw:mime-type="image/x-svm"/><draw:image xlink:href="Pictures/1000000100000158000000E2815F6383.png" xlink:type="simple" xlink:show="embed" xlink:actuate="onLoad" draw:mime-type="image/png"/></draw:frame></text:p>
      <text:p text:style-name="Text_20_body">The output of PathDxf2GCode now shows that the text is assigned to the sheet</text:p>
      <text:p text:style-name="P28">Object<text:line-break/> <text:s text:c="2"/>Arc LAYER=2916_2P~A CODENAME=ARC TYPE=Arc LINETYPE=CONTINUOUS%1 …<text:line-break/>is assigned text ''B1' @ [77.900|122.750] d=2.343'</text:p>
      <text:h text:style-name="Heading_20_3" text:outline-level="3"><text:bookmark-start text:name="__RefHeading___Toc5551_2169950967"/>4.2.6. Geometry of the milling parameters<text:bookmark-end text:name="__RefHeading___Toc5551_2169950967"/></text:h>
      <text:p text:style-name="Text_20_body">The following diagram shows the geometric milling parameters, which are discussed below. The B value, like all other values, is measured from the 0 height upwards; if “undercutting” is to be carried out as shown here, B must therefore have a negative value:</text:p>
      <text:p text:style-name="Text_20_body"><draw:frame draw:style-name="fr2" draw:name="Grafik7" text:anchor-type="paragraph" svg:width="8.797cm" svg:height="8.243cm" draw:z-index="41"><draw:image xlink:href="Pictures/2000000700006C3C00006648D2CB3CFF.svm" xlink:type="simple" xlink:show="embed" xlink:actuate="onLoad" draw:mime-type="image/x-svm"/><draw:image xlink:href="Pictures/100000010000051E000004D67F4F068B.png" xlink:type="simple" xlink:show="embed" xlink:actuate="onLoad" draw:mime-type="image/png"/></draw:frame><text:soft-page-break/></text:p>
      <text:h text:style-name="Heading_20_3" text:outline-level="3"><text:bookmark-start text:name="__RefHeading__1649_1253387321"/>4.2.7. Paths<text:bookmark-end text:name="__RefHeading__1649_1253387321"/></text:h>
      <text:p text:style-name="Text_20_body">A path is the basic element for describing a milling process. PathDxf2GCode can only generate a G-code file for an entire path. A path consists of individual path elements that graphically describe the movement of a milling tool. These elements must therefore connect directly to each other, gaps must be bridged by sweeps. The following are permitted as graphical path elements:</text:p>
      <text:list text:style-name="L16">
        <text:list-item>
          <text:p text:style-name="P35">Straight lines (DXF: LINE)</text:p>
        </text:list-item>
        <text:list-item>
          <text:p text:style-name="P35">Arcs (DXF: ARC)</text:p>
        </text:list-item>
        <text:list-item>
          <text:p text:style-name="P35">Circles (DXF: CIRCLE)</text:p>
        </text:list-item>
      </text:list>
      <text:p text:style-name="Text_20_body">Texts (DXF: TEXT and MTEXT) are also used to control the parameters of the elements. All other elements in a DXF file are ignored without an error message. If such other elements (e.g. splines) are parts of paths, PathDxf2GCode does not see a continuous path and the error message “No further segments found after point ...” is usually displayed (see also p. <text:bookmark-ref text:reference-format="page" text:ref-name="__RefHeading__1951_1392561347">31</text:bookmark-ref>).</text:p>
      <text:p text:style-name="Text_20_body">The start and end of a path must be specially marked. Small circles with line type dash-double dash (DXF: PHANTOM) are used for this purpose:</text:p>
      <text:list text:style-name="L17">
        <text:list-item>
          <text:p text:style-name="P36">The start is marked by a circle with a diameter of 1 mm;</text:p>
        </text:list-item>
        <text:list-item>
          <text:p text:style-name="P36">the end is marked by a circle with a diameter of 2 mm;</text:p>
        </text:list-item>
        <text:list-item>
          <text:p text:style-name="P36"/>
        </text:list-item>
      </text:list>
      <text:p text:style-name="Text_20_body">The following values can be defined at the start of the path (i.e. in a parameter text above the 1 mm start circle) (“TOMBIFDUPSRAW”):</text:p>
      <text:list text:style-name="L18">
        <text:list-item>
          <text:p text:style-name="P37">T<text:note text:id="ftn4" text:note-class="footnote"><text:note-citation>4</text:note-citation><text:note-body><text:p text:style-name="Footnote">The letters are derived from the English words: T = Top; O is a diameter symbol; M = „Material“; F = „Feed“; I = „Infeed“; B = „Bottom“; D = „Depth“; S = „Sweep“; N = „Numbering“; P and U from „Support“.</text:p></text:note-body></text:note>: Material thickness in mm; mandatory if not specified individually for all segments.</text:p>
        </text:list-item>
        <text:list-item>
          <text:p text:style-name="P37">O: Cutter diameter in mm; mandatory.</text:p>
        </text:list-item>
        <text:list-item>
          <text:p text:style-name="P37">M: Material specification; mandatory. </text:p>
        </text:list-item>
        <text:list-item>
          <text:p text:style-name="P37">F: Milling speed in mm/min; must be specified either in the path or as command line <text:soft-page-break/>parameter /f (see p. <text:bookmark-ref text:reference-format="page" text:ref-name="__RefHeading__1108_1253387321">30</text:bookmark-ref>).</text:p>
        </text:list-item>
        <text:list-item>
          <text:p text:style-name="P37">I: Infeed in mm; must be specified either with the path or individually for milling chains and helical circles.</text:p>
        </text:list-item>
        <text:list-item>
          <text:p text:style-name="P37">B: Milling depth (above 0-level); milling segments, helical circles and drilled holes are milled to this depth if no other B value is specified.</text:p>
        </text:list-item>
        <text:list-item>
          <text:p text:style-name="P37">D: Marking depth; marking segments are milled to this depth unless a different D value is specified.</text:p>
        </text:list-item>
      </text:list>
      <text:p text:style-name="P38">If both B and D are specified, then D must be greater than B. This only serves to ensure that D and B cannot be “misused”: B should always be the “deep milling depth”, D always the “high marking depth”. However, this is not checked when specifying B or D on individual segments (see p. <text:bookmark-ref text:reference-format="page" text:ref-name="__RefHeading__3017_1578383688">17</text:bookmark-ref>)—so you can “play tricks” with B and D there. </text:p>
      <text:list text:continue-numbering="true" text:style-name="L18">
        <text:list-item>
          <text:p text:style-name="P37">P: Support bar length; see description on p. <text:bookmark-ref text:reference-format="page" text:ref-name="__RefHeading__5343_207922309">19</text:bookmark-ref>.</text:p>
        </text:list-item>
        <text:list-item>
          <text:p text:style-name="P37">U: Support bar distance; see description on p. <text:bookmark-ref text:reference-format="page" text:ref-name="__RefHeading__5343_207922309">19</text:bookmark-ref>.</text:p>
        </text:list-item>
        <text:list-item>
          <text:p text:style-name="P37">S: Sweep height; sweeps are made at this height unless a different S value is specified for a sweep or a milling segment. <text:s/>If S is not specified at a path,</text:p>
          <text:list>
            <text:list-item>
              <text:p text:style-name="P37">subpaths use the sum of <text:s/>T and O—the intention is to sweep „a little bit above T“. Make sure that the whole working area of a path is free of fastening objects if you rely on this default. The sum of T and O is also used when the /c command line option is specified (see p. <text:bookmark-ref text:reference-format="page" text:ref-name="__RefHeading__1108_1253387321">30</text:bookmark-ref>);</text:p>
            </text:list-item>
            <text:list-item>
              <text:p text:style-name="P37">the top level path uses the valud of the /o command line option (see p. <text:bookmark-ref text:reference-format="page" text:ref-name="__RefHeading__1108_1253387321">30</text:bookmark-ref>).</text:p>
            </text:list-item>
          </text:list>
        </text:list-item>
        <text:list-item>
          <text:p text:style-name="P37"><text:span text:style-name="T16">R: File name suffix; this text is added to the names of the generated files. The purpose is to provide information about the variable assignments in the file name – see p. </text:span><text:span text:style-name="T16"><text:bookmark-ref text:reference-format="page" text:ref-name="__RefHeading__5504_585828919">24</text:bookmark-ref></text:span><text:span text:style-name="T16">. The default value is an empty text, i.e. the names of the generated files are taken directly from the name of the DXF file.</text:span></text:p>
        </text:list-item>
        <text:list-item>
          <text:p text:style-name="P37"><text:span text:style-name="T16">Z: Measuring speed in mm/min; if the value is not specified, the current F value ist used (however, this value is typically much too large!</text:span><text:span text:style-name="T16"><text:note text:id="ftn5" text:note-class="footnote"><text:note-citation>5</text:note-citation><text:note-body><text:p text:style-name="Footnote">My experience is that with F=150 mm/min, the deceleration of the milling head is so small that the milling bit goes into my aluminum pieces 0.3 mm or more. With F=50 mm/min, Z measurements are acceptable.</text:p></text:note-body></text:note></text:span><text:span text:style-name="T16">).</text:span></text:p>
        </text:list-item>
        <text:list-item>
          <text:p text:style-name="P39">A: Greatest helix diameter in mm; if A is not given, the value 4 <text:span text:style-name="T17">·</text:span><text:span text:style-name="T18"> O is used. For rationale and usage of this value see p. </text:span><text:span text:style-name="T18"><text:bookmark-ref text:reference-format="page" text:ref-name="__RefHeading__4890_1453201033">18</text:bookmark-ref></text:span><text:span text:style-name="T18">.</text:span></text:p>
        </text:list-item>
        <text:list-item>
          <text:p text:style-name="P39"><text:span text:style-name="T18">W: First milling depth for sweepless milling (see p. </text:span><text:span text:style-name="T18"><text:bookmark-ref text:reference-format="page" text:ref-name="__RefHeading__6527_207922309">20</text:bookmark-ref></text:span><text:span text:style-name="T18">). If W is provided at the path start, all straight and arc milling segments are milled sweeplessly (explicit sweeps, however, are done as usual). For the following mill traversals, the milling bit is lowered by the infeed I; thus, a down-mill must be possible, or the lowering—i.e., the start of the milling chain (see p. </text:span><text:span text:style-name="T18"><text:bookmark-ref text:reference-format="page" text:ref-name="__RefHeading__3017_1578383688">17</text:bookmark-ref></text:span><text:span text:style-name="T18">)—must be in an open area.</text:span></text:p>
        </text:list-item>
      </text:list>
      <text:h text:style-name="P40" text:outline-level="3"><text:bookmark-start text:name="__RefHeading___Toc5553_2169950967"/>4.2.8. <text:span text:style-name="T19">Specifying path parameters with a </text:span><text:span text:style-name="T20">@ </text:span><text:span text:style-name="T19">reference</text:span><text:bookmark-end text:name="__RefHeading___Toc5553_2169950967"/></text:h>
      <text:p text:style-name="P41">In many cases, different paths in a drawing have identical parameters, for example the paths on the left and right side of an angle profile, or multiple parts routed from the same profile. In such cases, instead of repeating the parameters at each starting point, one can fully define them at only one path and then reference this path from others by specifying @<text:span text:style-name="T5">pathname</text:span> at their starting poitns. Here is an example:</text:p>
      <text:p text:style-name="P42"><text:soft-page-break/><draw:frame draw:style-name="fr3" draw:name="Bild1" text:anchor-type="as-char" svg:width="6.669cm" svg:height="6.849cm" draw:z-index="0"><draw:image xlink:href="Pictures/1000000000000274000002857638C9C3.png" xlink:type="simple" xlink:show="embed" xlink:actuate="onLoad" draw:mime-type="image/png"/></draw:frame></text:p>
      <text:p text:style-name="P43"><text:span text:style-name="T21">Such a @ reference must not contain other parameters, and the referenced path must be in the same DXF file as the reference</text:span>.</text:p>
      <text:h text:style-name="Heading_20_3" text:outline-level="3"><text:bookmark-start text:name="__RefHeading___Toc5555_2169950967"/>4.2.<text:span text:style-name="T22">9</text:span>. Sweeps<text:bookmark-end text:name="__RefHeading___Toc5555_2169950967"/></text:h>
      <text:p text:style-name="Text_20_body">Sweeps are represented by dashed (DXF: DASHED) or long dashed (DXF: HIDDEN) lines. The following parameters can be specified for dashed sweeps:</text:p>
      <text:list text:style-name="L19">
        <text:list-item>
          <text:p text:style-name="P44">S: Sweep height; if not specified, the value for the path is used.</text:p>
        </text:list-item>
        <text:list-item>
          <text:p text:style-name="P44">N: Sequence for branches; see p. <text:bookmark-ref text:reference-format="page" text:ref-name="__RefHeading__1863_2102980402">25</text:bookmark-ref>.</text:p>
        </text:list-item>
      </text:list>
      <text:p text:style-name="Text_20_body">Long-dashed sweeps do not accept parameter texts. They are helpful in situations where a path construction contains many texts, especially for project constructions, which usually only contain partial path embeddings (see p. <text:bookmark-ref text:reference-format="page" text:ref-name="__RefHeading__1263_1253387321">20</text:bookmark-ref><text:s/>and <text:bookmark-ref text:reference-format="page" text:ref-name="__RefHeading__1245_1253387321">27</text:bookmark-ref>).</text:p>
      <text:p text:style-name="Text_20_body">Sweeps can be drawn as straight lines or as arcs. However, in both cases the milling bit will travel in a straight line from the start to the end point. For quicker operation, multiple subsequent sweeps that are at or above the S height of the complete path (which is assumed to be above all possible obstacles) are aggregated to a single sweep.</text:p>
      <text:p text:style-name="Text_20_body">The speed of a sweep cannot be defined in the G-code, it is a property of the milling machine. However, PathDxf2GCode needs this speed for the statistics calculation, so it must be specified as a /v command line option (see p. <text:bookmark-ref text:reference-format="page" text:ref-name="__RefHeading__1108_1253387321">30</text:bookmark-ref>).</text:p>
      <text:h text:style-name="Heading_20_3" text:outline-level="3"><text:bookmark-start text:name="__RefHeading__3017_1578383688"/>4.2.<text:span text:style-name="T22">10</text:span>. Milling chains and milling segments<text:bookmark-end text:name="__RefHeading__3017_1578383688"/></text:h>
      <text:p text:style-name="Text_20_body">Milling segments are the main “workhorses” of a G-code file. As a rule, several milling passes must be made for each milling segment, in which the milling head is advanced by a small infeed each time. PathDxf2GCode combines consecutive milling segments into milling chains and performs the milling passes for each entire milling chain. Milling segments are only straight sections and arcs; a milling chain ends at drilled holes, helical circles, sweeps, and subpaths. Milling chains can consist of several “branches” (“star chains”), see p. <text:bookmark-ref text:reference-format="page" text:ref-name="__RefHeading__1863_2102980402">25</text:bookmark-ref>.</text:p>
      <text:p text:style-name="Text_20_body">The milling passes for a milling chain are alternately traversed in forward and backward direction. Segments that have been milled to their final depth are bypassed by a sweep at the current sweep depth.</text:p>
      <text:p text:style-name="Text_20_body">The optional parameters of a milling chain are specified at the first milling segment; they then apply to the entire chain:</text:p>
      <text:list xml:id="list2257399988" text:style-name="L20">
        <text:list-item>
          <text:p text:style-name="P45"><text:soft-page-break/>I: Infeed in mm; if this specification is missing, the I value of the path is used.</text:p>
        </text:list-item>
        <text:list-item>
          <text:p text:style-name="P45">W: <text:span text:style-name="T23">First milling depth for sweepless milling (see p. </text:span><text:span text:style-name="T23"><text:bookmark-ref text:reference-format="page" text:ref-name="__RefHeading__6527_207922309">20</text:bookmark-ref></text:span><text:span text:style-name="T23">); if this specification is missing, but is present at the path start, that information will be used</text:span>.</text:p>
        </text:list-item>
      </text:list>
      <text:p text:style-name="Text_20_body">Milling segments can be drawn with three line types:</text:p>
      <text:list text:style-name="L21">
        <text:list-item>
          <text:p text:style-name="P46">as continuous lines (DXF: CONTINUOUS); for these milling passes, the milling depth is specified with the B parameter;</text:p>
        </text:list-item>
        <text:list-item>
          <text:p text:style-name="P46">as dash-double-dotted lines (DXF: DIVIDE) for “marking segments”; for these milling movements, the milling depth is defined with the D parameter.</text:p>
        </text:list-item>
        <text:list-item>
          <text:p text:style-name="P46">As ndouble-dash-dotted lines (DXF: CENTER) for milling of support bars; for these lines, the upper rim of the support bars is defined with D, whereas the level of the troughs in between is defined by B. For more information see p. <text:bookmark-ref text:reference-format="page" text:ref-name="__RefHeading__5343_207922309">19</text:bookmark-ref>.</text:p>
        </text:list-item>
      </text:list>
      <text:p text:style-name="Text_20_body">These two segment types can be used to describe frequent cases of milling operations of different depths without too many individual details, e.g.</text:p>
      <text:list text:style-name="L22">
        <text:list-item>
          <text:p text:style-name="P47">milling of markings</text:p>
        </text:list-item>
        <text:list-item>
          <text:p text:style-name="P47">possibly also millings with retaining bars if no marking millings are required.</text:p>
        </text:list-item>
      </text:list>
      <text:p text:style-name="Text_20_body">The optional parameters for individual milling segments are</text:p>
      <text:list xml:id="list193461066429463" text:continue-list="list2257399988" text:style-name="L20">
        <text:list-item>
          <text:p text:style-name="P45">F: Milling speed in mm/min; if not specified, the specification for the path or, if this is also missing, the /f command line parameter is used.</text:p>
        </text:list-item>
        <text:list-item>
          <text:p text:style-name="P45">B: (for continuous line) or D (for marking line): Milling depth in mm; if not specified, the specification for the path is used.</text:p>
        </text:list-item>
        <text:list-item>
          <text:p text:style-name="P45">N: Sequence for stars (see p. <text:bookmark-ref text:reference-format="page" text:ref-name="__RefHeading__1863_2102980402">25</text:bookmark-ref>).</text:p>
        </text:list-item>
        <text:list-item>
          <text:p text:style-name="P45">Q: Comment that is written to the G-code file.</text:p>
        </text:list-item>
      </text:list>
      <text:h text:style-name="Heading_20_3" text:outline-level="3"><text:bookmark-start text:name="__RefHeading___Toc5557_2169950967"/>4.2.1<text:span text:style-name="T22">1</text:span>. Drilled holes<text:bookmark-end text:name="__RefHeading___Toc5557_2169950967"/></text:h>
      <text:p text:style-name="Text_20_body">Drilled holes are holes that have exactly the diameter of the cutter (i.e. where the diameter drawn is equal to the O value of the path); they are rarely used. Like milling segments, drilled holes can be drawn either with a continuous line or with a double-dotted line (see p. <text:bookmark-ref text:reference-format="page" text:ref-name="__RefHeading__3017_1578383688">17</text:bookmark-ref>). The following parameters can be specified for drilled holes („FBQ“):</text:p>
      <text:list xml:id="list193460242230470" text:continue-numbering="true" text:style-name="L20">
        <text:list-item>
          <text:p text:style-name="P45">F: Milling speed in mm/min; if not specified, the specification for the path or, if this is also missing, the /f command line parameter is used.</text:p>
        </text:list-item>
        <text:list-item>
          <text:p text:style-name="P45">B or D (depending on the line type: milling depth in mm (bottom of the hole); if not specified, the specification for the path is used.</text:p>
        </text:list-item>
        <text:list-item>
          <text:p text:style-name="P45">Q: Comment that is written to the G-code file.</text:p>
        </text:list-item>
        <text:list-item>
          <text:p text:style-name="P45">(C—currently not yet supported: Specification of the depth from which G81 should be used instead of G01).</text:p>
        </text:list-item>
      </text:list>
      <text:h text:style-name="Heading_20_3" text:outline-level="3"><text:bookmark-start text:name="__RefHeading__4890_1453201033"/>4.2.1<text:span text:style-name="T22">2</text:span>. Helical circles<text:bookmark-end text:name="__RefHeading__4890_1453201033"/></text:h>
      <text:p text:style-name="Text_20_body">Helical circles are circular millings with an outer diameter larger than that of the milling cutter. The circle drawn indicates the <text:span text:style-name="T5">outer diameter </text:span>of the milling cut; this is helpful for the most common application, milling a hole.</text:p>
      <text:p text:style-name="P25">Note: All other milling paths—especially arcs (ARC)—describe the movement of the <text:soft-page-break/>milling cutter center; only the helical paths draw the outer edge of the milling cut. This is confusing because it is difficult to visually distinguish a (long) arc from a circle. However, I leave it this way because of the frequent use of helical circles for hole milling.</text:p>
      <text:p text:style-name="P25">As a precaution against using helical circely wrongly, they can only be used up to a certain diameter—the idea is that only smaller „holes“ should be specified with helical circles, whereas larger circles should be constructed from arcs. The default maximum diameter for a helical circle is <text:s/>4 times O (the milling bit diameter). If, in special cases, larger helical circles are necessary, one can modify that value with the A parameter at the path level.</text:p>
      <text:p text:style-name="Text_20_body">Helical circles are milled using a spiral movement, which [currently] always takes place in a clockwise direction (G02). When milling out a hole using concentric helical circles from the inside to the outside, this results in up-cut milling.</text:p>
      <text:p text:style-name="P25">If a component is to be milled from the outside and climb milling is to be avoided, then the milling path must be individually composed of arcs that are traversed in the desired direction.</text:p>
      <text:p text:style-name="Text_20_body">Helical circles can be drawn in the same way as milling segments, either with a continuous line or with a double-dotted line (see p. <text:bookmark-ref text:reference-format="page" text:ref-name="__RefHeading__3017_1578383688">17</text:bookmark-ref>). The following parameters can be specified (“FBIQ/FDIQ”):</text:p>
      <text:list text:continue-numbering="true" text:style-name="L20">
        <text:list-item>
          <text:p text:style-name="P45">F: Milling speed in mm/min; if not specified, the specification for the path or, if this is also missing, the /f command line parameter is used.</text:p>
        </text:list-item>
        <text:list-item>
          <text:p text:style-name="P45">B or D (depending on the line type): Milling depth in mm (bottom of the hole); if not specified, the specification for the path is used.</text:p>
        </text:list-item>
        <text:list-item>
          <text:p text:style-name="P45">I: Height of a helix in mm; if this information is missing, the I value of the path is used.</text:p>
        </text:list-item>
        <text:list-item>
          <text:p text:style-name="P45">Q: Comment that is written to the G-code file.</text:p>
        </text:list-item>
      </text:list>
      <text:p text:style-name="Text_20_body">For helical circles whose diameter is greater than twice the cutter diameter, PathDxf2GCode does <text:span text:style-name="T5">not</text:span> generate G-code for milling away the resulting core—therefore these are <text:span text:style-name="T5">circles, </text:span>and not <text:span text:style-name="T5">holes</text:span>. If it is necessary to mill away the core (for blind holes or to prevent a milled core from jamming or being thrown around), then several helical circles with increasing diameters must be constructed. PathDxf2GCode mills such concentric helical circles from the inside to the outside in any case.</text:p>
      <text:h text:style-name="Heading_20_3" text:outline-level="3"><text:bookmark-start text:name="__RefHeading__5343_207922309"/>4.2.1<text:span text:style-name="T22">3</text:span>. Support bars<text:bookmark-end text:name="__RefHeading__5343_207922309"/></text:h>
      <text:p text:style-name="Text_20_body">PathDxf2GCode can help with a simple milling of support bars: A double-dash-dotted line (DXF: BORDER) results in a toothed milling movement, which can create support bars with suitably chosen parameters.</text:p>
      <text:p text:style-name="Text_20_body">Support bars are supported for</text:p>
      <text:list text:style-name="L23">
        <text:list-item>
          <text:p text:style-name="P48">straight line milllings</text:p>
        </text:list-item>
        <text:list-item>
          <text:p text:style-name="P48">arc millings</text:p>
        </text:list-item>
        <text:list-item>
          <text:p text:style-name="P48">and helical circles.</text:p>
        </text:list-item>
      </text:list>
      <text:p text:style-name="Text_20_body">The following diagram shows the parameters and geometry of support bar milling:</text:p>
      <text:p text:style-name="Text_20_body"/>
      <text:p text:style-name="Text_20_body"><draw:frame draw:style-name="fr2" draw:name="Grafik13" text:anchor-type="paragraph" svg:width="9.543cm" svg:height="3.748cm" draw:z-index="1"><draw:image xlink:href="Pictures/20000007000030C900001384AFA2F0A0.svm" xlink:type="simple" xlink:show="embed" xlink:actuate="onLoad" draw:mime-type="image/x-svm"/><draw:image xlink:href="Pictures/100000010000024F000000EDBFD7ADB3.png" xlink:type="simple" xlink:show="embed" xlink:actuate="onLoad" draw:mime-type="image/png"/></draw:frame><text:soft-page-break/></text:p>
      <text:p text:style-name="Standard">The following parameters must be specified („PUBD“):</text:p>
      <text:p text:style-name="Standard"/>
      <text:list text:style-name="L24">
        <text:list-item>
          <text:p text:style-name="P49">P: Length of the support bars. The two outermost bars are of length P/2 (the reason is mainly that with helical circles, they connect to a full support bar of length P).</text:p>
        </text:list-item>
        <text:list-item>
          <text:p text:style-name="P49">U: Lower bound for distance betweem support bars. PathDxf2GCode will always try to fit in as many equally spaced support bars as possible, but their distance will never be smaller than U.</text:p>
        </text:list-item>
        <text:list-item>
          <text:p text:style-name="P49">B: Milling depth between support bars (typically negative, i.e., belo zero layer).</text:p>
        </text:list-item>
        <text:list-item>
          <text:p text:style-name="P49">D: Milling depth of support bars.</text:p>
        </text:list-item>
      </text:list>
      <text:p text:style-name="Text_20_body">The parameters are typically specified at the start circle, but can be overridden for any support bar line.</text:p>
      <text:p text:style-name="Text_20_body">Support bars are computed for each double-dash-dotted line separately. It is therefore not easy to get nicely spaced support bars on a complex milling chain that consists of multiple segments. In such cases, the support bars should probably be constructed manually from combinations of milling and marking segments.</text:p>
      <text:p text:style-name="Text_20_body">The milling movement sfor support bars can of course also be used to mill structures where—with B &gt; 0—material is left also between the „teeth“, resulting in a comb-like pieces.</text:p>
      <text:h text:style-name="Heading_20_3" text:outline-level="3"><text:bookmark-start text:name="__RefHeading__6527_207922309"/>4.2.1<text:span text:style-name="T22">4</text:span>. Sweepless milling („slow milling“)<text:bookmark-end text:name="__RefHeading__6527_207922309"/></text:h>
      <text:p text:style-name="Text_20_body">Sweepless milling for straight segments and arcs is necessary for special milling bits, e.g. T bits which cannot be pulled out of the working piece at any place for moving them somewhere else and therefore must be controlled more closely. With sweepless milling, a possibly necessary reverse movement (to start another milling run of a milling chain) is done by backtracking through the segments that have just been milled. Sweepless milling is done for each milling chain (see p. <text:bookmark-ref text:reference-format="page" text:ref-name="__RefHeading__3017_1578383688">17</text:bookmark-ref>) that has a W parameter; the parameter value indicates the height of the first milling run along the chain above the zero level. <text:s/>If W is specified at the path start (see p. <text:bookmark-ref text:reference-format="page" text:ref-name="__RefHeading__1649_1253387321">15</text:bookmark-ref>), all milling segments of the path are milled sweeplessly.</text:p>
      <text:h text:style-name="Heading_20_3" text:outline-level="3"><text:bookmark-start text:name="__RefHeading__1263_1253387321"/>4.2.1<text:span text:style-name="T22">5</text:span>. Subpath embeddings<text:bookmark-end text:name="__RefHeading__1263_1253387321"/></text:h>
      <text:h text:style-name="Heading_20_4" text:outline-level="4"><text:bookmark-start text:name="__RefHeading___Toc22673_1113469703"/>4.2.15.1. Milled subpath embeddings<text:bookmark-end text:name="__RefHeading___Toc22673_1113469703"/></text:h>
      <text:p text:style-name="Text_20_body">To mill several previously constructed components, their path drawings must be able to be referenced in project drawings. This is done with a dash-dotted line (DXF: DASHDOT)—both a straight line and an arc can be used.</text:p>
      <text:p text:style-name="Text_20_body">The following <text:span text:style-name="T24">parameters</text:span> can be specified on the subpath element (“TOM&gt;”):</text:p>
      <text:list text:style-name="L25">
        <text:list-item>
          <text:p text:style-name="P50">&gt;: Name of the subpath to be embedded; mandatory. The subpath is searched for in all <text:soft-page-break/>matching DXF files—see p. <text:bookmark-ref text:reference-format="page" text:ref-name="__RefHeading__1245_1253387321">27</text:bookmark-ref>. The subpath is embedded from the start point to the end point.</text:p>
        </text:list-item>
        <text:list-item>
          <text:p text:style-name="P50">T: Material thickness in mm; mandatory.</text:p>
        </text:list-item>
        <text:list-item>
          <text:p text:style-name="P50">O: Cutter diameter in mm; mandatory..</text:p>
        </text:list-item>
        <text:list-item>
          <text:p text:style-name="P50">M: Material specification; mandatory.</text:p>
        </text:list-item>
        <text:list-item>
          <text:p text:style-name="P51"><text:span text:style-name="T25">H: </text:span><text:span text:style-name="T26">Additional height if the material is mounted on a support; default value 0</text:span><text:span text:style-name="T27">.</text:span></text:p>
        </text:list-item>
      </text:list>
      <text:p text:style-name="Text_20_body">The following conditions apply to the subpath element:</text:p>
      <text:list text:style-name="L26">
        <text:list-item>
          <text:p text:style-name="P52">The specifications T, O and M at the start circle of the embedded subpath must match the corresponding values at the embedding point.<text:change-start text:change-id="ct2969530356208"/></text:p>
        </text:list-item>
        <text:list-item>
          <text:p text:style-name="P53">The T value of an embedded subpath must not be larger than the T value of the embedding path.<text:change-end text:change-id="ct2969530356208"/></text:p>
        </text:list-item>
        <text:list-item>
          <text:p text:style-name="P52">The distance between the start and end points of the embedded subpath must match the distance between the start and end points of the embedding line (i.e., scaling of the embedded subpath is not possible).</text:p>
        </text:list-item>
        <text:list-item>
          <text:p text:style-name="P52">Subpath embeddings can be nested at most 9 levels deep.</text:p>
        </text:list-item>
      </text:list>
      <text:h text:style-name="P54" text:outline-level="4"><text:bookmark-start text:name="__RefHeading___Toc7235_3755525066"/><text:span text:style-name="T28">4.2.15.2. </text:span><text:span text:style-name="T29">R</text:span><text:span text:style-name="T30">e</text:span><text:span text:style-name="T29">stricting called subpaths</text:span><text:bookmark-end text:name="__RefHeading___Toc7235_3755525066"/></text:h>
      <text:p text:style-name="P55">When copying projects with subpaths—especially setup projects—for another milling pass, it’s easy to forget to rename the subpaths; For example, a clamping project for the “left” side of profiles should generally contain only “left” subpaths, while the “right” clamping project created by copying it should contain only “right” subpaths—but renaming them accordingly is prone to errors.</text:p>
      <text:p text:style-name="P55">To prevent such errors, pairs of regular expressions can be specified using /e parameters, meaning that a path matching the first expression in a pair may only call subpaths that match the second expression. The example rule can be formulated as follows:</text:p>
      <text:p text:style-name="P56"><text:s text:c="3"/>/<text:span text:style-name="T28">e L$:L$ /e R$:R$</text:span></text:p>
      <text:p text:style-name="P57">To allow these global rules to be overridden for a specific path, the second regular expression can be overridden using the E parameter. For example, the following path parameter can be used to call <text:s/>paths ending in L <text:span text:style-name="T29">as well as paths </text:span>ending in P:</text:p>
      <text:p text:style-name="P58"><text:span text:style-name="T31"><text:s text:c="3"/></text:span><text:span text:style-name="T32">E[LP]$</text:span></text:p>
      <text:h text:style-name="P59" text:outline-level="4"><text:bookmark-start text:name="__RefHeading___Toc7237_3755525066"/>4.2.15.<text:span text:style-name="T2">3</text:span>. Embedding without milling for “correction milling”<text:bookmark-end text:name="__RefHeading___Toc7237_3755525066"/></text:h>
      <text:p text:style-name="Text_20_body">Instead of a dashed line, a partial path can also be drawn with a dotted line (DXF: DOT). In this case, the embedding is treated as a <text:span text:style-name="T33">sweep </text:span>without parameters (see p. <text:bookmark-ref text:reference-format="page" text:ref-name="__RefHeading___Toc5555_2169950967">17</text:bookmark-ref>).</text:p>
      <text:p text:style-name="Text_20_body">This is helpful if, for a project file with several components (see p. <text:bookmark-ref text:reference-format="page" text:ref-name="__RefHeading__1245_1253387321">27</text:bookmark-ref>), only individual components are to be re-milled, for example because there was a design error or because an additional component was added to the project file: You can then temporarily draw the component paths of the components that have already been correctly manufactured as dotted lines and then obtain the G-code only for the new components to be manufactured; afterwards, the dotted lines are <text:span text:style-name="T33">once more </text:span>replaced by <text:span text:style-name="T33">dash-dotted</text:span> lines.</text:p>
      <text:p text:style-name="P60"><text:span text:style-name="T33">Dotted lines accept </text:span>the <text:span text:style-name="T24">parameters</text:span><text:span text:style-name="T34"> </text:span>for &gt;, T, O, and M so that switching to a dotted line is sufficient to skip the embedding. However, the<text:span text:style-name="T35">se</text:span> <text:span text:style-name="T24">parameters</text:span><text:span text:style-name="T34"> </text:span>are completely ignored. </text:p>
      <text:h text:style-name="Heading_20_3" text:outline-level="3"><text:bookmark-start text:name="__RefHeading___Toc5559_2169950967"/><text:soft-page-break/>4.2.1<text:span text:style-name="T22">6</text:span>. Subpath embeddings with variables<text:bookmark-end text:name="__RefHeading___Toc5559_2169950967"/></text:h>
      <text:h text:style-name="Heading_20_4" text:outline-level="4"><text:bookmark-start text:name="__RefHeading___Toc5561_2169950967"/>4.2.1<text:span text:style-name="T22">6</text:span>.1. Example for a combined clamping and <text:span text:style-name="T36">variables project</text:span><text:bookmark-end text:name="__RefHeading___Toc5561_2169950967"/></text:h>
      <text:p text:style-name="Text_20_body">In many cases, it is helpful if a designed project is a template that can be parameterized for specific projects.<text:line-break/>Here is an example: In addition to the pointed key handle (see p. <text:bookmark-ref text:reference-format="page" text:ref-name="__RefHeading__5930_1401316154">8</text:bookmark-ref>) with path 2051.2P, we have also designed a rectangular handle with path 2051.1P:</text:p>
      <text:p text:style-name="Text_20_body"><draw:frame draw:style-name="fr2" draw:name="Grafik15" text:anchor-type="paragraph" svg:width="9.874cm" svg:height="5.043cm" draw:z-index="3"><draw:image xlink:href="Pictures/2000000700004BD300002364DCE02A83.svm" xlink:type="simple" xlink:show="embed" xlink:actuate="onLoad" draw:mime-type="image/x-svm"/><draw:image xlink:href="Pictures/1000000100000396000001AD66EAA339.png" xlink:type="simple" xlink:show="embed" xlink:actuate="onLoad" draw:mime-type="image/png"/></draw:frame></text:p>
      <text:p text:style-name="Text_20_body">A “clamping project” for one rectangular and two pointed key handles could now look like this:</text:p>
      <text:p text:style-name="Text_20_body"><draw:frame draw:style-name="fr2" draw:name="Grafik14" text:anchor-type="paragraph" svg:width="8.423cm" svg:height="7.627cm" draw:z-index="2"><draw:image xlink:href="Pictures/20000007000049EC000042FA6D4ACF47.svm" xlink:type="simple" xlink:show="embed" xlink:actuate="onLoad" draw:mime-type="image/x-svm"/><draw:image xlink:href="Pictures/100000010000037F0000032BDB7DE2C4.png" xlink:type="simple" xlink:show="embed" xlink:actuate="onLoad" draw:mime-type="image/png"/></draw:frame></text:p>
      <text:p text:style-name="Text_20_body">Now you might ask yourself whether you really want to mill exactly one 2051.1P and two 2051.2P here – in a follow-up job, you might need two rectangular handles and one pointed handle, or three pointed handles. Of course, you could copy the original project with the 1+2 handles and adjust the embedded paths in the copy – but it is preferable to design the details of the clamping project only once and then define the concreate variable assignments in a separate variables project so that changes to the clamping project do not have to be tracked in multiple places.<text:line-break/>The solution for this is to have two separate projects:</text:p>
      <text:list text:style-name="L27">
        <text:list-item>
          <text:p text:style-name="P61">In the clamping project, the paths of the handles are no longer defined as fixed values, but are specified as variables.</text:p>
        </text:list-item>
        <text:list-item>
          <text:p text:style-name="P61">The clamping project defines at its start point which variables and which values are permissible.</text:p>
        </text:list-item>
        <text:list-item>
          <text:p text:style-name="P61"><text:soft-page-break/>In a surrounding variables project, specific values are assigned to the variables.</text:p>
        </text:list-item>
        <text:list-item>
          <text:p text:style-name="P61">The names of the files generated from the variable project contain information about the variable values used.</text:p>
        </text:list-item>
      </text:list>
      <text:p text:style-name="Text_20_body">The necessary texts are shown in the following:</text:p>
      <text:p text:style-name="P62">Ad 1. In the clamping project, the embedded paths are specified using = variables,</text:p>
      <text:p text:style-name="P63">Ad 2. the variables used and their possible values are defined at the starting point. The possible values here are P1 and P2, which are specified as comma-separated lists:</text:p>
      <text:p text:style-name="P63"/>
      <text:p text:style-name="Text_20_body"><draw:frame draw:style-name="fr2" draw:name="Grafik16" text:anchor-type="paragraph" svg:width="10.442cm" svg:height="10.213cm" draw:z-index="4"><draw:image xlink:href="Pictures/2000000700003669000034C14EE2598E.svm" xlink:type="simple" xlink:show="embed" xlink:actuate="onLoad" draw:mime-type="image/x-svm"/><draw:image xlink:href="Pictures/10000001000002930000027FF426455C.png" xlink:type="simple" xlink:show="embed" xlink:actuate="onLoad" draw:mime-type="image/png"/></draw:frame></text:p>
      <text:p text:style-name="P64">Ad 3. The variables project consists only of a call to the clamping project, where values are assigned to the variables:</text:p>
      <text:p text:style-name="P65"><draw:frame draw:style-name="fr4" draw:name="Grafik17" text:anchor-type="paragraph" svg:x="4.26cm" svg:y="-0.064cm" svg:width="6.341cm" svg:height="6.174cm" draw:z-index="5"><draw:image xlink:href="Pictures/200000070000311E00003020C22C4AC2.svm" xlink:type="simple" xlink:show="embed" xlink:actuate="onLoad" draw:mime-type="image/x-svm"/><draw:image xlink:href="Pictures/100000010000025300000247C97F3CD3.png" xlink:type="simple" xlink:show="embed" xlink:actuate="onLoad" draw:mime-type="image/png"/></draw:frame></text:p>
      <text:h text:style-name="Heading_20_4" text:outline-level="4"><text:soft-page-break/></text:h>
      <text:p text:style-name="P64">Ad 4. Using the R parameter, an arbitrary marker is added to the path of the variable project to provide information about the selected variable values in the file name. Here, this is the character string _112, which symbolizes the selected variable values P1, P1, P2.</text:p>
      <text:h text:style-name="Heading_20_4" text:outline-level="4"><text:bookmark-start text:name="__RefHeading__7148_1371230396"/>4.2.1<text:span text:style-name="T22">6</text:span>.2. Definition of variables<text:bookmark-end text:name="__RefHeading__7148_1371230396"/></text:h>
      <text:p text:style-name="Text_20_body">Variables are defined at the starting point of a path using text in the form</text:p>
      <text:p text:style-name="P25">:&lt;Name&gt;&lt;Definition of permissible values&gt;.</text:p>
      <text:p text:style-name="P33">Name is a single character of your choice, but a letter should normally be used.</text:p>
      <text:p text:style-name="P33">There are three ways to specify the permissible values:</text:p>
      <text:p text:style-name="P33">a) Using a comma-separated list. Examples:</text:p>
      <text:p text:style-name="P25">:AP1,P2,P3 means that the values P1, P2, and P3 are allowed for variable A.</text:p>
      <text:p text:style-name="P25">:B2051.P1,2051.P2 means that the values 2051.P1 and 2052.P2 are allowed for variable B.</text:p>
      <text:p text:style-name="P33">b) Using a list of individual characters after a question mark. Example:</text:p>
      <text:p text:style-name="P25">:A?PQRS means that the values P, Q, and R are allowed for variable A (which could also be specified by :AP,Q,R,S).</text:p>
      <text:p text:style-name="P33">c) via a range of numbers in the format from~to. Example:</text:p>
      <text:p text:style-name="P25">:B-0.5~1.2 means that numbers between –0.5 and 1.2 (inclusive) are allowed for variable B.</text:p>
      <text:h text:style-name="Heading_20_4" text:outline-level="4"><text:bookmark-start text:name="__RefHeading___Toc5563_2169950967"/>4.2.1<text:span text:style-name="T22">6</text:span>.3. Usage of variables<text:bookmark-end text:name="__RefHeading___Toc5563_2169950967"/></text:h>
      <text:p text:style-name="Text_20_body">Within the path for which variables are defined, these can be used in any text by </text:p>
      <text:p text:style-name="P25">=&lt;Name&gt;</text:p>
      <text:p text:style-name="Text_20_body">e.g.</text:p>
      <text:p text:style-name="P25">=A</text:p>
      <text:p text:style-name="Text_20_body"><text:s/>If a variable is used that is not defined at the beginning of the path, an error message is displayed.</text:p>
      <text:p text:style-name="Text_20_body">The values of the parameters N and O cannot contain variables. Specifications such as N=X or O=O, where :X1 or :O4 is then specified for the subpath element, are therefore not possible and result in an error message.</text:p>
      <text:h text:style-name="Heading_20_4" text:outline-level="4"><text:bookmark-start text:name="__RefHeading__5504_585828919"/>4.2.1<text:span text:style-name="T22">6</text:span>.4. Setting the values<text:bookmark-end text:name="__RefHeading__5504_585828919"/></text:h>
      <text:p text:style-name="Text_20_body">In a subpath embedding, the variables are assigned values, which are then used inside the subpath. For the assignment, the values are specified after the colon in the &gt; text:</text:p>
      <text:p text:style-name="P25">:&lt;Name&gt;&lt;Value&gt;</text:p>
      <text:p text:style-name="Text_20_body">e.g.</text:p>
      <text:p text:style-name="P25">:A1,5</text:p>
      <text:p text:style-name="Text_20_body">If a name is specified that is not defined in the subpath, or a value that does not match the definition of the permitted values, an error message is displayed.</text:p>
      <text:p text:style-name="Text_20_body">The value of a variable can also contain variables that are passed from further outside the path. This is often done in the form :B=B, i.e., the variable B passed “down” (left B) is set to the value <text:soft-page-break/>received “from above” (=B).</text:p>
      <text:h text:style-name="Heading_20_4" text:outline-level="4"><text:bookmark-start text:name="__RefHeading___Toc5565_2169950967"/>4.2.1<text:span text:style-name="T22">6</text:span>.5. Check values for variables<text:bookmark-end text:name="__RefHeading___Toc5565_2169950967"/></text:h>
      <text:p text:style-name="Text_20_body">If PathDxf2GCode is called with the /c option for paths with variables, variable values must be provided in order to generate correct path texts. The definitions of the permissible values are also used for this:</text:p>
      <text:list text:style-name="L28">
        <text:list-item>
          <text:p text:style-name="P66">If the permissible values are defined using comma or question mark lists, the first value of the first list, the second of the second list, the third of the third list, etc. are used as test values. If the list is shorter, the list is restarted from the beginning. The purpose of this procedure is to ensure that, even with similar lists (such as in the clamping project above), as many different values as possible are used for testing.</text:p>
        </text:list-item>
        <text:list-item>
          <text:p text:style-name="P66">For ranges of permissible values, the from and to values of the ranges are used alternately.</text:p>
        </text:list-item>
      </text:list>
      <text:h text:style-name="Heading_20_3" text:outline-level="3"><text:bookmark-start text:name="__RefHeading__1863_2102980402"/>4.2.1<text:span text:style-name="T22">7</text:span>. Star-shaped paths<text:bookmark-end text:name="__RefHeading__1863_2102980402"/></text:h>
      <text:p text:style-name="Text_20_body">Paths can also be “star-shaped”, i.e. they can continue from one point in several directions (with millings or sweeps). So that a unique path can be calculated in such cases, the segments of the paths can be annotated with N texts, e.g. N1, N2 etc. Segments without N are always traveled after the segments marked with N, with shorter segments being placed at the front. Boreholes and helix circles are always milled before all outgoing segments.</text:p>
      <text:p text:style-name="Text_20_body">In some cases, the numbering with N is a little tricky because a segment connects to two star points. Here is such an example (constructed as a test case):</text:p>
      <text:p text:style-name="Text_20_body"><draw:frame draw:style-name="fr2" draw:name="Grafik4" text:anchor-type="paragraph" svg:width="10.837cm" svg:height="4.553cm" draw:z-index="7"><draw:image xlink:href="Pictures/2000000700002A56000011C83513B04B.svm" xlink:type="simple" xlink:show="embed" xlink:actuate="onLoad" draw:mime-type="image/x-svm"/><draw:image xlink:href="Pictures/1000000100000201000000D8DEA22FD7.png" xlink:type="simple" xlink:show="embed" xlink:actuate="onLoad" draw:mime-type="image/png"/></draw:frame></text:p>
      <text:list text:style-name="L29">
        <text:list-item>
          <text:p text:style-name="P67">After the sweep from the starting point to the left star point, the segment annotated with N1 is milled.</text:p>
        </text:list-item>
        <text:list-item>
          <text:p text:style-name="P67">When the right star point is reached, two sweeps without N could be taken (the straight one to the end point and the curved one to the left). However, the two milling movements annotated with N are tried first. Because the upper one has already been milled and is therefore ignored in the selection, the segment annotated with N2 is added to the path next.</text:p>
        </text:list-item>
        <text:list-item>
          <text:p text:style-name="P67">This milling run now reaches the star point on the left again. As both marked segments are now “used up” (because they have already been milled), the sweep in the middle is now selected.</text:p>
        </text:list-item>
        <text:list-item>
          <text:p text:style-name="P67">At the right star point, only the path to the end of the path remains.</text:p>
        </text:list-item>
      </text:list>
      <text:h text:style-name="Heading_20_2" text:outline-level="2"><text:bookmark-start text:name="__RefHeading__1371_695252532"/>4.3. Component <text:span text:style-name="T37">path DXF file</text:span>s<text:bookmark-end text:name="__RefHeading__1371_695252532"/></text:h>
      <text:p text:style-name="Text_20_body">The CAD drawing must be saved as a DXF file for reading by PathDxf2GCode. As <text:soft-page-break/>PathDxf2GCode must later find the appropriate DXF file from the name of a component path in the project path drawing, each DXF file name must be able to provide information about the component paths it contains.</text:p>
      <text:p text:style-name="Text_20_body">On p. <text:bookmark-ref text:reference-format="page" text:ref-name="__RefHeading__8255_1487761246">10</text:bookmark-ref>, we saw that path names consist of distinct groups (for the default /n parameter, these would be three groups, a 4-digit number, another number and a trailing uppercase letter. <text:s/>If a path is search in DXF files, PathDxf2GCode identifies <text:span text:style-name="T5">pathname patterns </text:span>in each file name and matches them up with the searched path name. If the patterns match the path name, then the file is opened and scanned for the search path name. For this to work, the pathname patterns themselves must follow a specific pattern, which is defined by the /p option. Its default value is <text:span text:style-name="T38">([0-9]{4})(?:[.]([0-9]+))?</text:span>, which allows the following pathname patterns:</text:p>
      <text:list text:style-name="L30">
        <text:list-item>
          <text:p text:style-name="P68">4-digit number</text:p>
        </text:list-item>
        <text:list-item>
          <text:p text:style-name="P68">4-digit number . number</text:p>
        </text:list-item>
      </text:list>
      <text:p text:style-name="Text_20_body">e.g. 1234 or 1234.1 .</text:p>
      <text:p text:style-name="P25">In detail, the pattern contains two “groups” separated by a dot; the second group including the dot is optional.</text:p>
      <text:p text:style-name="Text_20_body">A DXF file name is now structured like this:</text:p>
      <text:p text:style-name="Text_20_body"><text:tab/>...<text:span text:style-name="T5">pathname range</text:span>{,<text:span text:style-name="T5">pathname range</text:span>...}....DXF</text:p>
      <text:p text:style-name="Text_20_body">where a pathname range has one of the following two forms and meanings:</text:p>
      <text:list text:style-name="L31">
        <text:list-item>
          <text:p text:style-name="P69">Pathname pattern </text:p>
          <text:list>
            <text:list-item>
              <text:p text:style-name="P70">The pathname pattern in the file name indicates that the file contains paths that match the specified groups. A pathname pattern 1234 with only one group thus indicates that the file contains paths such as 1234.3A, 1234.12L etc., i.e. paths whose first group is the same as the specified group 1234. A pathname pattern 1234.5 in the file name, on the other hand, indicates that this file contains paths like 1235.5P or 1234.5X.</text:p>
            </text:list-item>
          </text:list>
        </text:list-item>
        <text:list-item>
          <text:p text:style-name="P69">Pathname pattern–pathname pattern</text:p>
          <text:list>
            <text:list-item>
              <text:p text:style-name="P70">Two path name patterns, separated by a minus sign.</text:p>
            </text:list-item>
            <text:list-item>
              <text:p text:style-name="P70">Such a range indicates that the DXF file contains paths in this range. Groups are compared as numbers if they consist solely of digits; otherwise, they are compared as text. For example, a file with the name 1234-1236.DXF can contain the path 1234.8A, but also the path 1235.99B or any paths beginning with 1236. A file with the name 1234.5-1234.10.DXF—where the trailing group is numeric—may contain paths 1234.8A, 1234.5B and 1234.9A, but not the path 1234.40A.</text:p>
            </text:list-item>
          </text:list>
        </text:list-item>
      </text:list>
      <text:p text:style-name="Text_20_body">The areas of the paths of different files may overlap, e.g. the files 1234.DXF and 1234,1235.DXF and 1230-1239,1241.DXF may exist at the same time. If PathDxf2GCode searches for a component path 1234.2P in this case, for example, it will read and search through all these files. However, if the path is found more than once, PathDxf2GCode issues an error message.</text:p>
      <text:p text:style-name="Text_20_body">To locate subpath files, the following directories are searched:</text:p>
      <text:list text:style-name="L32">
        <text:list-item>
          <text:p text:style-name="P71">First the directory where the currently processed DXF file is located;</text:p>
        </text:list-item>
        <text:list-item>
          <text:p text:style-name="P71">then all directories specified via /d parameters (see p. <text:bookmark-ref text:reference-format="page" text:ref-name="__RefHeading__1245_1253387321">27</text:bookmark-ref>).</text:p>
        </text:list-item>
      </text:list>
      <text:p text:style-name="Text_20_body">The file name should be entered in the path drawing so that it is selected consistently with the drawing numbers during DXF export without much thought.</text:p>
      <text:p text:style-name="Text_20_body"/>
      <text:h text:style-name="Heading_20_2" text:outline-level="2"><text:bookmark-start text:name="__RefHeading___Toc22677_1113469703"/><text:soft-page-break/>4.4. Projects<text:bookmark-end text:name="__RefHeading___Toc22677_1113469703"/></text:h>
      <text:h text:style-name="Heading_20_3" text:outline-level="3"><text:bookmark-start text:name="__RefHeading___Toc5571_2169950967"/>4.4.1. Project numbers<text:bookmark-end text:name="__RefHeading___Toc5571_2169950967"/></text:h>
      <text:p text:style-name="Text_20_body">As mentioned, path drawings are created for projects. Projects are assigned drawing numbers from 8000 to 8999. Project numbers 8901...8999 are intended for test projects.</text:p>
      <text:h text:style-name="Heading_20_3" text:outline-level="3"><text:bookmark-start text:name="__RefHeading__1245_1253387321"/>4.4.2. Project path drawings and subpaths<text:bookmark-end text:name="__RefHeading__1245_1253387321"/></text:h>
      <text:p text:style-name="Text_20_body">Project path drawings are drawn on a copy of the clamping and sacrificial plate. Such a drawing might look like this:</text:p>
      <text:p text:style-name="Text_20_body"><draw:frame draw:style-name="fr2" draw:name="Grafik8" text:anchor-type="paragraph" svg:width="12.972cm" svg:height="7.193cm" draw:z-index="10"><draw:image xlink:href="Pictures/10000000000002C4000001E053CB3483.png" xlink:type="simple" xlink:show="embed" xlink:actuate="onLoad" draw:mime-type="image/png"/></draw:frame></text:p>
      <text:p text:style-name="Text_20_body">At least the following parameters must be specified for a project path:</text:p>
      <text:list xml:id="list3034666640" text:style-name="L33">
        <text:list-item>
          <text:p text:style-name="P72">O, because the milling diameter for a project milling pass is fixed; and must be checked against the O specification in embedded paths;</text:p>
        </text:list-item>
        <text:list-item>
          <text:p text:style-name="P72">T, because for safety reasons it must always be clear from which depth drilling (G01) instead of an sweep (G00) is necessary for vertical runs.</text:p>
        </text:list-item>
        <text:list-item>
          <text:p text:style-name="P72">usually S, because project paths practically always contain sweeps whose height must be defined.</text:p>
        </text:list-item>
      </text:list>
      <text:p text:style-name="Text_20_body">A project path drawing is constructed as follows:</text:p>
      <text:p text:style-name="Text_20_body">a) Create a copy of the 1084 Ph drawing<text:note text:id="ftn6" text:note-class="footnote"><text:note-citation>6</text:note-citation><text:note-body><text:p text:style-name="Footnote">In BeckerCAD, a drawing is copied by re-opening the same MOD file and then selecting the drawing with „Hinzufügen“ („Add“). Afterwards, one must manually rename the drawing.</text:p></text:note-body></text:note> and rename it. The names of the project path drawings have the following form:</text:p>
      <text:p text:style-name="Text_20_body"><text:tab/><text:span text:style-name="T5">project-number</text:span>.<text:span text:style-name="T5">milling-pass</text:span></text:p>
      <text:p text:style-name="Text_20_body">The milling passes are numbered and letters are added after the milling pass to identify the clamping and/or the milling cutter, e.g.</text:p>
      <text:p text:style-name="Text_20_body"><text:tab/>8001.1P and 8001.2P<text:tab/><text:tab/>for two milling passes of different components </text:p>
      <text:p text:style-name="Text_20_body"><text:tab/>8002.1L and 8001.2R<text:tab/><text:tab/>for two milling passes of the same components with clamping <text:tab/><text:tab/><text:tab/><text:tab/><text:tab/>L and R</text:p>
      <text:p text:style-name="Text_20_body"><text:soft-page-break/><text:tab/>8003.1LS, 8003.2LT, 8003.3RT<text:tab/>for three milling passes of the same components with <text:line-break/><text:tab/><text:tab/><text:tab/><text:tab/><text:tab/>end mill (S) and then with T-slot milling cutter (T) for<text:line-break/><text:tab/><text:tab/><text:tab/><text:tab/><text:tab/>left-hand clamping <text:s/>(L) and then with T-slot milling cutter for <text:line-break/><text:tab/><text:tab/><text:tab/><text:tab/><text:tab/>right-hand clamping (R).</text:p>
      <text:p text:style-name="Text_20_body">b) The subpath proxy lines (see p. <text:bookmark-ref text:reference-format="page" text:ref-name="__RefHeading__1263_1253387321">20</text:bookmark-ref>) including the texts assigned to them (in particular the path names) of the components to be milled are placed. The start of a further component path can be placed at the end of the previous one if this is possible in terms of space and the profile.</text:p>
      <text:list text:style-name="L34">
        <text:list-item>
          <text:p text:style-name="P73">The proxy lines including text are copied from the component path drawings<text:note text:id="ftn7" text:note-class="footnote"><text:note-citation>7</text:note-citation><text:note-body><text:p text:style-name="Footnote">In BeckerCAD, in the component path drawing, create a copy of the proxy lines <text:span text:style-name="T5">outside the drawing</text:span>, select these copies and transfer them to the project path drawing with „Selektieren → Selektierte Elemente einfügen“; finally, move these copies to the correct position in the project path drawing.</text:p></text:note-body></text:note>, but the start and end markings (1 and 2 mm circles) are <text:span text:style-name="T5">not </text:span>copied (reason: there may only be one start and one end marking in a path drawing). </text:p>
        </text:list-item>
      </text:list>
      <text:p text:style-name="Text_20_body">c) Unconnected groups of paths are connected by sweeps (usually long-dashed lines).</text:p>
      <text:p text:style-name="Text_20_body">d) The start point and end point at the far left are connected to the subpaths with sweeps.</text:p>
      <text:p text:style-name="Text_20_body">e) The drawing is exported as a DXF file; the file name should be the same as the drawing name (e.g. 8001.1P.DXF). In addition, PDFs of the project path drawings should also be saved on the control computer of the milling machine, as they form the working document for clamping and unclamping the profiles and components and, if necessary, for replacing the milling cutter.</text:p>
      <text:h text:style-name="Heading_20_2" text:outline-level="2"><text:bookmark-start text:name="__RefHeading___Toc5573_2169950967"/>4.5. Z-Probes<text:bookmark-end text:name="__RefHeading___Toc5573_2169950967"/></text:h>
      <text:h text:style-name="Heading_20_3" text:outline-level="3"><text:bookmark-start text:name="__RefHeading___Toc5575_2169950967"/>4.5.1. Basics<text:bookmark-end text:name="__RefHeading___Toc5575_2169950967"/></text:h>
      <text:p text:style-name="P74">I have a problem with the clamping on my milling machine: Even on the dressed clamping plate, the profiles do not lie in one plane, but are up to about half a millimeter lower or higher. This doesn't matter with fully milled profiles, but not with 3D milling, and especially not when a profile is reclamped and finish-milled from the other side. I have come up with the following aid for this:</text:p>
      <text:list text:style-name="L35">
        <text:list-item>
          <text:p text:style-name="P75">A path drawing can contain Z probe points at which the actual Z value is measured by a measuring run before the actual milling process (the milling cutter moves to the points with a G38.2; I have to record the displayed value manually by UGS in a text file).</text:p>
        </text:list-item>
        <text:list-item>
          <text:p text:style-name="P75">In the G-code file that PathDxf2GCode generates, a formula expression is stored for each Z-coordinate that describes the correction of the Z-value as a function of the measured values at the Z-probe points.</text:p>
        </text:list-item>
        <text:list-item>
          <text:p text:style-name="P75">After the measurement run, another program called PathGCodeAdjustZ is used to “recalculate” the G-code file with the values from the text file and the formulas.</text:p>
        </text:list-item>
        <text:list-item>
          <text:p text:style-name="P75">I then carry out the milling process with this improved G-code file.</text:p>
        </text:list-item>
      </text:list>
      <text:p text:style-name="P74">The entire workflow looks like this:</text:p>
      <text:p text:style-name="P74"><draw:custom-shape text:anchor-type="paragraph" draw:z-index="15" draw:name="Form1" draw:style-name="gr1" draw:text-style-name="P77" svg:width="3.121cm" svg:height="1.424cm" svg:x="6.022cm" svg:y="0.157cm"><text:p text:style-name="P76">..._Clean.gcode </text:p><text:p text:style-name="P76">fil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draw:rect text:anchor-type="paragraph" draw:z-index="8" draw:name="Form2" draw:style-name="gr2" draw:text-style-name="P78" svg:width="2.477cm" svg:height="1.424cm" svg:x="12.942cm" svg:y="-0.019cm"><text:p text:style-name="P76">PathGCode-</text:p><text:p text:style-name="P76">AddZAdjusts</text:p></draw:rect></text:p>
      <text:p text:style-name="P74"><draw:custom-shape text:anchor-type="paragraph" draw:z-index="21" draw:name="Form3" draw:style-name="gr1" draw:text-style-name="P77" svg:width="2.408cm" svg:height="1.424cm" svg:x="0.086cm" svg:y="-0.194cm"><text:p text:style-name="P76">.DXF fil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draw:line text:anchor-type="paragraph" draw:z-index="24" draw:name="Form4" draw:style-name="gr3" draw:text-style-name="P76" svg:x1="5.281cm" svg:y1="1.188cm" svg:x2="6.022cm" svg:y2="0.407cm"><text:p/></draw:line><draw:line text:anchor-type="paragraph" draw:z-index="13" draw:name="Form5" draw:style-name="gr3" draw:text-style-name="P76" svg:x1="9.142cm" svg:y1="0.035cm" svg:x2="12.941cm" svg:y2="-0.032cm"><text:p/></draw:line><draw:custom-shape text:anchor-type="paragraph" draw:z-index="27" draw:name="Form6" draw:style-name="gr1" draw:text-style-name="P77" svg:width="2.814cm" svg:height="1.424cm" svg:x="9.313cm" svg:y="0.469cm"><text:p text:style-name="P76">edited</text:p><text:p text:style-name="P76">..._Z.txt fil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draw:line text:anchor-type="paragraph" draw:z-index="9" draw:name="Form7" draw:style-name="gr3" draw:text-style-name="P76" svg:x1="12.127cm" svg:y1="0.984cm" svg:x2="12.942cm" svg:y2="0.035cm"><text:p/></draw:line></text:p>
      <text:p text:style-name="Text_20_body"><draw:rect text:anchor-type="paragraph" draw:z-index="19" draw:name="Form8" draw:style-name="gr2" draw:text-style-name="P79" svg:width="2.211cm" svg:height="1.362cm" svg:x="3.071cm" svg:y="-0.009cm"><text:p text:style-name="P76"><text:span text:style-name="T39">PathDXF2-</text:span></text:p><text:p text:style-name="P76"><text:span text:style-name="T39">GCode</text:span></text:p></draw:rect><draw:line text:anchor-type="paragraph" draw:z-index="30" draw:name="Form9" draw:style-name="gr3" draw:text-style-name="P76" svg:x1="2.494cm" svg:y1="0.056cm" svg:x2="3.071cm" svg:y2="0.871cm"><text:p/></draw:line><draw:line text:anchor-type="paragraph" draw:z-index="16" draw:name="Form10" draw:style-name="gr3" draw:text-style-name="P76" svg:x1="14.231cm" svg:y1="0.007cm" svg:x2="14.469cm" svg:y2="1.065cm"><text:p/></draw:line></text:p>
      <text:p text:style-name="Text_20_body"><draw:custom-shape text:anchor-type="paragraph" draw:z-index="20" draw:name="Form11" draw:style-name="gr1" draw:text-style-name="P77" svg:width="3.121cm" svg:height="1.424cm" svg:x="12.908cm" svg:y="0.367cm"><text:p text:style-name="P76">..._Milling.gcode</text:p><text:p text:style-name="P76">fil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draw:line text:anchor-type="paragraph" draw:z-index="23" draw:name="Form12" draw:style-name="gr3" draw:text-style-name="P76" svg:x1="5.281cm" svg:y1="0.056cm" svg:x2="6.022cm" svg:y2="3.081cm"><text:p/></draw:line><draw:line text:anchor-type="paragraph" draw:z-index="11" draw:name="Form13" draw:style-name="gr3" draw:text-style-name="P76" svg:x1="5.281cm" svg:y1="0.056cm" svg:x2="6.362cm" svg:y2="1.453cm"><text:p/></draw:line></text:p>
      <text:p text:style-name="Text_20_body"><draw:custom-shape text:anchor-type="paragraph" draw:z-index="26" draw:name="Form14" draw:style-name="gr1" draw:text-style-name="P77" svg:width="2.952cm" svg:height="1.424cm" svg:x="6.362cm" svg:y="0.323cm"><text:p text:style-name="P76">Empty ..._Z.txt</text:p><text:p text:style-name="P76">fil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draw:line text:anchor-type="paragraph" draw:z-index="22" draw:name="Form15" draw:style-name="gr3" draw:text-style-name="P76" svg:x1="11.111cm" svg:y1="0.525cm" svg:x2="11.111cm" svg:y2="-0.203cm"><text:p/></draw:line></text:p>
      <text:p text:style-name="P74"><draw:line text:anchor-type="paragraph" draw:z-index="14" draw:name="Form16" draw:style-name="gr3" draw:text-style-name="P76" svg:x1="9.313cm" svg:y1="0.362cm" svg:x2="10.567cm" svg:y2="0.362cm"><text:p/></draw:line><draw:custom-shape text:anchor-type="paragraph" draw:z-index="29" draw:name="Form17" draw:style-name="gr4" draw:text-style-name="P80" svg:width="1.054cm" svg:height="1.026cm" svg:x="10.567cm" svg:y="-0.173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range-y-minimum="15510" draw:handle-range-y-maximum="17520" draw:handle-position="10800 $0" draw:handle-position-x="10800" draw:handle-position-y="$0"/></draw:enhanced-geometry></draw:custom-shape><draw:line text:anchor-type="paragraph" draw:z-index="25" draw:name="Form18" draw:style-name="gr3" draw:text-style-name="P76" svg:x1="14.639cm" svg:y1="0.393cm" svg:x2="14.911cm" svg:y2="1.631cm"><text:p/></draw:line><text:soft-page-break/></text:p>
      <text:p text:style-name="Text_20_body"><draw:line text:anchor-type="paragraph" draw:z-index="12" draw:name="Form19" draw:style-name="gr3" draw:text-style-name="P76" svg:x1="11.144cm" svg:y1="0.959cm" svg:x2="11.144cm" svg:y2="0.153cm"><text:p/></draw:line></text:p>
      <text:p text:style-name="Text_20_body"><draw:custom-shape text:anchor-type="paragraph" draw:z-index="17" draw:name="Form20" draw:style-name="gr1" draw:text-style-name="P77" svg:width="3.121cm" svg:height="1.424cm" svg:x="6.022cm" svg:y="0.288cm"><text:p text:style-name="P76">..._Probing.gcode</text:p><text:p text:style-name="P76">fil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draw:rect text:anchor-type="paragraph" draw:z-index="18" draw:name="Form21" draw:style-name="gr5" draw:text-style-name="P81" svg:width="2.477cm" svg:height="1.424cm" svg:x="10.024cm" svg:y="0.261cm"><text:p text:style-name="P76">Measuring</text:p><text:p text:style-name="P76">run</text:p></draw:rect><draw:rect text:anchor-type="paragraph" draw:z-index="28" draw:name="Form22" draw:style-name="gr5" draw:text-style-name="P81" svg:width="2.477cm" svg:height="1.424cm" svg:x="14.198cm" svg:y="0.235cm"><text:p text:style-name="P76">Milling</text:p><text:p text:style-name="P76">run</text:p></draw:rect></text:p>
      <text:p text:style-name="Text_20_body"><draw:line text:anchor-type="paragraph" draw:z-index="31" draw:name="Form23" draw:style-name="gr3" draw:text-style-name="P76" svg:x1="9.142cm" svg:y1="0.268cm" svg:x2="10.024cm" svg:y2="0.268cm"><text:p/></draw:line></text:p>
      <text:p text:style-name="Text_20_body"/>
      <text:h text:style-name="Heading_20_3" text:outline-level="3"><text:bookmark-start text:name="__RefHeading___Toc5577_2169950967"/>4.5.2. Path drawing with Z probes<text:bookmark-end text:name="__RefHeading___Toc5577_2169950967"/></text:h>
      <text:p text:style-name="P74">The Z-probe points are marked in the drawing by circles with line type dash-double dash (<text:span text:style-name="T40">DXF: </text:span>PHANTOM) <text:span text:style-name="T40">or dash-dot (DXF: DASHDOT) – </text:span><text:span text:style-name="T41">for the latter see end of this section – </text:span>and diameter 6 mm. They can be located anywhere (i.e. not necessarily on the milling path). PathDxf2GCode calculates the path for the measurement run in the _Probing.gcode file itself by always moving from the starting point to the next Z-probe point that has not yet been visited; at the end, the program returns to the starting point.</text:p>
      <text:p text:style-name="P74">The Z-probes can be arranged in two ways:</text:p>
      <text:list text:style-name="L36">
        <text:list-item>
          <text:p text:style-name="P82">outside the profiles; in this case, the probe must be placed at the respective point during the measuring run.</text:p>
        </text:list-item>
        <text:list-item>
          <text:p text:style-name="P82">on a profile; in this case, a conductive contact between the profile and the probe must be established during the measurement run.</text:p>
        </text:list-item>
      </text:list>
      <text:p text:style-name="P74">T<text:span text:style-name="T42">he following</text:span> parameters can be specified at a Z probe:</text:p>
      <text:list text:continue-list="list3034666640" text:style-name="L33">
        <text:list-item>
          <text:p text:style-name="P83">T: Sensor or material thickness in mm; if the specification is missing, the corresponding path specification is adopted at the starting point.</text:p>
        </text:list-item>
        <text:list-item>
          <text:p text:style-name="P84"><text:span text:style-name="T25">H: </text:span><text:span text:style-name="T26">Additional height if the material is mounted on a support; default value 0</text:span><text:span text:style-name="T27">.</text:span></text:p>
        </text:list-item>
        <text:list-item>
          <text:p text:style-name="P84">L: name of Z probe; this is shown in the _Z.txt file so that one can identify the Z probe locations in addition to their coordinate position.</text:p>
        </text:list-item>
        <text:list-item>
          <text:p text:style-name="P84">Z: <text:span text:style-name="T42">Measuring speed</text:span> in mm/min; <text:span text:style-name="T42">when missing, the Z value at the path start is used; if also this is missing, the /</text:span><text:span text:style-name="T43">z </text:span><text:span text:style-name="T44">option </text:span><text:span text:style-name="T42">value is used</text:span>.</text:p>
        </text:list-item>
      </text:list>
      <text:p text:style-name="P74">Here is a path drawing that contains two such Z-probes, each in the vicinity of subpaths:</text:p>
      <text:p text:style-name="P74"><draw:frame draw:style-name="fr2" draw:name="Grafik9" text:anchor-type="paragraph" svg:width="11.07cm" svg:height="6.708cm" draw:z-index="35"><draw:image xlink:href="Pictures/10000000000002780000016FEB6A8305.png" xlink:type="simple" xlink:show="embed" xlink:actuate="onLoad" draw:mime-type="image/png"/></draw:frame></text:p>
      <text:p text:style-name="P74">The resulting _Z.txt file looks like this:</text:p>
      <text:p text:style-name="P85"><text:soft-page-break/>@[138.000|299.000] #2001=</text:p>
      <text:p text:style-name="P85">@[242.000|264.000] #2002=</text:p>
      <text:p text:style-name="P86">Z <text:span text:style-name="T45">p</text:span>robes <text:span text:style-name="T46">can also have a dotted circumference </text:span>(DXF: DOT); <text:span text:style-name="T46">if so, they are ignored. This is useful if <text:s/>nearby subpaths also are dotted </text:span><text:span text:style-name="T47">and hence are skipped </text:span><text:span text:style-name="T46">(see p. </text:span><text:span text:style-name="T46"><text:bookmark-ref text:reference-format="page" text:ref-name="__RefHeading___Toc22675_1113469703">Fehler: Verweis nicht gefunden</text:bookmark-ref></text:span><text:span text:style-name="T46">), so that the corresponding Z-probes are </text:span><text:span text:style-name="T47">skipped as well </text:span><text:span text:style-name="T46">during </text:span><text:span text:style-name="T48">the </text:span><text:span text:style-name="T46">measuring run</text:span>.</text:p>
      <text:p text:style-name="P87">For resetting skipped subpaths and Z probes, it is helpful that Z probes can have line type dash-dot: All dotted lines can be reverted to dash-dot in this case.</text:p>
      <text:h text:style-name="Heading_20_3" text:outline-level="3"><text:bookmark-start text:name="__RefHeading___Toc5579_2169950967"/>4.5.3. Measuring run<text:bookmark-end text:name="__RefHeading___Toc5579_2169950967"/></text:h>
      <text:p text:style-name="Text_20_body">For the measuring run, the milling cutter must be connected to one of the measuring connections. At the Z-probe points, either the probe must be placed as described above or a conductive contact must be established between the profile and the probe.</text:p>
      <text:p text:style-name="Text_20_body">After starting the _Probing.gcode file, the milling cutter moves to all Z-probe points in the order in which they are noted in the _Z.txt file. If the milling cutter touches the probe or the profile, it stops for 4 seconds in each case so that the Z value can be transferred to the _Z.txt file. To do this, the Z value read in UGS is entered there manually, e.g. like this:</text:p>
      <text:p text:style-name="P85">@[138.000|299.000] #2001=5,1</text:p>
      <text:p text:style-name="P85">@[242.000|264.000] #2002= 5.25</text:p>
      <text:p text:style-name="P74">Both commas and periods are allowed as decimal points; spaces or tabs can be placed before and after the numbers.</text:p>
      <text:h text:style-name="Heading_20_3" text:outline-level="3"><text:bookmark-start text:name="__RefHeading___Toc5581_2169950967"/>4.5.4. Creating the _Milling.gcode file<text:bookmark-end text:name="__RefHeading___Toc5581_2169950967"/></text:h>
      <text:p text:style-name="P74">A PathGCodeAdjustZ call (see p. <text:bookmark-ref text:reference-format="page" text:ref-name="__RefHeading__7011_810929200">32</text:bookmark-ref>) finally generates the final _Milling.gcode file from the _Clean.gcode and _Z.txt files.</text:p>
      <text:h text:style-name="Heading_20_2" text:outline-level="2"><text:bookmark-start text:name="__RefHeading___Toc5583_2169950967"/>4.6. Calling PathDxf2GCode<text:bookmark-end text:name="__RefHeading___Toc5583_2169950967"/></text:h>
      <text:h text:style-name="Heading_20_3" text:outline-level="3"><text:bookmark-start text:name="__RefHeading__1108_1253387321"/>4.6.1. Command line options<text:bookmark-end text:name="__RefHeading__1108_1253387321"/></text:h>
      <text:p text:style-name="Text_20_body">All DXF files for which G-code files are to be generated are provided, together with three required parameters:</text:p>
      <text:p text:style-name="P88"><text:tab/>PathDxf2GCode /f150 /v1000 /s15 8001.27.1P.DXF 8001.27.2P.DXF</text:p>
      <text:p text:style-name="Text_20_body">PathDxf2GCode stores the generated G-code files in the same directory as the transferred DXF files.</text:p>
      <text:p text:style-name="Text_20_body">The following options can also be specified (see also p. <text:bookmark-ref text:reference-format="page" text:ref-name="__RefHeading__1649_1253387321">15</text:bookmark-ref>):</text:p>
      <text:p text:style-name="P89"><text:s text:c="4"/>/h <text:s text:c="4"/>Help text</text:p>
      <text:p text:style-name="P89"><text:s text:c="4"/>/f 000 Milling speed in mm/min; required</text:p>
      <text:p text:style-name="P89"><text:s text:c="4"/>/z 000 Probing speed in mm/min; default is /f value</text:p>
      <text:p text:style-name="P89"><text:s text:c="4"/>/v 000 Maximum speed for sweeps in mm/min; required</text:p>
      <text:p text:style-name="P89"><text:s text:c="4"/>/s 000 Default sweep height in mm; required</text:p>
      <text:p text:style-name="P89"><text:s text:c="4"/>/c <text:s text:c="4"/>Check all paths in DXF file without writing GCode; if /c is not</text:p>
      <text:p text:style-name="P89"><text:s text:c="11"/>provided the DXF file must contain only one layer path</text:p>
      <text:p text:style-name="P89"><text:s text:c="4"/>/x zzz For all texts matching this regular expression, write assigned</text:p>
      <text:p text:style-name="P89"><text:s text:c="11"/>DXF objects; this is helpful for debugging parameter texts</text:p>
      <text:p text:style-name="P89"><text:s text:c="4"/>/d zzz Search path for references DXF files; can be specified multiple</text:p>
      <text:p text:style-name="P89"><text:s text:c="11"/>times; default is the location of the DXF file</text:p>
      <text:p text:style-name="P89"><text:soft-page-break/><text:s text:c="4"/>/n zzz Regular expression for path names; default value is </text:p>
      <text:p text:style-name="P89"><text:s text:c="11"/>([0-9]{4})[.]([0-9]+)([A-Z])</text:p>
      <text:p text:style-name="P89"><text:s text:c="4"/>/p zzz Regular expression for path patterns in file names; default is</text:p>
      <text:p text:style-name="P89"><text:s text:c="11"/>([0-9]{4})(?:[.]([0-9]+))?</text:p>
      <text:p text:style-name="P89"><text:s text:c="4"/>/l zzz Language</text:p>
      <text:p text:style-name="P89"/>
      <text:p text:style-name="Text_20_body">Example calls:</text:p>
      <text:p text:style-name="P88"><text:tab/>PathDxf2GCode /h</text:p>
      <text:p text:style-name="P88"><text:tab/>PathDxf2GCode /f150 /v1000 /s15 /d..\Components “2913 Ph.DXF“</text:p>
      <text:p text:style-name="P88"><text:tab/>PathDxf2GCode /f 150 /v 1000 /s 15 /c /d ..\Components “2050-2051 P.1v.DXF“</text:p>
      <text:h text:style-name="Heading_20_3" text:outline-level="3"><text:bookmark-start text:name="__RefHeading__1513_1392561347"/>4.6.2. Problems and their solutions<text:bookmark-end text:name="__RefHeading__1513_1392561347"/></text:h>
      <text:h text:style-name="Heading_20_4" text:outline-level="4"><text:bookmark-start text:name="__RefHeading___Toc5585_2169950967"/>4.6.2.1. „Path definition … not found.“<text:bookmark-end text:name="__RefHeading___Toc5585_2169950967"/></text:h>
      <text:p text:style-name="Text_20_body">Possible triggers:</text:p>
      <text:list xml:id="list3765979564" text:style-name="L37">
        <text:list-item>
          <text:p text:style-name="P90">Starting point of a path not provided with line type “dash-double dash” (DXF: PHANTOM) → Solution: Provide starting point with line type “dash-double dash”.</text:p>
        </text:list-item>
      </text:list>
      <text:h text:style-name="Heading_20_4" text:outline-level="4"><text:bookmark-start text:name="__RefHeading___Toc5587_2169950967"/>4.6.2.2. „End marker missing.“<text:bookmark-end text:name="__RefHeading___Toc5587_2169950967"/></text:h>
      <text:p text:style-name="Text_20_body">Reason: A path does not contain a valid end marker.</text:p>
      <text:p text:style-name="Text_20_body">Possible triggers:</text:p>
      <text:list xml:id="list193461816915066" text:continue-numbering="true" text:style-name="L37">
        <text:list-item>
          <text:p text:style-name="P90">End point of a path not provided with line type “dash-double dash” (DXF: PHANTOM) → Solution: Provide end point with line type “dash-double dash”.</text:p>
        </text:list-item>
      </text:list>
      <text:h text:style-name="Heading_20_4" text:outline-level="4"><text:bookmark-start text:name="__RefHeading___Toc5589_2169950967"/>4.6.2.3. “S value missing.”, “B value missing.”, ...<text:bookmark-end text:name="__RefHeading___Toc5589_2169950967"/></text:h>
      <text:p text:style-name="Text_20_body">Reason: A segment cannot determine the required value.</text:p>
      <text:p text:style-name="Text_20_body">Possible triggers:</text:p>
      <text:list text:continue-numbering="true" text:style-name="L37">
        <text:list-item>
          <text:p text:style-name="P90">The value is neither defined at the start of the path nor at the segment → Solution: Define value.</text:p>
        </text:list-item>
      </text:list>
      <text:h text:style-name="Heading_20_4" text:outline-level="4"><text:bookmark-start text:name="__RefHeading__1951_1392561347"/>4.6.2.4. „No further segments” at the specified point.“<text:bookmark-end text:name="__RefHeading__1951_1392561347"/></text:h>
      <text:p text:style-name="Text_20_body">Reason: No further segments connected at the specified point.</text:p>
      <text:p text:style-name="Text_20_body">Possible triggers:</text:p>
      <text:list text:style-name="L38">
        <text:list-item>
          <text:p text:style-name="P91">End without continuation (e.g. two lines do not meet at a point; or a line does not end exactly at the center of a hole circle) → Solution: Find point in the drawing<text:note text:id="ftn8" text:note-class="footnote"><text:note-citation>8</text:note-citation><text:note-body><text:p text:style-name="Footnote">In BeckerCAD, one can find the problem location as follows: Select „Point“ drawing, then move the mouse or enter the coordinates in the entry dialog.</text:p></text:note-body></text:note> and connect lines and circle centers exactly to each other.</text:p>
        </text:list-item>
        <text:list-item>
          <text:p text:style-name="P91">Duplicate elements that lie exactly on top of each other; after traveling over one element and returning over the other “it doesn't go any further” → Solution: Remove duplicate elements.</text:p>
        </text:list-item>
        <text:list-item>
          <text:p text:style-name="P91">A line may not be in the path layer → Solution: Find the point in the drawing and move the line to the correct layer.</text:p>
        </text:list-item>
        <text:list-item>
          <text:p text:style-name="P91">Elements are used in the path that PathDxf2GCode does not support (e.g. splines) → <text:soft-page-break/>Solution: Find the point in the drawing and replace elements from there with supported elements (see p. <text:bookmark-ref text:reference-format="page" text:ref-name="__RefHeading__1649_1253387321">15</text:bookmark-ref>).</text:p>
        </text:list-item>
      </text:list>
      <text:h text:style-name="Heading_20_2" text:outline-level="2"><text:bookmark-start text:name="__RefHeading__7011_810929200"/>4<text:span text:style-name="T16">.7.</text:span> <text:span text:style-name="T16">Calling PathGCodeAdjustZ</text:span><text:bookmark-end text:name="__RefHeading__7011_810929200"/></text:h>
      <text:h text:style-name="Heading_20_3" text:outline-level="3"><text:bookmark-start text:name="__RefHeading___Toc5591_2169950967"/>4<text:span text:style-name="T16">.7.</text:span>1. Command line options<text:bookmark-end text:name="__RefHeading___Toc5591_2169950967"/></text:h>
      <text:p text:style-name="Text_20_body">The _Clean.gcode files for which the Z-correction is to be carried out are usually specified when the program is called. The names of the associated _T.txt files and the result file (_Milling.gcode file) are derived from this. Instead of the _Clean.gcode files, the _Z.txt files and also the DXF files from which the _Clean.gcode files were generated can also be specified:</text:p>
      <text:p text:style-name="P88"><text:tab/>PathGCodeAdjustZ 8001.27.1P_Clean.gcode 8001.27.2P.DXF</text:p>
      <text:p text:style-name="Text_20_body">The following options can also be specified:</text:p>
      <text:p text:style-name="P88"><text:s text:c="4"/>/h <text:s text:c="4"/>Help text<text:line-break/> <text:s text:c="3"/>/m 000 Maximum correction of Z values; required<text:line-break/> <text:s text:c="3"/>/x zzz Regex for lines to be written to standard output<text:line-break/> <text:s text:c="3"/>/l zzz Language</text:p>
      <text:h text:style-name="P92" text:outline-level="3"><text:bookmark-start text:name="__RefHeading___Toc5593_2169950967"/>4.7.2. Maximum Z correction<text:bookmark-end text:name="__RefHeading___Toc5593_2169950967"/></text:h>
      <text:p text:style-name="P74">In practice, it turned out that I would specify wrong T values for Z probes (especially when using the T value at the path start), for example T5 instead of T2. If the measuring run then returned a value of e.g. T=2.1 mm, the computed correction would be 5–2,1 = 2,9 mm, and the milling bit would thus dive almost 3 mm into the metal, and break off. To prevent this, one must specify a maximum Z correction. Typically, I use 0.9 mm, which hopefully spots all T value specifications off <text:s/>by a millimeter or more.</text:p>
      <text:h text:style-name="P92" text:outline-level="3"><text:bookmark-start text:name="__RefHeading___Toc5595_2169950967"/>4.7.3. Emitting statistics lines<text:bookmark-end text:name="__RefHeading___Toc5595_2169950967"/></text:h>
      <text:p text:style-name="Standard"><text:span text:style-name="T16">The Clean file contains at the very end useful statistics about the expected milling duration. Instead of looking there with an editor, it is possible to pass a regular expressio nto PathGCodeAdjustZ, which will output matching lines from the Clean file to the standard output. The statistics lines can be made visible there with </text:span><text:span text:style-name="T49">/x mm.*min</text:span><text:span text:style-name="T16">.</text:span></text:p>
      <text:h text:style-name="P92" text:outline-level="3"><text:bookmark-start text:name="__RefHeading___Toc5597_2169950967"/>4.7.4. Problems and their solutions<text:bookmark-end text:name="__RefHeading___Toc5597_2169950967"/></text:h>
      <text:h text:style-name="P93" text:outline-level="4"><text:bookmark-start text:name="__RefHeading___Toc5599_2169950967"/>4.7.4.1. “Line does not have the format ‘(comment) #...=value’”<text:bookmark-end text:name="__RefHeading___Toc5599_2169950967"/></text:h>
      <text:p text:style-name="P74">Usually the values are missing after the equal signs.</text:p>
      <text:p text:style-name="P74">If you want to mill without Z-adjustments, you can also send the respective _Clean.gcode file directly to the milling machine.</text:p>
      <text:h text:style-name="Heading_20_2" text:outline-level="2"><text:bookmark-start text:name="__RefHeading___Toc5601_2169950967"/>4.<text:span text:style-name="T16">8</text:span>. Milling run<text:bookmark-end text:name="__RefHeading___Toc5601_2169950967"/></text:h>
      <text:p text:style-name="Text_20_body">For the milling process</text:p>
      <text:list text:style-name="L39">
        <text:list-item>
          <text:p text:style-name="P94">the generated G-code files</text:p>
        </text:list-item>
        <text:list-item>
          <text:p text:style-name="P94">and the associated PDFs of the path constructions (both project path constructions and component path constructions)</text:p>
        </text:list-item>
      </text:list>
      <text:p text:style-name="Text_20_body"><text:soft-page-break/>are transferred to the control computer of the milling machine.</text:p>
      <text:p text:style-name="Text_20_body">The subsequent milling process is not described here.</text:p>
      <text:h text:style-name="Heading_20_1" text:outline-level="1"/>
      <text:h text:style-name="P11" text:outline-level="1"><text:bookmark-start text:name="__RefHeading___Toc5603_2169950967"/>5. Program documentation<text:bookmark-end text:name="__RefHeading___Toc5603_2169950967"/></text:h>
      <text:h text:style-name="Heading_20_2" text:outline-level="2"><text:bookmark-start text:name="__RefHeading___Toc5605_2169950967"/>5.1. Overview<text:bookmark-end text:name="__RefHeading___Toc5605_2169950967"/></text:h>
      <text:p text:style-name="Text_20_body">PathDxf2GCode is essentially a 6-pass compiler written in C#, which transforms the DXF input into the G-code output in several phases. All 6 phases are run through completely for each input file; other files read in for embedded paths are only read once and then stored in a cache.</text:p>
      <text:p text:style-name="Text_20_body">PathDxf2GCode's own code comprises approx. 1300 NLOC, that of PathGCodeAdjustZ approx. 150 NLOC. In addition, there is the (with 19000 NLOC much larger) netDxf library (see <text:a xlink:type="simple" xlink:href="https://github.com/haplokuon/netDxf" text:style-name="Internet_20_link" text:visited-style-name="Visited_20_Internet_20_Link">haplokuon/netDxf: .net dxf Reader-Writer (github.com)</text:a>).</text:p>
      <text:h text:style-name="Heading_20_2" text:outline-level="2"><text:bookmark-start text:name="__RefHeading___Toc5607_2169950967"/>5.2. Github project<text:bookmark-end text:name="__RefHeading___Toc5607_2169950967"/></text:h>
      <text:p text:style-name="Text_20_body">PathDxf2GCode is hosted on at <text:a xlink:type="simple" xlink:href="https://github.com/hmmueller/PathDxf2GCode" text:style-name="Internet_20_link" text:visited-style-name="Visited_20_Internet_20_Link">https://github.com/hmmueller/PathDxf2GCode</text:a> .</text:p>
      <text:h text:style-name="Heading_20_2" text:outline-level="2"><text:bookmark-start text:name="__RefHeading___Toc5609_2169950967"/>5.3. Compiler passes<text:bookmark-end text:name="__RefHeading___Toc5609_2169950967"/></text:h>
      <text:p text:style-name="P95">The 6 passes are:</text:p>
      <text:list text:style-name="L40">
        <text:list-item>
          <text:p text:style-name="P96">DXF-Datei → <text:span text:style-name="T50">DxfDocument</text:span>; the netDxf library is used for this. The central method of this pass is <text:span text:style-name="T50">DxfFile.LoadDxfDocument</text:span>.</text:p>
        </text:list-item>
      </text:list>
      <text:list text:style-name="L41">
        <text:list-item>
          <text:p text:style-name="P97"><text:span text:style-name="T7">DxfDocument</text:span> → <text:span text:style-name="T7">RawPathModel</text:span>; <text:span text:style-name="T7">RawPathModel</text:span> is a temporary representation of the paths from a path drawing. Each path consists of</text:p>
        </text:list-item>
      </text:list>
      <text:list text:style-name="L42">
        <text:list-item>
          <text:p text:style-name="P98">path segments (types: <text:span text:style-name="T7">MillSegment</text:span>, <text:span text:style-name="T7">SweepSegment</text:span>, <text:span text:style-name="T7">HelixSegment</text:span>, <text:span text:style-name="T7">DrillSegment</text:span><text:span text:style-name="T51"> a</text:span>nd <text:span text:style-name="T7">SubpathSegment</text:span>),</text:p>
          <text:list>
            <text:list-item>
              <text:p text:style-name="P98">where MillSegments have a <text:span text:style-name="T7">MillingGeometry</text:span> of type <text:span text:style-name="T7">LineGeometry</text:span> or <text:span text:style-name="T7">ArcGeometry</text:span>;</text:p>
            </text:list-item>
          </text:list>
        </text:list-item>
        <text:list-item>
          <text:p text:style-name="P98">Markers (start and end points)</text:p>
        </text:list-item>
        <text:list-item>
          <text:p text:style-name="P98">and path parameters.</text:p>
        </text:list-item>
      </text:list>
      <text:p text:style-name="P99">The central method of this pass is <text:span text:style-name="T50">PathModel.TransformDxf2PathModel</text:span>.</text:p>
      <text:list text:style-name="L43">
        <text:list-item>
          <text:p text:style-name="P100">combining milling segments into milling chains; the central method for this is <text:span text:style-name="T50">PathModel.CreatePathModel</text:span>.</text:p>
        </text:list-item>
        <text:list-item>
          <text:p text:style-name="P100"><text:span text:style-name="T50">PathModel</text:span> → <text:span text:style-name="T50">GCode</text:span>-Liste; the central method of this text output is <text:span text:style-name="T50">PathModel.EmitGCode</text:span> together with the <text:span text:style-name="T52">EmitGCode</text:span>-methods in the <text:span text:style-name="T7">GCode</text:span>-hierarchy. </text:p>
        </text:list-item>
        <text:list-item>
          <text:p text:style-name="P100">Peephole optimizer of the GCode list (currently for summarizing consecutive sweeps); the central method for this is <text:span text:style-name="T50">GCodeHelpers.Optimize</text:span>, together with the <text:span text:style-name="T50">Gcode</text:span>-class hierarchy.</text:p>
        </text:list-item>
        <text:list-item>
          <text:p text:style-name="P100">output of the G-code file; the central methods <text:span text:style-name="T53">are </text:span><text:span text:style-name="T50">WriteGCodes</text:span> and <text:span text:style-name="T7">WriteZProbingGCode</text:span> in the <text:span text:style-name="T50">Program</text:span><text:span text:style-name="T53"> class,</text:span> the <text:span text:style-name="T50">AsString</text:span>-methods of the <text:span text:style-name="T50">Gcode</text:span>-hierarchy and the <text:span text:style-name="T7">WriteEmptyZ</text:span>-methods.</text:p>
        </text:list-item>
      </text:list>
      <text:h text:style-name="Heading_20_2" text:outline-level="2"><text:bookmark-start text:name="__RefHeading___Toc5611_2169950967"/>5.4. Basic data structures<text:bookmark-end text:name="__RefHeading___Toc5611_2169950967"/></text:h>
      <text:p text:style-name="Text_20_body">The following diagram shows examples of a helix, line, and arc segment and the most important objects associated with them:</text:p>
      <text:p text:style-name="P33"><text:soft-page-break/><text:s text:c="11"/><text:span text:style-name="T5">netDxf-EntityObjects <text:s text:c="3"/>RawSegments <text:s text:c="9"/>Segments</text:span></text:p>
      <text:p text:style-name="Text_20_body"><draw:frame draw:style-name="fr2" draw:name="Grafik18" text:anchor-type="paragraph" svg:width="12.755cm" svg:height="7.826cm" draw:z-index="36"><draw:image xlink:href="Pictures/2000000700004055000025F5334A78AF.svm" xlink:type="simple" xlink:show="embed" xlink:actuate="onLoad" draw:mime-type="image/x-svm"/><draw:image xlink:href="Pictures/100000010000030B000001CC003BCA94.png" xlink:type="simple" xlink:show="embed" xlink:actuate="onLoad" draw:mime-type="image/png"/></draw:frame></text:p>
      <text:h text:style-name="Heading_20_2" text:outline-level="2"><text:bookmark-start text:name="__RefHeading___Toc5613_2169950967"/>5.5. Special data structures and algorithms in PathDxf2GCode<text:bookmark-end text:name="__RefHeading___Toc5613_2169950967"/></text:h>
      <text:h text:style-name="Heading_20_3" text:outline-level="3"><text:bookmark-start text:name="__RefHeading___Toc5615_2169950967"/>5.5.1. GCodeHelpers.cs<text:bookmark-end text:name="__RefHeading___Toc5615_2169950967"/></text:h>
      <text:h text:style-name="Heading_20_4" text:outline-level="4"><text:bookmark-start text:name="__RefHeading___Toc5617_2169950967"/>5.5.1.1. Optimize<text:bookmark-end text:name="__RefHeading___Toc5617_2169950967"/></text:h>
      <text:p text:style-name="Text_20_body">This method is a peephole optimizer for the generated GCode list. Patterns to be optimized are detected using regular expressions, for which each GCode object is represented by a character (propery <text:span text:style-name="T7">Letter</text:span>) .</text:p>
      <text:list text:style-name="L44">
        <text:list-item>
          <text:p text:style-name="P101">Currently, a peephole optimizer is implemented for the aggregation of subsequent sweeps (with comments in between).</text:p>
        </text:list-item>
      </text:list>
      <text:h text:style-name="Heading_20_3" text:outline-level="3"><text:bookmark-start text:name="__RefHeading___Toc5619_2169950967"/>5.5.2. MillGeometry.cs<text:bookmark-end text:name="__RefHeading___Toc5619_2169950967"/></text:h>
      <text:p text:style-name="Text_20_body">MillGeometryHelper.CreateSupportBarGeometries</text:p>
      <text:p text:style-name="Text_20_body">This methods creates the „ups and downs“ for support bars (see p. <text:bookmark-ref text:reference-format="page" text:ref-name="__RefHeading__5343_207922309">19</text:bookmark-ref>).</text:p>
      <text:h text:style-name="Heading_20_3" text:outline-level="3"><text:bookmark-start text:name="__RefHeading___Toc5621_2169950967"/>5.5.3. Params.cs<text:bookmark-end text:name="__RefHeading___Toc5621_2169950967"/></text:h>
      <text:p text:style-name="Text_20_body">The ParamsText class is “raw”, meaning it contains the values before variable interpolation and can therefore be appended to the RawSegments. The interpolated values are stored in the Params classes.</text:p>
      <text:p text:style-name="Text_20_body">Params-objects have a parent pointer:</text:p>
      <text:list text:style-name="L45">
        <text:list-item>
          <text:p text:style-name="P102"><text:span text:style-name="T7">ChainParams, SweepParams, HelixParams, DrillParams, SubpathParams, ZProbeParams</text:span> → <text:span text:style-name="T7">PathParams</text:span></text:p>
        </text:list-item>
        <text:list-item>
          <text:p text:style-name="P103">MillParams<text:span text:style-name="T54"> → </text:span>ChainParams</text:p>
        </text:list-item>
      </text:list>
      <text:h text:style-name="Heading_20_3" text:outline-level="3"><text:bookmark-start text:name="__RefHeading___Toc5623_2169950967"/><text:soft-page-break/>5.5.4. PathModel.cs<text:bookmark-end text:name="__RefHeading___Toc5623_2169950967"/></text:h>
      <text:h text:style-name="Heading_20_4" text:outline-level="4"><text:bookmark-start text:name="__RefHeading___Toc5625_2169950967"/>5.5.4.1. Inner class RawPathModel<text:bookmark-end text:name="__RefHeading___Toc5625_2169950967"/></text:h>
      <text:p text:style-name="Text_20_body">Raw models read from a DXF file.</text:p>
      <text:h text:style-name="Heading_20_4" text:outline-level="4"><text:bookmark-start text:name="__RefHeading___Toc5627_2169950967"/>5.5.4.2. Inner class Collection<text:bookmark-end text:name="__RefHeading___Toc5627_2169950967"/></text:h>
      <text:p text:style-name="Text_20_body">Cache for RawPathModels and PathModels.</text:p>
      <text:h text:style-name="Heading_20_4" text:outline-level="4"><text:bookmark-start text:name="__RefHeading___Toc5629_2169950967"/>5.5.4.3. CollectSegments<text:bookmark-end text:name="__RefHeading___Toc5629_2169950967"/></text:h>
      <text:p text:style-name="Text_20_body">This is where </text:p>
      <text:list text:style-name="L46">
        <text:list-item>
          <text:p text:style-name="P104">the collection of all EntityObjects on paths</text:p>
        </text:list-item>
        <text:list-item>
          <text:p text:style-name="P104">the assignment of parameter texts to objects</text:p>
        </text:list-item>
        <text:list-item>
          <text:p text:style-name="P104">the evaluation of special markers (start, end, ZProbes)</text:p>
        </text:list-item>
        <text:list-item>
          <text:p text:style-name="P104">the loading of sub-paths</text:p>
        </text:list-item>
      </text:list>
      <text:p text:style-name="Text_20_body">is done to create a <text:span text:style-name="T7">RawPathModel</text:span>.7</text:p>
      <text:h text:style-name="Heading_20_4" text:outline-level="4"><text:bookmark-start text:name="__RefHeading___Toc5631_2169950967"/>5.5.4.4. NearestOverlapping&lt;T&gt;, NearestOverlappingCircle, ….Line, ...Arc, CircleOverlapsLine, ...Arc, DistanceToArcCircle, GetOverlapSurrounding<text:bookmark-end text:name="__RefHeading___Toc5631_2169950967"/></text:h>
      <text:p text:style-name="Text_20_body">Find objects for the assignment of parameter texts.</text:p>
      <text:h text:style-name="Heading_20_4" text:outline-level="4"><text:bookmark-start text:name="__RefHeading___Toc5633_2169950967"/>5.5.4.5. CreatePathModel<text:bookmark-end text:name="__RefHeading___Toc5633_2169950967"/></text:h>
      <text:p text:style-name="Text_20_body">A. Linking the RawSegments to form a path </text:p>
      <text:p text:style-name="Text_20_body">B. Generating the PathSegments</text:p>
      <text:p text:style-name="Text_20_body">C. Building MillChains from consecutive ChainSegments (Mark and MillSegments)</text:p>
      <text:p text:style-name="Text_20_body">D. Generating the parameter objects</text:p>
      <text:p text:style-name="Text_20_body">E. Linking the SubpathSegments to the respective referenced model (which may be generated) </text:p>
      <text:h text:style-name="Heading_20_4" text:outline-level="4"><text:bookmark-start text:name="__RefHeading___Toc5635_2169950967"/>5.5.4.6. CollectAndOrderAllZProbes<text:bookmark-end text:name="__RefHeading___Toc5635_2169950967"/></text:h>
      <text:p text:style-name="Text_20_body">A. Collect all ZProbes in the model and embedded models.</text:p>
      <text:p text:style-name="Text_20_body">B. Sort the ZProbes into a reasonably short round trip.</text:p>
      <text:p text:style-name="Text_20_body">C. Name the ZProbes on the round trip.</text:p>
      <text:h text:style-name="Heading_20_3" text:outline-level="3"><text:bookmark-start text:name="__RefHeading___Toc5637_2169950967"/>5.5.5. PathSegment.cs<text:bookmark-end text:name="__RefHeading___Toc5637_2169950967"/></text:h>
      <text:h text:style-name="Heading_20_4" text:outline-level="4"><text:bookmark-start text:name="__RefHeading___Toc5639_2169950967"/>5.5.5.1. Internal RawSegment classes<text:bookmark-end text:name="__RefHeading___Toc5639_2169950967"/></text:h>
      <text:p text:style-name="Text_20_body">RawSegments and PathSegments are clearly separated. The former are not dependent on variable values, while the latter are. RawSegments are factories for their respective PathSegment objects. The classes are closely linked to each other via generic parameters and, where necessary, to their Params classes.</text:p>
      <text:h text:style-name="Heading_20_4" text:outline-level="4"><text:bookmark-start text:name="__RefHeading___Toc5641_2169950967"/><text:soft-page-break/>5.5.5.2. MillChain.EmitGCode<text:bookmark-end text:name="__RefHeading___Toc5641_2169950967"/></text:h>
      <text:p text:style-name="Text_20_body">Edges are created in I-spacing for each segment of a MillChain. These edges are then run as close together as possible. If an edge connects at the same height, it is run next: Edges of one level are therefore usually milled before deeper layers are milled.</text:p>
      <text:h text:style-name="Heading_20_4" text:outline-level="4"><text:bookmark-start text:name="__RefHeading___Toc5643_2169950967"/>5.5.5.3. HelixSegment.EmitGCode<text:bookmark-end text:name="__RefHeading___Toc5643_2169950967"/></text:h>
      <text:p text:style-name="Text_20_body">A helix is composed of semicircles, each of which moves down by I/2.</text:p>
      <text:h text:style-name="Heading_20_4" text:outline-level="4"><text:bookmark-start text:name="__RefHeading___Toc5645_2169950967"/>5.5.5.4. SubPathSegment.EmitGCode<text:bookmark-end text:name="__RefHeading___Toc5645_2169950967"/></text:h>
      <text:p text:style-name="Text_20_body">A Transformation3 is created between the SubPathSegment and the referenced path, which converts the coordinates into the calling model.</text:p>
      <text:h text:style-name="Heading_20_3" text:outline-level="3"><text:bookmark-start text:name="__RefHeading___Toc5647_2169950967"/>5.5.6. Transformation2.cs<text:bookmark-end text:name="__RefHeading___Toc5647_2169950967"/></text:h>
      <text:p text:style-name="Text_20_body">The angle between two vectors is only calculated in netDxf using the main branch of arccos. This always results in angle values between 0 and p, which is not correct. The only way I could think of to solve this was to perform a “rotation test”: rotate the first vector by arccos and -arccos and check which rotation actually results in the second vector.</text:p>
      <text:h text:style-name="Heading_20_3" text:outline-level="3"><text:bookmark-start text:name="__RefHeading___Toc5649_2169950967"/>5.5.7. Transformation3.cs<text:bookmark-end text:name="__RefHeading___Toc5649_2169950967"/></text:h>
      <text:p text:style-name="Text_20_body">The Z-coordinate is not subjected to the usual transformation, but is adjusted using ZProbes.</text:p>
      <text:h text:style-name="Heading_20_2" text:outline-level="2"><text:bookmark-start text:name="__RefHeading___Toc5651_2169950967"/>5.6. Special data structures and algorithms in <text:span text:style-name="T5">PathGCodeAdjustZ</text:span><text:bookmark-end text:name="__RefHeading___Toc5651_2169950967"/></text:h>
      <text:h text:style-name="Heading_20_3" text:outline-level="3"><text:bookmark-start text:name="__RefHeading___Toc5653_2169950967"/>5.6.1. ExprEval.cs<text:bookmark-end text:name="__RefHeading___Toc5653_2169950967"/></text:h>
      <text:p text:style-name="Text_20_body">Simple LL(1) parser for a small subset of the G-code expressions used for the Z-adjustments. Both [...] and (...) are permitted as bracket pairs.</text:p>
      <text:h text:style-name="Heading_20_2" text:outline-level="2"><text:bookmark-start text:name="__RefHeading___Toc5655_2169950967"/>5.7. Currently known or suspected problems<text:bookmark-end text:name="__RefHeading___Toc5655_2169950967"/></text:h>
      <text:p text:style-name="Text_20_body">None that would particularly bother me. See Github project for details.</text:p>
      <text:h text:style-name="Heading_20_2" text:outline-level="2"><text:bookmark-start text:name="__RefHeading___Toc5657_2169950967"/>5.8. Missing features<text:bookmark-end text:name="__RefHeading___Toc5657_2169950967"/></text:h>
      <text:p text:style-name="Text_20_body">I plan to support parameterized path models soon.</text:p>
      <text:h text:style-name="P11" text:outline-level="1"><text:bookmark-start text:name="__RefHeading___Toc5659_2169950967"/>6. Tables<text:bookmark-end text:name="__RefHeading___Toc5659_2169950967"/></text:h>
      <text:h text:style-name="Heading_20_2" text:outline-level="2"><text:bookmark-start text:name="__RefHeading___Toc5661_2169950967"/>6.1. Parameters<text:bookmark-end text:name="__RefHeading___Toc5661_2169950967"/></text:h>
      <text:p text:style-name="Text_20_body"/>
      <table:table table:name="Tabelle1" table:style-name="Tabelle1">
        <table:table-column table:style-name="Tabelle1.A"/>
        <table:table-column table:style-name="Tabelle1.B"/>
        <table:table-column table:style-name="Tabelle1.C"/>
        <table:table-column table:style-name="Tabelle1.D"/>
        <table:table-header-rows>
          <table:table-row>
            <table:table-cell table:style-name="Tabelle1.A1" office:value-type="string">
              <text:p text:style-name="P105"/>
            </table:table-cell>
            <table:table-cell table:style-name="Tabelle1.A1" office:value-type="string">
              <text:p text:style-name="Table_20_Heading">Meaning</text:p>
            </table:table-cell>
            <table:table-cell table:style-name="Tabelle1.A1" office:value-type="string">
              <text:p text:style-name="Table_20_Heading">Unit</text:p>
            </table:table-cell>
            <table:table-cell table:style-name="Tabelle1.D1" office:value-type="string">
              <text:p text:style-name="Table_20_Heading">Default value</text:p>
            </table:table-cell>
          </table:table-row>
        </table:table-header-rows>
        <table:table-row>
          <table:table-cell table:style-name="Tabelle1.A2" office:value-type="string">
            <text:p text:style-name="P106">A</text:p>
          </table:table-cell>
          <table:table-cell table:style-name="Tabelle1.A2" office:value-type="string">
            <text:p text:style-name="Table_20_Contents">Greatest diameter of helical circles</text:p>
          </table:table-cell>
          <table:table-cell table:style-name="Tabelle1.A2" office:value-type="string">
            <text:p text:style-name="Table_20_Contents">mm</text:p>
          </table:table-cell>
          <table:table-cell table:style-name="Tabelle1.D2" office:value-type="string">
            <text:p text:style-name="Table_20_Contents">4 <text:span text:style-name="T17">·</text:span><text:span text:style-name="T18"> </text:span>O</text:p>
          </table:table-cell>
        </table:table-row>
        <table:table-row>
          <table:table-cell table:style-name="Tabelle1.A2" office:value-type="string">
            <text:p text:style-name="P106">B</text:p>
          </table:table-cell>
          <table:table-cell table:style-name="Tabelle1.A2" office:value-type="string">
            <text:p text:style-name="Table_20_Contents">Milling depth</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106">C</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106">D</text:p>
          </table:table-cell>
          <table:table-cell table:style-name="Tabelle1.A2" office:value-type="string">
            <text:p text:style-name="Table_20_Contents">Marking depth</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106">E</text:p>
          </table:table-cell>
          <table:table-cell table:style-name="Tabelle1.A2" office:value-type="string">
            <text:p text:style-name="P107"><text:span text:style-name="T29">Allowed subpaths </text:span>(<text:span text:style-name="T29">r</text:span>eg. <text:span text:style-name="T29">Expression</text:span>)</text:p>
          </table:table-cell>
          <table:table-cell table:style-name="Tabelle1.A2" office:value-type="string">
            <text:p text:style-name="P107">Text</text:p>
          </table:table-cell>
          <table:table-cell table:style-name="Tabelle1.D2" office:value-type="string">
            <text:p text:style-name="Table_20_Contents">/<text:span text:style-name="T29">e</text:span></text:p>
          </table:table-cell>
        </table:table-row>
        <table:table-row>
          <table:table-cell table:style-name="Tabelle1.A2" office:value-type="string">
            <text:p text:style-name="P106">F</text:p>
          </table:table-cell>
          <table:table-cell table:style-name="Tabelle1.A2" office:value-type="string">
            <text:p text:style-name="Table_20_Contents">Milling speed</text:p>
          </table:table-cell>
          <table:table-cell table:style-name="Tabelle1.A2" office:value-type="string">
            <text:p text:style-name="Table_20_Contents">mm/min</text:p>
          </table:table-cell>
          <table:table-cell table:style-name="Tabelle1.D2" office:value-type="string">
            <text:p text:style-name="Table_20_Contents">/f</text:p>
          </table:table-cell>
        </table:table-row>
        <table:table-row>
          <table:table-cell table:style-name="Tabelle1.A2" office:value-type="string">
            <text:p text:style-name="P106">G</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106">H</text:p>
          </table:table-cell>
          <table:table-cell table:style-name="Tabelle1.A2" office:value-type="string">
            <text:p text:style-name="P108">Height</text:p>
          </table:table-cell>
          <table:table-cell table:style-name="Tabelle1.A2" office:value-type="string">
            <text:p text:style-name="P109">Mm</text:p>
          </table:table-cell>
          <table:table-cell table:style-name="Tabelle1.D2" office:value-type="string">
            <text:p text:style-name="P109">0</text:p>
          </table:table-cell>
        </table:table-row>
        <table:table-row>
          <table:table-cell table:style-name="Tabelle1.A2" office:value-type="string">
            <text:p text:style-name="P106">I</text:p>
          </table:table-cell>
          <table:table-cell table:style-name="Tabelle1.A2" office:value-type="string">
            <text:p text:style-name="Table_20_Contents">Infeed</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106">J</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106">K</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106">L</text:p>
          </table:table-cell>
          <table:table-cell table:style-name="Tabelle1.A2" office:value-type="string">
            <text:p text:style-name="Table_20_Contents">Name of a Z-Probe</text:p>
          </table:table-cell>
          <table:table-cell table:style-name="Tabelle1.A2" office:value-type="string">
            <text:p text:style-name="Table_20_Contents">Text</text:p>
          </table:table-cell>
          <table:table-cell table:style-name="Tabelle1.D2" office:value-type="string">
            <text:p text:style-name="Table_20_Contents"/>
          </table:table-cell>
        </table:table-row>
        <table:table-row>
          <table:table-cell table:style-name="Tabelle1.A2" office:value-type="string">
            <text:p text:style-name="P106">M</text:p>
          </table:table-cell>
          <table:table-cell table:style-name="Tabelle1.A2" office:value-type="string">
            <text:p text:style-name="Table_20_Contents">Material</text:p>
          </table:table-cell>
          <table:table-cell table:style-name="Tabelle1.A2" office:value-type="string">
            <text:p text:style-name="Table_20_Contents">Text</text:p>
          </table:table-cell>
          <table:table-cell table:style-name="Tabelle1.D2" office:value-type="string">
            <text:p text:style-name="Table_20_Contents"/>
          </table:table-cell>
        </table:table-row>
        <table:table-row>
          <table:table-cell table:style-name="Tabelle1.A2" office:value-type="string">
            <text:p text:style-name="P106">N</text:p>
          </table:table-cell>
          <table:table-cell table:style-name="Tabelle1.A2" office:value-type="string">
            <text:p text:style-name="Table_20_Contents">Sequence number</text:p>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106">O</text:p>
          </table:table-cell>
          <table:table-cell table:style-name="Tabelle1.A2" office:value-type="string">
            <text:p text:style-name="Table_20_Contents">Milling bit diameter</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106">P</text:p>
          </table:table-cell>
          <table:table-cell table:style-name="Tabelle1.A2" office:value-type="string">
            <text:p text:style-name="P110">Support bar length</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106">Q</text:p>
          </table:table-cell>
          <table:table-cell table:style-name="Tabelle1.A2" office:value-type="string">
            <text:p text:style-name="Table_20_Contents">Comment written to G-code file</text:p>
          </table:table-cell>
          <table:table-cell table:style-name="Tabelle1.A2" office:value-type="string">
            <text:p text:style-name="Table_20_Contents">Text</text:p>
          </table:table-cell>
          <table:table-cell table:style-name="Tabelle1.D2" office:value-type="string">
            <text:p text:style-name="Table_20_Contents"/>
          </table:table-cell>
        </table:table-row>
        <table:table-row>
          <table:table-cell table:style-name="Tabelle1.A2" office:value-type="string">
            <text:p text:style-name="P106">R</text:p>
          </table:table-cell>
          <table:table-cell table:style-name="Tabelle1.A2" office:value-type="string">
            <text:p text:style-name="P111"/>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106">S</text:p>
          </table:table-cell>
          <table:table-cell table:style-name="Tabelle1.A2" office:value-type="string">
            <text:p text:style-name="Table_20_Contents">Sweep height</text:p>
          </table:table-cell>
          <table:table-cell table:style-name="Tabelle1.A2" office:value-type="string">
            <text:p text:style-name="Table_20_Contents">mm</text:p>
          </table:table-cell>
          <table:table-cell table:style-name="Tabelle1.D2" office:value-type="string">
            <text:p text:style-name="Table_20_Contents">Project: /s</text:p>
            <text:p text:style-name="Table_20_Contents">Subpaths: T+O</text:p>
          </table:table-cell>
        </table:table-row>
        <table:table-row>
          <table:table-cell table:style-name="Tabelle1.A2" office:value-type="string">
            <text:p text:style-name="P106">T</text:p>
          </table:table-cell>
          <table:table-cell table:style-name="Tabelle1.A2" office:value-type="string">
            <text:p text:style-name="Table_20_Contents">Material thickness</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106">U</text:p>
          </table:table-cell>
          <table:table-cell table:style-name="Tabelle1.A2" office:value-type="string">
            <text:p text:style-name="P110">Lower bound of support bar distance</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106">V</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106">W</text:p>
          </table:table-cell>
          <table:table-cell table:style-name="Tabelle1.A2" office:value-type="string">
            <text:p text:style-name="Table_20_Contents">Top milling depth for „slow milling“</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106">X</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106">Y</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106">Z</text:p>
          </table:table-cell>
          <table:table-cell table:style-name="Tabelle1.A2" office:value-type="string">
            <text:p text:style-name="Table_20_Contents">Z-Probe measuring speed</text:p>
          </table:table-cell>
          <table:table-cell table:style-name="Tabelle1.A2" office:value-type="string">
            <text:p text:style-name="Table_20_Contents">mm/min</text:p>
          </table:table-cell>
          <table:table-cell table:style-name="Tabelle1.D2" office:value-type="string">
            <text:p text:style-name="Table_20_Contents">/<text:span text:style-name="T55">z</text:span></text:p>
          </table:table-cell>
        </table:table-row>
        <table:table-row>
          <table:table-cell table:style-name="Tabelle1.A2" office:value-type="string">
            <text:p text:style-name="P106">&gt;</text:p>
          </table:table-cell>
          <table:table-cell table:style-name="Tabelle1.A2" office:value-type="string">
            <text:p text:style-name="Table_20_Contents">Subpath name</text:p>
          </table:table-cell>
          <table:table-cell table:style-name="Tabelle1.A2" office:value-type="string">
            <text:p text:style-name="Table_20_Contents">Text</text:p>
          </table:table-cell>
          <table:table-cell table:style-name="Tabelle1.D2" office:value-type="string">
            <text:p text:style-name="Table_20_Contents"/>
          </table:table-cell>
        </table:table-row>
        <table:table-row>
          <table:table-cell table:style-name="Tabelle1.A2" office:value-type="string">
            <text:p text:style-name="P106">.</text:p>
          </table:table-cell>
          <table:table-cell table:style-name="Tabelle1.A2" office:value-type="string">
            <text:p text:style-name="Table_20_Contents">Variable definitions and value assignments</text:p>
          </table:table-cell>
          <table:table-cell table:style-name="Tabelle1.A2" office:value-type="string">
            <text:p text:style-name="Table_20_Contents">Text</text:p>
          </table:table-cell>
          <table:table-cell table:style-name="Tabelle1.D2" office:value-type="string">
            <text:p text:style-name="Table_20_Contents"/>
          </table:table-cell>
        </table:table-row>
        <table:table-row>
          <table:table-cell table:style-name="Tabelle1.A2" office:value-type="string">
            <text:p text:style-name="Table_20_Contents"/>
          </table:table-cell>
          <table:table-cell table:style-name="Tabelle1.A2" office:value-type="string">
            <text:p text:style-name="Table_20_Contents">Sweep speed </text:p>
          </table:table-cell>
          <table:table-cell table:style-name="Tabelle1.A2" office:value-type="string">
            <text:p text:style-name="Table_20_Contents">mm/min</text:p>
          </table:table-cell>
          <table:table-cell table:style-name="Tabelle1.D2" office:value-type="string">
            <text:p text:style-name="Table_20_Contents">/<text:span text:style-name="T55">v</text:span></text:p>
          </table:table-cell>
        </table:table-row>
      </table:table>
      <text:h text:style-name="Heading_20_2" text:outline-level="2"><text:bookmark-start text:name="__RefHeading___Toc5663_2169950967"/><text:soft-page-break/>6.2. Line types<text:bookmark-end text:name="__RefHeading___Toc5663_2169950967"/></text:h>
      <table:table table:name="Tabelle2" table:style-name="Tabelle2">
        <table:table-column table:style-name="Tabelle2.A"/>
        <table:table-column table:style-name="Tabelle2.B"/>
        <table:table-column table:style-name="Tabelle2.C"/>
        <table:table-column table:style-name="Tabelle2.D"/>
        <table:table-header-rows>
          <table:table-row>
            <table:table-cell table:style-name="Tabelle2.A1" office:value-type="string">
              <text:p text:style-name="Table_20_Heading">Line type</text:p>
            </table:table-cell>
            <table:table-cell table:style-name="Tabelle2.A1" office:value-type="string">
              <text:p text:style-name="Table_20_Heading">AUTOCAD-Name</text:p>
            </table:table-cell>
            <table:table-cell table:style-name="Tabelle2.A1" office:value-type="string">
              <text:p text:style-name="Table_20_Heading">Meaning</text:p>
            </table:table-cell>
            <table:table-cell table:style-name="Tabelle2.D1" office:value-type="string">
              <text:p text:style-name="Table_20_Heading">Parameters</text:p>
            </table:table-cell>
          </table:table-row>
        </table:table-header-rows>
        <table:table-row>
          <table:table-cell table:style-name="Tabelle2.A2" office:value-type="string">
            <text:p text:style-name="Table_20_Contents">----------</text:p>
          </table:table-cell>
          <table:table-cell table:style-name="Tabelle2.A2" office:value-type="string">
            <text:p text:style-name="Table_20_Contents">CONTINUOUS</text:p>
          </table:table-cell>
          <table:table-cell table:style-name="Tabelle2.A2" office:value-type="string">
            <text:p text:style-name="Table_20_Contents">Milling</text:p>
          </table:table-cell>
          <table:table-cell table:style-name="Tabelle2.D2" office:value-type="string">
            <text:p text:style-name="Table_20_Contents">N I F B W</text:p>
          </table:table-cell>
        </table:table-row>
        <table:table-row>
          <table:table-cell table:style-name="Tabelle2.A2" office:value-type="string">
            <text:p text:style-name="Table_20_Contents">- . . - . . -</text:p>
          </table:table-cell>
          <table:table-cell table:style-name="Tabelle2.A2" office:value-type="string">
            <text:p text:style-name="Table_20_Contents">DIVIDE</text:p>
          </table:table-cell>
          <table:table-cell table:style-name="Tabelle2.A2" office:value-type="string">
            <text:p text:style-name="Table_20_Contents">Marking</text:p>
          </table:table-cell>
          <table:table-cell table:style-name="Tabelle2.D2" office:value-type="string">
            <text:p text:style-name="Table_20_Contents">N I F D W</text:p>
          </table:table-cell>
        </table:table-row>
        <table:table-row>
          <table:table-cell table:style-name="Tabelle2.A2" office:value-type="string">
            <text:p text:style-name="Table_20_Contents">- - . - - . - -</text:p>
          </table:table-cell>
          <table:table-cell table:style-name="Tabelle2.A2" office:value-type="string">
            <text:p text:style-name="P110">BORDER</text:p>
          </table:table-cell>
          <table:table-cell table:style-name="Tabelle2.A2" office:value-type="string">
            <text:p text:style-name="P110">Milling with support bars</text:p>
          </table:table-cell>
          <table:table-cell table:style-name="Tabelle2.D2" office:value-type="string">
            <text:p text:style-name="Table_20_Contents">N I F B D P U W</text:p>
          </table:table-cell>
        </table:table-row>
        <table:table-row>
          <table:table-cell table:style-name="Tabelle2.A2" office:value-type="string">
            <text:p text:style-name="Table_20_Contents">- - - - - - </text:p>
          </table:table-cell>
          <table:table-cell table:style-name="Tabelle2.A2" office:value-type="string">
            <text:p text:style-name="Table_20_Contents">DASHED</text:p>
          </table:table-cell>
          <table:table-cell table:style-name="Tabelle2.A2" office:value-type="string">
            <text:p text:style-name="Table_20_Contents">Sweep</text:p>
          </table:table-cell>
          <table:table-cell table:style-name="Tabelle2.D2" office:value-type="string">
            <text:p text:style-name="Table_20_Contents">N S</text:p>
          </table:table-cell>
        </table:table-row>
        <table:table-row>
          <table:table-cell table:style-name="Tabelle2.A2" office:value-type="string">
            <text:p text:style-name="Table_20_Contents">– – – – – </text:p>
          </table:table-cell>
          <table:table-cell table:style-name="Tabelle2.A2" office:value-type="string">
            <text:p text:style-name="Table_20_Contents">HIDDEN</text:p>
          </table:table-cell>
          <table:table-cell table:style-name="Tabelle2.A2" office:value-type="string">
            <text:p text:style-name="Table_20_Contents">Sweep without parameters</text:p>
          </table:table-cell>
          <table:table-cell table:style-name="Tabelle2.D2" office:value-type="string">
            <text:p text:style-name="Table_20_Contents"/>
          </table:table-cell>
        </table:table-row>
        <table:table-row>
          <table:table-cell table:style-name="Tabelle2.A2" office:value-type="string">
            <text:p text:style-name="Table_20_Contents">- . - . - . - . -</text:p>
          </table:table-cell>
          <table:table-cell table:style-name="Tabelle2.A2" office:value-type="string">
            <text:p text:style-name="Table_20_Contents">DASHDOT</text:p>
          </table:table-cell>
          <table:table-cell table:style-name="Tabelle2.A2" office:value-type="string">
            <text:p text:style-name="Table_20_Contents">Subpath </text:p>
            <text:p text:style-name="P112">Z probe</text:p>
          </table:table-cell>
          <table:table-cell table:style-name="Tabelle2.D2" office:value-type="string">
            <text:p text:style-name="P113">&gt; M T O <text:span text:style-name="T56">H</text:span></text:p>
            <text:p text:style-name="P114">T L Z <text:span text:style-name="T56">H</text:span></text:p>
          </table:table-cell>
        </table:table-row>
        <table:table-row>
          <table:table-cell table:style-name="Tabelle2.A2" office:value-type="string">
            <text:p text:style-name="Table_20_Contents">‍………..</text:p>
          </table:table-cell>
          <table:table-cell table:style-name="Tabelle2.A2" office:value-type="string">
            <text:p text:style-name="P115">DOT</text:p>
          </table:table-cell>
          <table:table-cell table:style-name="Tabelle2.A2" office:value-type="string">
            <text:p text:style-name="P115">Subpath as sweep</text:p>
            <text:p text:style-name="P116">Ignored Z <text:span text:style-name="T57">p</text:span>robe</text:p>
          </table:table-cell>
          <table:table-cell table:style-name="Tabelle2.D2" office:value-type="string">
            <text:p text:style-name="P113">&gt; <text:span text:style-name="T58">M T O </text:span><text:span text:style-name="T56">H</text:span></text:p>
            <text:p text:style-name="P117">T L Z <text:span text:style-name="T56">H</text:span></text:p>
          </table:table-cell>
        </table:table-row>
        <table:table-row>
          <table:table-cell table:style-name="Tabelle2.A2" office:value-type="string">
            <text:p text:style-name="Table_20_Contents">– - - – - - – </text:p>
          </table:table-cell>
          <table:table-cell table:style-name="Tabelle2.A2" office:value-type="string">
            <text:p text:style-name="Table_20_Contents">PHANTOM</text:p>
          </table:table-cell>
          <table:table-cell table:style-name="Tabelle2.A2" office:value-type="string">
            <text:p text:style-name="Table_20_Contents">Special circles</text:p>
            <text:p text:style-name="Table_20_Contents">- 1 mm: Start</text:p>
            <text:p text:style-name="Table_20_Contents">- 2mm: End</text:p>
            <text:p text:style-name="Table_20_Contents">- 6mm: Z <text:span text:style-name="T57">p</text:span>robe</text:p>
          </table:table-cell>
          <table:table-cell table:style-name="Tabelle2.D2" office:value-type="string">
            <text:p text:style-name="Table_20_Contents"/>
            <text:p text:style-name="P113">T O M B I F D U P S A W</text:p>
            <text:p text:style-name="Table_20_Contents"/>
            <text:p text:style-name="Table_20_Contents">T L Z <text:span text:style-name="T59">H</text:span></text:p>
          </table:table-cell>
        </table:table-row>
      </table:table>
      <text:p text:style-name="Text_20_body"/>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Cascadia Mono" svg:font-family="'Cascadia Mono'"/>
    <style:font-face style:name="Cascadia Mono1" svg:font-family="'Cascadia Mono'" style:font-family-generic="modern" style:font-pitch="fixed"/>
    <style:font-face style:name="Courier New" svg:font-family="'Courier New'" style:font-family-generic="modern" style:font-pitch="fixed"/>
    <style:font-face style:name="Microsoft YaHei" svg:font-family="'Microsoft YaHei'" style:font-family-generic="system" style:font-pitch="variable"/>
    <style:font-face style:name="OpenSymbol" svg:font-family="OpenSymbol"/>
    <style:font-face style:name="SimSun" svg:font-family="SimSun" style:font-family-generic="system" style:font-pitch="variable"/>
    <style:font-face style:name="Times New Roman" svg:font-family="'Times New Roman'" style:font-family-generic="roman" style:font-pitch="variable"/>
    <style:font-face style:name="Trebuchet MS" svg:font-family="'Trebuchet MS'" style:font-family-generic="swiss" style:font-pitch="variable"/>
  </office:font-face-decls>
  <office:styles>
    <draw:marker draw:name="Arrow" svg:viewBox="0 0 20 30" svg:d="M10 0l-10 30h20z"/>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Times New Roman" fo:font-size="12pt" fo:language="de" fo:country="AT" style:letter-kerning="true" style:font-name-asian="SimSun" style:font-size-asian="12pt" style:language-asian="zh" style:country-asian="CN" style:font-name-complex="Arial2" style:font-size-complex="12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Times New Roman" fo:font-size="12pt" fo:language="de" fo:country="AT" style:letter-kerning="true" style:font-name-asian="SimSun" style:font-size-asian="12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rial1" fo:font-family="Arial"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Arial" style:font-family-complex="Arial" style:font-family-generic-complex="swiss"/>
    </style:style>
    <style:style style:name="Heading_20_1" style:display-name="Heading 1" style:family="paragraph" style:parent-style-name="Heading" style:next-style-name="Text_20_body" style:default-outline-level="1" style:class="chapter">
      <style:text-properties fo:font-size="115%" fo:font-weight="bold" style:font-size-asian="115%" style:font-weight-asian="bold" style:font-size-complex="115%"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chapter">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chapter">
      <style:text-properties fo:font-size="14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class="chapter">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Line_20_numbering" style:display-name="Line numbering" style:family="text"/>
    <style:style style:name="Graphics" style:family="graphic">
      <style:graphic-properties text:anchor-type="paragraph" svg:x="0cm" svg:y="0cm" style:wrap="none" style:vertical-pos="top" style:vertical-rel="paragraph" style:horizontal-pos="center" style:horizontal-rel="paragraph" fo:background-color="transparent" draw:fill="none" draw:fill-color="#cfe7f5"/>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1</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initial-creator>Harald M. Müller</meta:initial-creator>
    <meta:creation-date>2024-08-03T11:04:32.14</meta:creation-date>
    <dc:date>2026-05-17T19:34:57.865447300</dc:date>
    <meta:editing-duration>P16DT12H56M46S</meta:editing-duration>
    <meta:editing-cycles>987</meta:editing-cycles>
    <meta:generator>LibreOffice/25.8.5.2$Windows_X86_64 LibreOffice_project/9c8b85f387cc00a89945a79c9e6239f32e450ac2</meta:generator>
    <meta:print-date>2026-03-21T14:21:09.186518700</meta:print-date>
    <meta:printed-by>PDF-Dateien</meta:printed-by>
    <meta:document-statistic meta:table-count="2" meta:image-count="19" meta:object-count="0" meta:page-count="39" meta:paragraph-count="761" meta:word-count="11630" meta:character-count="68473" meta:non-whitespace-character-count="57552"/>
  </office:meta>
</office:document-meta>
</file>