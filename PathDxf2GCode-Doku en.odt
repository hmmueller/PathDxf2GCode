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Text_20_body" style:list-style-name="L26">
      <style:text-properties officeooo:rsid="00450407" officeooo:paragraph-rsid="00450407"/>
    </style:style>
    <style:style style:name="P54" style:family="paragraph" style:parent-style-name="Heading_20_4">
      <style:text-properties officeooo:paragraph-rsid="003e40e3"/>
    </style:style>
    <style:style style:name="P55" style:family="paragraph" style:parent-style-name="Text_20_body">
      <style:text-properties officeooo:rsid="006c8dae" officeooo:paragraph-rsid="003ff118"/>
    </style:style>
    <style:style style:name="P56" style:family="paragraph" style:parent-style-name="Standard">
      <style:text-properties style:font-name="Cascadia Mono1" fo:font-size="10pt" officeooo:paragraph-rsid="003e40e3" style:font-size-asian="10pt" style:font-size-complex="10pt"/>
    </style:style>
    <style:style style:name="P57" style:family="paragraph" style:parent-style-name="Text_20_body">
      <style:text-properties officeooo:rsid="006c8dae" officeooo:paragraph-rsid="003e40e3"/>
    </style:style>
    <style:style style:name="P58" style:family="paragraph" style:parent-style-name="Standard">
      <style:text-properties officeooo:paragraph-rsid="003e40e3"/>
    </style:style>
    <style:style style:name="P59" style:family="paragraph" style:parent-style-name="Heading_20_4">
      <style:text-properties officeooo:paragraph-rsid="0017f6ec"/>
    </style:style>
    <style:style style:name="P60" style:family="paragraph" style:parent-style-name="Text_20_body">
      <style:text-properties officeooo:paragraph-rsid="001b7b42"/>
    </style:style>
    <style:style style:name="P61" style:family="paragraph" style:parent-style-name="Text_20_body" style:list-style-name="L27"/>
    <style:style style:name="P6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3" style:family="paragraph" style:parent-style-name="Text_20_body">
      <style:paragraph-properties fo:margin-left="1.251cm" fo:margin-right="0cm" fo:margin-top="0cm" fo:margin-bottom="0.212cm" style:contextual-spacing="false" fo:text-indent="-0.582cm" style:auto-text-indent="false"/>
    </style:style>
    <style:style style:name="P6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5" style:family="paragraph" style:parent-style-name="Text_20_body">
      <style:paragraph-properties fo:margin-left="0cm" fo:margin-right="0cm" fo:margin-top="0cm" fo:margin-bottom="0.212cm" style:contextual-spacing="false" fo:text-indent="0cm" style:auto-text-indent="false"/>
    </style:style>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text-properties fo:font-style="italic" style:font-style-asian="italic" style:font-style-complex="italic"/>
    </style:style>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text-properties fo:language="en" fo:country="GB"/>
    </style:style>
    <style:style style:name="P75" style:family="paragraph" style:parent-style-name="Text_20_body" style:list-style-name="L35">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6">
      <style:text-properties fo:language="en" fo:country="GB"/>
    </style:style>
    <style:style style:name="P83" style:family="paragraph" style:parent-style-name="Text_20_body" style:list-style-name="L33">
      <style:text-properties fo:language="en" fo:country="GB"/>
    </style:style>
    <style:style style:name="P84" style:family="paragraph" style:parent-style-name="Text_20_body" style:list-style-name="L33">
      <style:text-properties fo:language="en" fo:country="GB" officeooo:paragraph-rsid="0036199f"/>
    </style:style>
    <style:style style:name="P8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6" style:family="paragraph" style:parent-style-name="Text_20_body">
      <style:text-properties fo:language="en" fo:country="GB" officeooo:rsid="005119f7" officeooo:paragraph-rsid="0022a007"/>
    </style:style>
    <style:style style:name="P87" style:family="paragraph" style:parent-style-name="Text_20_body">
      <style:text-properties fo:language="en" fo:country="GB" officeooo:rsid="002be1a5" officeooo:paragraph-rsid="002be1a5"/>
    </style:style>
    <style:style style:name="P88" style:family="paragraph" style:parent-style-name="Text_20_body">
      <style:text-properties style:font-name="Cascadia Mono1" fo:font-size="10pt" style:font-size-asian="10pt" style:font-size-complex="10pt"/>
    </style:style>
    <style:style style:name="P89"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0" style:family="paragraph" style:parent-style-name="Text_20_body" style:list-style-name="L37"/>
    <style:style style:name="P91" style:family="paragraph" style:parent-style-name="Text_20_body" style:list-style-name="L38"/>
    <style:style style:name="P92" style:family="paragraph" style:parent-style-name="Heading_20_3">
      <style:text-properties fo:language="en" fo:country="GB"/>
    </style:style>
    <style:style style:name="P93" style:family="paragraph" style:parent-style-name="Heading_20_4">
      <style:text-properties fo:language="en" fo:country="GB"/>
    </style:style>
    <style:style style:name="P94" style:family="paragraph" style:parent-style-name="Text_20_body" style:list-style-name="L39"/>
    <style:style style:name="P95" style:family="paragraph" style:parent-style-name="Text_20_body">
      <style:text-properties fo:font-size="12pt" style:font-size-asian="12pt" style:font-size-complex="12pt"/>
    </style:style>
    <style:style style:name="P96" style:family="paragraph" style:parent-style-name="Text_20_body" style:list-style-name="L40">
      <style:text-properties fo:font-size="12pt" style:font-size-asian="12pt" style:font-size-complex="12pt"/>
    </style:style>
    <style:style style:name="P97" style:family="paragraph" style:parent-style-name="Text_20_body" style:list-style-name="L41">
      <style:text-properties fo:font-size="12pt" style:font-size-asian="12pt" style:font-size-complex="12pt"/>
    </style:style>
    <style:style style:name="P98" style:family="paragraph" style:parent-style-name="Text_20_body" style:list-style-name="L42">
      <style:text-properties fo:font-size="12pt" style:font-size-asian="12pt" style:font-size-complex="12pt"/>
    </style:style>
    <style:style style:name="P99" style:family="paragraph" style:parent-style-name="Text_20_body">
      <style:paragraph-properties fo:margin-left="1.251cm" fo:margin-right="0cm" fo:text-indent="0cm" style:auto-text-indent="false"/>
      <style:text-properties fo:font-size="12pt" style:font-size-asian="12pt" style:font-size-complex="12pt"/>
    </style:style>
    <style:style style:name="P100" style:family="paragraph" style:parent-style-name="Text_20_body" style:list-style-name="L43">
      <style:text-properties fo:font-size="12pt" style:font-size-asian="12pt" style:font-size-complex="12pt"/>
    </style:style>
    <style:style style:name="P101" style:family="paragraph" style:parent-style-name="Text_20_body" style:list-style-name="L44"/>
    <style:style style:name="P102" style:family="paragraph" style:parent-style-name="Text_20_body" style:list-style-name="L45"/>
    <style:style style:name="P103" style:family="paragraph" style:parent-style-name="Text_20_body" style:list-style-name="L45">
      <style:text-properties style:font-name="Cascadia Mono1" fo:font-size="11pt" style:font-size-asian="11pt" style:font-size-complex="11pt"/>
    </style:style>
    <style:style style:name="P104" style:family="paragraph" style:parent-style-name="Text_20_body" style:list-style-name="L46"/>
    <style:style style:name="P105" style:family="paragraph" style:parent-style-name="Table_20_Heading">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text-properties officeooo:rsid="0069e89e" officeooo:paragraph-rsid="0069e89e"/>
    </style:style>
    <style:style style:name="P108" style:family="paragraph" style:parent-style-name="Table_20_Contents">
      <style:text-properties style:text-line-through-style="none" style:text-line-through-type="none" officeooo:rsid="0034b160" officeooo:paragraph-rsid="0034b160"/>
    </style:style>
    <style:style style:name="P109" style:family="paragraph" style:parent-style-name="Table_20_Contents">
      <style:text-properties officeooo:rsid="0034b160" officeooo:paragraph-rsid="0034b160"/>
    </style:style>
    <style:style style:name="P110" style:family="paragraph" style:parent-style-name="Table_20_Contents">
      <style:text-properties style:text-line-through-style="none" style:text-line-through-type="none"/>
    </style:style>
    <style:style style:name="P111" style:family="paragraph" style:parent-style-name="Table_20_Contents">
      <style:text-properties style:text-line-through-style="solid" style:text-line-through-type="single"/>
    </style:style>
    <style:style style:name="P112" style:family="paragraph" style:parent-style-name="Table_20_Contents">
      <style:text-properties officeooo:rsid="002d5c4a" officeooo:paragraph-rsid="002d5c4a"/>
    </style:style>
    <style:style style:name="P113" style:family="paragraph" style:parent-style-name="Table_20_Contents">
      <style:text-properties fo:font-weight="normal" style:font-weight-asian="normal" style:font-weight-complex="normal"/>
    </style:style>
    <style:style style:name="P114" style:family="paragraph" style:parent-style-name="Table_20_Contents">
      <style:text-properties fo:font-weight="normal" officeooo:rsid="002d5c4a" officeooo:paragraph-rsid="002d5c4a" style:font-weight-asian="normal" style:font-weight-complex="normal"/>
    </style:style>
    <style:style style:name="P115" style:family="paragraph" style:parent-style-name="Table_20_Contents">
      <style:text-properties officeooo:rsid="0014c3a5" officeooo:paragraph-rsid="0014c3a5"/>
    </style:style>
    <style:style style:name="P116" style:family="paragraph" style:parent-style-name="Table_20_Contents">
      <style:text-properties officeooo:rsid="002218e0" officeooo:paragraph-rsid="002218e0"/>
    </style:style>
    <style:style style:name="P117"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e40e3"/>
    </style:style>
    <style:style style:name="T3" style:family="text">
      <style:text-properties officeooo:rsid="00450407"/>
    </style:style>
    <style:style style:name="T4" style:family="text">
      <style:text-properties officeooo:rsid="001d85a7"/>
    </style:style>
    <style:style style:name="T5" style:family="text">
      <style:text-properties fo:font-style="italic" style:font-style-asian="italic" style:font-style-complex="italic"/>
    </style:style>
    <style:style style:name="T6" style:family="text">
      <style:text-properties fo:font-family="'Times New Roman'" style:font-family-generic="roman" style:font-family-asian="'Times New Roman'" style:font-family-generic-asian="roman" style:font-family-complex="'Times New Roman'" style:font-family-generic-complex="roman"/>
    </style:style>
    <style:style style:name="T7" style:family="text">
      <style:text-properties style:font-name="Cascadia Mono1" fo:font-size="11pt" style:font-size-asian="11pt" style:font-size-complex="11pt"/>
    </style:style>
    <style:style style:name="T8" style:family="text">
      <style:text-properties fo:font-style="normal" style:font-style-asian="normal" style:font-style-complex="normal"/>
    </style:style>
    <style:style style:name="T9" style:family="text">
      <style:text-properties officeooo:rsid="0009dff9"/>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officeooo:rsid="00414dff"/>
    </style:style>
    <style:style style:name="T14" style:family="text">
      <style:text-properties officeooo:rsid="00429850"/>
    </style:style>
    <style:style style:name="T15" style:family="text">
      <style:text-properties style:font-name="Cascadia Mono1" fo:font-size="10.5pt" style:font-size-asian="10.5pt" style:font-size-complex="10.5pt"/>
    </style:style>
    <style:style style:name="T16" style:family="text">
      <style:text-properties fo:language="en" fo:country="GB"/>
    </style:style>
    <style:style style:name="T17" style:family="text">
      <style:text-properties fo:font-family="'Times New Roman'" style:font-family-generic="roman"/>
    </style:style>
    <style:style style:name="T18" style:family="text">
      <style:text-properties style:font-name="Times New Roman"/>
    </style:style>
    <style:style style:name="T19" style:family="text">
      <style:text-properties officeooo:rsid="00116559"/>
    </style:style>
    <style:style style:name="T20" style:family="text">
      <style:text-properties officeooo:rsid="0017e84f"/>
    </style:style>
    <style:style style:name="T21" style:family="text">
      <style:text-properties officeooo:rsid="000eb703"/>
    </style:style>
    <style:style style:name="T22" style:family="text">
      <style:text-properties officeooo:rsid="000fc49f"/>
    </style:style>
    <style:style style:name="T23" style:family="text">
      <style:text-properties style:font-name="Times New Roman" fo:language="en" fo:country="GB"/>
    </style:style>
    <style:style style:name="T24" style:family="text">
      <style:text-properties officeooo:rsid="001b7b42"/>
    </style:style>
    <style:style style:name="T25" style:family="text">
      <style:text-properties officeooo:rsid="00639376"/>
    </style:style>
    <style:style style:name="T26" style:family="text">
      <style:text-properties officeooo:rsid="0039b2dd"/>
    </style:style>
    <style:style style:name="T27" style:family="text">
      <style:text-properties officeooo:rsid="00645474"/>
    </style:style>
    <style:style style:name="T28" style:family="text">
      <style:text-properties officeooo:rsid="006c8dae"/>
    </style:style>
    <style:style style:name="T29" style:family="text">
      <style:text-properties officeooo:rsid="003ff118"/>
    </style:style>
    <style:style style:name="T30"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31" style:family="text">
      <style:text-properties style:font-name="Cascadia Mono1" fo:font-size="10pt" style:font-size-asian="10pt" style:font-size-complex="10pt"/>
    </style:style>
    <style:style style:name="T32" style:family="text">
      <style:text-properties style:font-name="Cascadia Mono1" fo:font-size="10pt" officeooo:rsid="006c8dae" style:font-size-asian="10pt" style:font-size-complex="10pt"/>
    </style:style>
    <style:style style:name="T33" style:family="text">
      <style:text-properties officeooo:rsid="001973fa"/>
    </style:style>
    <style:style style:name="T34" style:family="text">
      <style:text-properties officeooo:rsid="0019f08c"/>
    </style:style>
    <style:style style:name="T35" style:family="text">
      <style:text-properties officeooo:rsid="0019a1e2"/>
    </style:style>
    <style:style style:name="T36"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7" style:family="text">
      <style:text-properties officeooo:rsid="001f6add"/>
    </style:style>
    <style:style style:name="T38" style:family="text">
      <style:text-properties fo:color="#a31515" loext:opacity="100%" style:font-name="Cascadia Mono" fo:font-size="9.5pt" style:font-name-asian="Cascadia Mono" style:font-size-asian="9.5pt" style:font-name-complex="Cascadia Mono" style:font-size-complex="9.5pt"/>
    </style:style>
    <style:style style:name="T39" style:family="text">
      <style:text-properties fo:font-size="12pt"/>
    </style:style>
    <style:style style:name="T40" style:family="text">
      <style:text-properties officeooo:rsid="002aa951"/>
    </style:style>
    <style:style style:name="T41" style:family="text">
      <style:text-properties officeooo:rsid="002be1a5"/>
    </style:style>
    <style:style style:name="T42" style:family="text">
      <style:text-properties officeooo:rsid="0036199f"/>
    </style:style>
    <style:style style:name="T43" style:family="text">
      <style:text-properties officeooo:rsid="00371447"/>
    </style:style>
    <style:style style:name="T44" style:family="text">
      <style:text-properties officeooo:rsid="0038dd61"/>
    </style:style>
    <style:style style:name="T45" style:family="text">
      <style:text-properties officeooo:rsid="0028e662"/>
    </style:style>
    <style:style style:name="T46" style:family="text">
      <style:text-properties officeooo:rsid="0022a007"/>
    </style:style>
    <style:style style:name="T47" style:family="text">
      <style:text-properties officeooo:rsid="00260afb"/>
    </style:style>
    <style:style style:name="T48" style:family="text">
      <style:text-properties officeooo:rsid="00270284"/>
    </style:style>
    <style:style style:name="T49" style:family="text">
      <style:text-properties style:font-name="Cascadia Mono1" fo:font-size="11pt" fo:language="en" fo:country="GB" style:font-size-asian="11pt" style:font-size-complex="11pt"/>
    </style:style>
    <style:style style:name="T50" style:family="text">
      <style:text-properties fo:color="#000000" loext:opacity="100%" style:font-name="Cascadia Mono" fo:font-size="11pt" style:font-name-asian="Cascadia Mono" style:font-size-asian="11pt" style:font-name-complex="Cascadia Mono" style:font-size-complex="11pt"/>
    </style:style>
    <style:style style:name="T51" style:family="text">
      <style:text-properties fo:font-size="11pt" style:font-size-asian="11pt" style:font-size-complex="11pt"/>
    </style:style>
    <style:style style:name="T52" style:family="text">
      <style:text-properties fo:color="#000000" loext:opacity="100%" style:font-name="Cascadia Mono" style:font-name-asian="Cascadia Mono" style:font-name-complex="Cascadia Mono"/>
    </style:style>
    <style:style style:name="T53" style:family="text">
      <style:text-properties fo:color="#000000" loext:opacity="100%" style:font-name="Times New Roman" style:font-name-asian="Cascadia Mono" style:font-name-complex="Cascadia Mono"/>
    </style:style>
    <style:style style:name="T54" style:family="text">
      <style:text-properties style:font-name="Times New Roman" fo:font-size="12pt" style:font-size-asian="12pt" style:font-size-complex="12pt"/>
    </style:style>
    <style:style style:name="T55" style:family="text">
      <style:text-properties officeooo:rsid="0031b938"/>
    </style:style>
    <style:style style:name="T56" style:family="text">
      <style:text-properties officeooo:rsid="00339bd5"/>
    </style:style>
    <style:style style:name="T57" style:family="text">
      <style:text-properties officeooo:rsid="002d5c4a"/>
    </style:style>
    <style:style style:name="T58" style:family="text">
      <style:text-properties officeooo:rsid="0014c3a5"/>
    </style:style>
    <style:style style:name="T59"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text:span><text:span text:style-name="T3">1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4">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5">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5">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5">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5">models </text:span>which are assembled from somewhat standardized <text:span text:style-name="T5">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7">.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8"><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34"><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5">proxy line</text:span><text:span text:style-name="T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9">h</text:span>e default value for this option is <text:span text:style-name="T10">([0-9]{4})[.]([0-9]+)([A-Z])</text:span><text:span text:style-name="T11">,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1">You can use the options </text:span><text:span text:style-name="T12">/n</text:span><text:span text:style-name="T11"> and </text:span><text:span text:style-name="T12">/p</text:span><text:span text:style-name="T11"> to specify other path name patterns (see p. </text:span><text:span text:style-name="T11"><text:bookmark-ref text:reference-format="page" text:ref-name="__RefHeading__1108_1253387321">30</text:bookmark-ref></text:span><text:span text:style-name="T11">). The patterns must correspond with each other, as they are used to find the DXF files that contains paths in subpath embeddings (for details, see p. </text:span><text:span text:style-name="T11"><text:bookmark-ref text:reference-format="page" text:ref-name="__RefHeading__1263_1253387321">20</text:bookmark-ref></text:span><text:span text:style-name="T11">).</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5"><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55253194"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55253194"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text:span text:style-name="T13">or </text:span>at the bottom right</text:p>
        </text:list-item>
        <text:list-item>
          <text:p text:style-name="P29">or at the center.</text:p>
        </text:list-item>
      </text:list>
      <text:p text:style-name="Text_20_body"><text:span text:style-name="T13">If the anchor is not at the center, </text:span>the text must not be rotated. <text:span text:style-name="T13">Finally, it must not be </text:span>oriented from bottom to top or from right to left. <text:s/>In practice, it is best to choose the anchor point <text:span text:style-name="T13">at </text:span>the <text:span text:style-name="T13">center</text:span>, because then the center of the overlapping circle of the text does not move when scaling the text, <text:span text:style-name="T13">or when the path, together with its text, is rotated by 90°</text:span>.</text:p>
      <text:p text:style-name="Text_20_body">The images <text:span text:style-name="T14">shown in previous sections</text:span>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9"><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8"><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40"><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5">2916.1P~A</text:span> (which is shwon here in the customary blue color). With this, a reliable assignment of the B1 text to the arc is possible:</text:p>
      <text:p text:style-name="P33"><draw:frame draw:style-name="fr1" draw:name="Grafik12" text:anchor-type="paragraph" svg:width="6.597cm" svg:height="4.722cm" draw:z-index="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1"><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6">R: File name suffix; this text is added to the names of the generated files. The purpose is to provide information about the variable assignments in the file name – see p. </text:span><text:span text:style-name="T16"><text:bookmark-ref text:reference-format="page" text:ref-name="__RefHeading__5504_585828919">24</text:bookmark-ref></text:span><text:span text:style-name="T16">. The default value is an empty text, i.e. the names of the generated files are taken directly from the name of the DXF file.</text:span></text:p>
        </text:list-item>
        <text:list-item>
          <text:p text:style-name="P37"><text:span text:style-name="T16">Z: Measuring speed in mm/min; if the value is not specified, the current F value ist used (however, this value is typically much too large!</text:span><text:span text:style-name="T1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6">).</text:span></text:p>
        </text:list-item>
        <text:list-item>
          <text:p text:style-name="P39">A: Greatest helix diameter in mm; if A is not given, the value 4 <text:span text:style-name="T17">·</text:span><text:span text:style-name="T18"> O is used. For rationale and usage of this value see p. </text:span><text:span text:style-name="T18"><text:bookmark-ref text:reference-format="page" text:ref-name="__RefHeading__4890_1453201033">18</text:bookmark-ref></text:span><text:span text:style-name="T18">.</text:span></text:p>
        </text:list-item>
        <text:list-item>
          <text:p text:style-name="P39"><text:span text:style-name="T18">W: First milling depth for sweepless milling (see p. </text:span><text:span text:style-name="T18"><text:bookmark-ref text:reference-format="page" text:ref-name="__RefHeading__6527_207922309">20</text:bookmark-ref></text:span><text:span text:style-name="T18">).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8"><text:bookmark-ref text:reference-format="page" text:ref-name="__RefHeading__3017_1578383688">17</text:bookmark-ref></text:span><text:span text:style-name="T18">)—must be in an open area.</text:span></text:p>
        </text:list-item>
      </text:list>
      <text:h text:style-name="P40" text:outline-level="3"><text:bookmark-start text:name="__RefHeading___Toc5553_2169950967"/>4.2.8. <text:span text:style-name="T19">Specifying path parameters with a </text:span><text:span text:style-name="T20">@ </text:span><text:span text:style-name="T19">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5">pathname</text:span> at their starting poitns. Here is an example:</text:p>
      <text:p text:style-name="P42"><text:soft-page-break/><draw:frame draw:style-name="fr3" draw:name="Bild1" text:anchor-type="as-char" svg:width="6.669cm" svg:height="6.849cm" draw:z-index="4"><draw:image xlink:href="Pictures/1000000000000274000002857638C9C3.png" xlink:type="simple" xlink:show="embed" xlink:actuate="onLoad" draw:mime-type="image/png"/></draw:frame></text:p>
      <text:p text:style-name="P43"><text:span text:style-name="T21">Such a @ reference must not contain other parameters, and the referenced path must be in the same DXF file as the reference</text:span>.</text:p>
      <text:h text:style-name="Heading_20_3" text:outline-level="3"><text:bookmark-start text:name="__RefHeading___Toc5555_2169950967"/>4.2.<text:span text:style-name="T22">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22">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758173925" text:style-name="L20">
        <text:list-item>
          <text:p text:style-name="P45"><text:soft-page-break/>I: Infeed in mm; if this specification is missing, the I value of the path is used.</text:p>
        </text:list-item>
        <text:list-item>
          <text:p text:style-name="P45">W: <text:span text:style-name="T23">First milling depth for sweepless milling (see p. </text:span><text:span text:style-name="T23"><text:bookmark-ref text:reference-format="page" text:ref-name="__RefHeading__6527_207922309">20</text:bookmark-ref></text:span><text:span text:style-name="T23">);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71405939685329" text:continue-list="list2758173925"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22">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71404171686673"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22">2</text:span>.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22">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2"><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22">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22">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4">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5">H: </text:span><text:span text:style-name="T26">Additional height if the material is mounted on a support; default value 0</text:span><text:span text:style-name="T27">.</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3">The T value of an embedded subpath must not be larger than the T value of the embedding path.</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4" text:outline-level="4"><text:bookmark-start text:name="__RefHeading___Toc7235_3755525066"/><text:span text:style-name="T28">4.2.15.2. </text:span><text:span text:style-name="T29">R</text:span><text:span text:style-name="T30">e</text:span><text:span text:style-name="T29">stricting called subpaths</text:span><text:bookmark-end text:name="__RefHeading___Toc7235_3755525066"/></text:h>
      <text:p text:style-name="P55">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5">To prevent such errors, pairs of regular expressions can be specified using /e parameters, meaning that a path matching the first expression in a pair may only call subpaths that match the second expression. The example rule can be formulated as follows:</text:p>
      <text:p text:style-name="P56"><text:s text:c="3"/>/<text:span text:style-name="T28">e L$:L$ /e R$:R$</text:span></text:p>
      <text:p text:style-name="P57">To allow these global rules to be overridden for a specific path, the second regular expression can be overridden using the E parameter. For example, the following path parameter can be used to call <text:s/>paths ending in L <text:span text:style-name="T29">as well as paths </text:span>ending in P:</text:p>
      <text:p text:style-name="P58"><text:span text:style-name="T31"><text:s text:c="3"/></text:span><text:span text:style-name="T32">E[LP]$</text:span></text:p>
      <text:h text:style-name="P59"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3">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3">once more </text:span>replaced by <text:span text:style-name="T33">dash-dotted</text:span> lines.</text:p>
      <text:p text:style-name="P60"><text:span text:style-name="T33">Dotted lines accept </text:span>the <text:span text:style-name="T24">parameters</text:span><text:span text:style-name="T34"> </text:span>for &gt;, T, O, and M so that switching to a dotted line is sufficient to skip the embedding. However, the<text:span text:style-name="T35">se</text:span> <text:span text:style-name="T24">parameters</text:span><text:span text:style-name="T34"> </text:span>are completely ignored. </text:p>
      <text:h text:style-name="Heading_20_3" text:outline-level="3"><text:bookmark-start text:name="__RefHeading___Toc5559_2169950967"/><text:soft-page-break/>4.2.1<text:span text:style-name="T22">6</text:span>. Subpath embeddings with variables<text:bookmark-end text:name="__RefHeading___Toc5559_2169950967"/></text:h>
      <text:h text:style-name="Heading_20_4" text:outline-level="4"><text:bookmark-start text:name="__RefHeading___Toc5561_2169950967"/>4.2.1<text:span text:style-name="T22">6</text:span>.1. Example for a combined clamping and <text:span text:style-name="T36">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5"><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1">In the clamping project, the paths of the handles are no longer defined as fixed values, but are specified as variables.</text:p>
        </text:list-item>
        <text:list-item>
          <text:p text:style-name="P61">The clamping project defines at its start point which variables and which values are permissible.</text:p>
        </text:list-item>
        <text:list-item>
          <text:p text:style-name="P61"><text:soft-page-break/>In a surrounding variables project, specific values are assigned to the variables.</text:p>
        </text:list-item>
        <text:list-item>
          <text:p text:style-name="P61">The names of the files generated from the variable project contain information about the variable values used.</text:p>
        </text:list-item>
      </text:list>
      <text:p text:style-name="Text_20_body">The necessary texts are shown in the following:</text:p>
      <text:p text:style-name="P62">Ad 1. In the clamping project, the embedded paths are specified using = variables,</text:p>
      <text:p text:style-name="P63">Ad 2. the variables used and their possible values are defined at the starting point. The possible values here are P1 and P2, which are specified as comma-separated lists:</text:p>
      <text:p text:style-name="P63"/>
      <text:p text:style-name="Text_20_body"><draw:frame draw:style-name="fr2" draw:name="Grafik16" text:anchor-type="paragraph" svg:width="10.442cm" svg:height="10.213cm" draw:z-index="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4">Ad 3. The variables project consists only of a call to the clamping project, where values are assigned to the variables:</text:p>
      <text:p text:style-name="P65"><draw:frame draw:style-name="fr4" draw:name="Grafik17" text:anchor-type="paragraph" svg:x="4.26cm" svg:y="-0.064cm" svg:width="6.341cm" svg:height="6.174cm" draw:z-index="7"><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22">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22">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22">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22">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6">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6">For ranges of permissible values, the from and to values of the ranges are used alternately.</text:p>
        </text:list-item>
      </text:list>
      <text:h text:style-name="Heading_20_3" text:outline-level="3"><text:bookmark-start text:name="__RefHeading__1863_2102980402"/>4.2.1<text:span text:style-name="T22">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9"><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7">After the sweep from the starting point to the left star point, the segment annotated with N1 is milled.</text:p>
        </text:list-item>
        <text:list-item>
          <text:p text:style-name="P6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7">This milling run now reaches the star point on the left again. As both marked segments are now “used up” (because they have already been milled), the sweep in the middle is now selected.</text:p>
        </text:list-item>
        <text:list-item>
          <text:p text:style-name="P67">At the right star point, only the path to the end of the path remains.</text:p>
        </text:list-item>
      </text:list>
      <text:h text:style-name="Heading_20_2" text:outline-level="2"><text:bookmark-start text:name="__RefHeading__1371_695252532"/>4.3. Component <text:span text:style-name="T37">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8">([0-9]{4})(?:[.]([0-9]+))?</text:span>, which allows the following pathname patterns:</text:p>
      <text:list text:style-name="L30">
        <text:list-item>
          <text:p text:style-name="P68">4-digit number</text:p>
        </text:list-item>
        <text:list-item>
          <text:p text:style-name="P68">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text:style-name="L31">
        <text:list-item>
          <text:p text:style-name="P69">Pathname pattern </text:p>
          <text:list>
            <text:list-item>
              <text:p text:style-name="P70">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9">Pathname pattern–pathname pattern</text:p>
          <text:list>
            <text:list-item>
              <text:p text:style-name="P70">Two path name patterns, separated by a minus sign.</text:p>
            </text:list-item>
            <text:list-item>
              <text:p text:style-name="P70">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1">First the directory where the currently processed DXF file is located;</text:p>
        </text:list-item>
        <text:list-item>
          <text:p text:style-name="P71">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2"><draw:image xlink:href="Pictures/10000000000002C4000001E053CB3483.png" xlink:type="simple" xlink:show="embed" xlink:actuate="onLoad" draw:mime-type="image/png"/></draw:frame></text:p>
      <text:p text:style-name="Text_20_body">At least the following parameters must be specified for a project path:</text:p>
      <text:list xml:id="list2139908868" text:style-name="L33">
        <text:list-item>
          <text:p text:style-name="P72">O, because the milling diameter for a project milling pass is fixed; and must be checked against the O specification in embedded paths;</text:p>
        </text:list-item>
        <text:list-item>
          <text:p text:style-name="P72">T, because for safety reasons it must always be clear from which depth drilling (G01) instead of an sweep (G00) is necessary for vertical runs.</text:p>
        </text:list-item>
        <text:list-item>
          <text:p text:style-name="P7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5">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5">In the G-code file that PathDxf2GCode generates, a formula expression is stored for each Z-coordinate that describes the correction of the Z-value as a function of the measured values at the Z-probe points.</text:p>
        </text:list-item>
        <text:list-item>
          <text:p text:style-name="P75">After the measurement run, another program called PathGCodeAdjustZ is used to “recalculate” the G-code file with the values from the text file and the formulas.</text:p>
        </text:list-item>
        <text:list-item>
          <text:p text:style-name="P75">I then carry out the milling process with this improved G-code file.</text:p>
        </text:list-item>
      </text:list>
      <text:p text:style-name="P74">The entire workflow looks like this:</text:p>
      <text:p text:style-name="P74"><draw:custom-shape text:anchor-type="paragraph" draw:z-index="17" draw:name="Form1" draw:style-name="gr1" draw:text-style-name="P77" svg:width="3.121cm" svg:height="1.424cm" svg:x="6.022cm" svg:y="0.157cm"><text:p text:style-name="P76">..._Clean.gcode </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0" draw:name="Form2" draw:style-name="gr2" draw:text-style-name="P78" svg:width="2.477cm" svg:height="1.424cm" svg:x="12.942cm" svg:y="-0.019cm"><text:p text:style-name="P76">PathGCode-</text:p><text:p text:style-name="P76">AddZAdjusts</text:p></draw:rect></text:p>
      <text:p text:style-name="P74"><draw:custom-shape text:anchor-type="paragraph" draw:z-index="23" draw:name="Form3" draw:style-name="gr1" draw:text-style-name="P77" svg:width="2.408cm" svg:height="1.424cm" svg:x="0.086cm" svg:y="-0.194cm"><text:p text:style-name="P7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4" draw:style-name="gr3" draw:text-style-name="P76" svg:x1="5.281cm" svg:y1="1.188cm" svg:x2="6.022cm" svg:y2="0.407cm"><text:p/></draw:line><draw:line text:anchor-type="paragraph" draw:z-index="15" draw:name="Form5" draw:style-name="gr3" draw:text-style-name="P76" svg:x1="9.142cm" svg:y1="0.035cm" svg:x2="12.941cm" svg:y2="-0.032cm"><text:p/></draw:line><draw:custom-shape text:anchor-type="paragraph" draw:z-index="29" draw:name="Form6" draw:style-name="gr1" draw:text-style-name="P77" svg:width="2.814cm" svg:height="1.424cm" svg:x="9.313cm" svg:y="0.469cm"><text:p text:style-name="P76">edited</text:p><text:p text:style-name="P7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1" draw:name="Form7" draw:style-name="gr3" draw:text-style-name="P76" svg:x1="12.127cm" svg:y1="0.984cm" svg:x2="12.942cm" svg:y2="0.035cm"><text:p/></draw:line></text:p>
      <text:p text:style-name="Text_20_body"><draw:rect text:anchor-type="paragraph" draw:z-index="21" draw:name="Form8" draw:style-name="gr2" draw:text-style-name="P79" svg:width="2.211cm" svg:height="1.362cm" svg:x="3.071cm" svg:y="-0.009cm"><text:p text:style-name="P76"><text:span text:style-name="T39">PathDXF2-</text:span></text:p><text:p text:style-name="P76"><text:span text:style-name="T39">GCode</text:span></text:p></draw:rect><draw:line text:anchor-type="paragraph" draw:z-index="32" draw:name="Form9" draw:style-name="gr3" draw:text-style-name="P76" svg:x1="2.494cm" svg:y1="0.056cm" svg:x2="3.071cm" svg:y2="0.871cm"><text:p/></draw:line><draw:line text:anchor-type="paragraph" draw:z-index="18" draw:name="Form10" draw:style-name="gr3" draw:text-style-name="P76" svg:x1="14.231cm" svg:y1="0.007cm" svg:x2="14.469cm" svg:y2="1.065cm"><text:p/></draw:line></text:p>
      <text:p text:style-name="Text_20_body"><draw:custom-shape text:anchor-type="paragraph" draw:z-index="22" draw:name="Form11" draw:style-name="gr1" draw:text-style-name="P77" svg:width="3.121cm" svg:height="1.424cm" svg:x="12.908cm" svg:y="0.367cm"><text:p text:style-name="P76">..._Mill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2" draw:style-name="gr3" draw:text-style-name="P76" svg:x1="5.281cm" svg:y1="0.056cm" svg:x2="6.022cm" svg:y2="3.081cm"><text:p/></draw:line><draw:line text:anchor-type="paragraph" draw:z-index="13" draw:name="Form13" draw:style-name="gr3" draw:text-style-name="P76" svg:x1="5.281cm" svg:y1="0.056cm" svg:x2="6.362cm" svg:y2="1.453cm"><text:p/></draw:line></text:p>
      <text:p text:style-name="Text_20_body"><draw:custom-shape text:anchor-type="paragraph" draw:z-index="28" draw:name="Form14" draw:style-name="gr1" draw:text-style-name="P77" svg:width="2.952cm" svg:height="1.424cm" svg:x="6.362cm" svg:y="0.323cm"><text:p text:style-name="P76">Empty ..._Z.txt</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76" svg:x1="11.111cm" svg:y1="0.525cm" svg:x2="11.111cm" svg:y2="-0.203cm"><text:p/></draw:line></text:p>
      <text:p text:style-name="P74"><draw:line text:anchor-type="paragraph" draw:z-index="16" draw:name="Form16" draw:style-name="gr3" draw:text-style-name="P76" svg:x1="9.313cm" svg:y1="0.362cm" svg:x2="10.567cm" svg:y2="0.362cm"><text:p/></draw:line><draw:custom-shape text:anchor-type="paragraph" draw:z-index="31"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76" svg:x1="14.639cm" svg:y1="0.393cm" svg:x2="14.911cm" svg:y2="1.631cm"><text:p/></draw:line><text:soft-page-break/></text:p>
      <text:p text:style-name="Text_20_body"><draw:line text:anchor-type="paragraph" draw:z-index="14" draw:name="Form19" draw:style-name="gr3" draw:text-style-name="P76" svg:x1="11.144cm" svg:y1="0.959cm" svg:x2="11.144cm" svg:y2="0.153cm"><text:p/></draw:line></text:p>
      <text:p text:style-name="Text_20_body"><draw:custom-shape text:anchor-type="paragraph" draw:z-index="19" draw:name="Form20" draw:style-name="gr1" draw:text-style-name="P77" svg:width="3.121cm" svg:height="1.424cm" svg:x="6.022cm" svg:y="0.288cm"><text:p text:style-name="P76">..._Prob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0" draw:name="Form21" draw:style-name="gr5" draw:text-style-name="P81" svg:width="2.477cm" svg:height="1.424cm" svg:x="10.024cm" svg:y="0.261cm"><text:p text:style-name="P76">Measuring</text:p><text:p text:style-name="P76">run</text:p></draw:rect><draw:rect text:anchor-type="paragraph" draw:z-index="30" draw:name="Form22" draw:style-name="gr5" draw:text-style-name="P81" svg:width="2.477cm" svg:height="1.424cm" svg:x="14.198cm" svg:y="0.235cm"><text:p text:style-name="P76">Milling</text:p><text:p text:style-name="P76">run</text:p></draw:rect></text:p>
      <text:p text:style-name="Text_20_body"><draw:line text:anchor-type="paragraph" draw:z-index="33" draw:name="Form23" draw:style-name="gr3" draw:text-style-name="P76"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4">The Z-probe points are marked in the drawing by circles with line type dash-double dash (<text:span text:style-name="T40">DXF: </text:span>PHANTOM) <text:span text:style-name="T40">or dash-dot (DXF: DASHDOT) – </text:span><text:span text:style-name="T41">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74">The Z-probes can be arranged in two ways:</text:p>
      <text:list text:style-name="L36">
        <text:list-item>
          <text:p text:style-name="P82">outside the profiles; in this case, the probe must be placed at the respective point during the measuring run.</text:p>
        </text:list-item>
        <text:list-item>
          <text:p text:style-name="P82">on a profile; in this case, a conductive contact between the profile and the probe must be established during the measurement run.</text:p>
        </text:list-item>
      </text:list>
      <text:p text:style-name="P74">T<text:span text:style-name="T42">he following</text:span> parameters can be specified at a Z probe:</text:p>
      <text:list text:continue-list="list2139908868" text:style-name="L33">
        <text:list-item>
          <text:p text:style-name="P83">T: Sensor or material thickness in mm; if the specification is missing, the corresponding path specification is adopted at the starting point.</text:p>
        </text:list-item>
        <text:list-item>
          <text:p text:style-name="P84"><text:span text:style-name="T25">H: </text:span><text:span text:style-name="T26">Additional height if the material is mounted on a support; default value 0</text:span><text:span text:style-name="T27">.</text:span></text:p>
        </text:list-item>
        <text:list-item>
          <text:p text:style-name="P84">L: name of Z probe; this is shown in the _Z.txt file so that one can identify the Z probe locations in addition to their coordinate position.</text:p>
        </text:list-item>
        <text:list-item>
          <text:p text:style-name="P84">Z: <text:span text:style-name="T42">Measuring speed</text:span> in mm/min; <text:span text:style-name="T42">when missing, the Z value at the path start is used; if also this is missing, the /</text:span><text:span text:style-name="T43">z </text:span><text:span text:style-name="T44">option </text:span><text:span text:style-name="T42">value is used</text:span>.</text:p>
        </text:list-item>
      </text:list>
      <text:p text:style-name="P74">Here is a path drawing that contains two such Z-probes, each in the vicinity of subpaths:</text:p>
      <text:p text:style-name="P74"><draw:frame draw:style-name="fr2" draw:name="Grafik9" text:anchor-type="paragraph" svg:width="11.07cm" svg:height="6.708cm" draw:z-index="36"><draw:image xlink:href="Pictures/10000000000002780000016FEB6A8305.png" xlink:type="simple" xlink:show="embed" xlink:actuate="onLoad" draw:mime-type="image/png"/></draw:frame></text:p>
      <text:p text:style-name="P74">The resulting _Z.txt file looks like this:</text:p>
      <text:p text:style-name="P85"><text:soft-page-break/>@[138.000|299.000] #2001=</text:p>
      <text:p text:style-name="P85">@[242.000|264.000] #2002=</text:p>
      <text:p text:style-name="P86">Z <text:span text:style-name="T45">p</text:span>robes <text:span text:style-name="T46">can also have a dotted circumference </text:span>(DXF: DOT); <text:span text:style-name="T46">if so, they are ignored. This is useful if <text:s/>nearby subpaths also are dotted </text:span><text:span text:style-name="T47">and hence are skipped </text:span><text:span text:style-name="T46">(see p. </text:span><text:span text:style-name="T46"><text:bookmark-ref text:reference-format="page" text:ref-name="__RefHeading___Toc22675_1113469703">Fehler: Verweis nicht gefunden</text:bookmark-ref></text:span><text:span text:style-name="T46">), so that the corresponding Z-probes are </text:span><text:span text:style-name="T47">skipped as well </text:span><text:span text:style-name="T46">during </text:span><text:span text:style-name="T48">the </text:span><text:span text:style-name="T46">measuring run</text:span>.</text:p>
      <text:p text:style-name="P87">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5">@[138.000|299.000] #2001=5,1</text:p>
      <text:p text:style-name="P85">@[242.000|264.000] #2002= 5.25</text:p>
      <text:p text:style-name="P74">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4">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8"><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9"><text:s text:c="4"/>/h <text:s text:c="4"/>Help text</text:p>
      <text:p text:style-name="P89"><text:s text:c="4"/>/f 000 Milling speed in mm/min; required</text:p>
      <text:p text:style-name="P89"><text:s text:c="4"/>/z 000 Probing speed in mm/min; default is /f value</text:p>
      <text:p text:style-name="P89"><text:s text:c="4"/>/v 000 Maximum speed for sweeps in mm/min; required</text:p>
      <text:p text:style-name="P89"><text:s text:c="4"/>/s 000 Default sweep height in mm; required</text:p>
      <text:p text:style-name="P89"><text:s text:c="4"/>/c <text:s text:c="4"/>Check all paths in DXF file without writing GCode; if /c is not</text:p>
      <text:p text:style-name="P89"><text:s text:c="11"/>provided the DXF file must contain only one layer path</text:p>
      <text:p text:style-name="P89"><text:s text:c="4"/>/x zzz For all texts matching this regular expression, write assigned</text:p>
      <text:p text:style-name="P89"><text:s text:c="11"/>DXF objects; this is helpful for debugging parameter texts</text:p>
      <text:p text:style-name="P89"><text:s text:c="4"/>/d zzz Search path for references DXF files; can be specified multiple</text:p>
      <text:p text:style-name="P89"><text:s text:c="11"/>times; default is the location of the DXF file</text:p>
      <text:p text:style-name="P89"><text:soft-page-break/><text:s text:c="4"/>/n zzz Regular expression for path names; default value is </text:p>
      <text:p text:style-name="P89"><text:s text:c="11"/>([0-9]{4})[.]([0-9]+)([A-Z])</text:p>
      <text:p text:style-name="P89"><text:s text:c="4"/>/p zzz Regular expression for path patterns in file names; default is</text:p>
      <text:p text:style-name="P89"><text:s text:c="11"/>([0-9]{4})(?:[.]([0-9]+))?</text:p>
      <text:p text:style-name="P89"><text:s text:c="4"/>/l zzz Language</text:p>
      <text:p text:style-name="P89"/>
      <text:p text:style-name="Text_20_body">Example calls:</text:p>
      <text:p text:style-name="P88"><text:tab/>PathDxf2GCode /h</text:p>
      <text:p text:style-name="P88"><text:tab/>PathDxf2GCode /f150 /v1000 /s15 /d..\Components “2913 Ph.DXF“</text:p>
      <text:p text:style-name="P88"><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387451497" text:style-name="L37">
        <text:list-item>
          <text:p text:style-name="P90">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71405955814535" text:continue-numbering="true" text:style-name="L37">
        <text:list-item>
          <text:p text:style-name="P90">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9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1">Duplicate elements that lie exactly on top of each other; after traveling over one element and returning over the other “it doesn't go any further” → Solution: Remove duplicate elements.</text:p>
        </text:list-item>
        <text:list-item>
          <text:p text:style-name="P91">A line may not be in the path layer → Solution: Find the point in the drawing and move the line to the correct layer.</text:p>
        </text:list-item>
        <text:list-item>
          <text:p text:style-name="P91">Elements are used in the path that PathDxf2GCode does not support (e.g. splines) → <text:soft-page-break/>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6">.7.</text:span> <text:span text:style-name="T16">Calling PathGCodeAdjustZ</text:span><text:bookmark-end text:name="__RefHeading__7011_810929200"/></text:h>
      <text:h text:style-name="Heading_20_3" text:outline-level="3"><text:bookmark-start text:name="__RefHeading___Toc5591_2169950967"/>4<text:span text:style-name="T16">.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8"><text:tab/>PathGCodeAdjustZ 8001.27.1P_Clean.gcode 8001.27.2P.DXF</text:p>
      <text:p text:style-name="Text_20_body">The following options can also be specified:</text:p>
      <text:p text:style-name="P88"><text:s text:c="4"/>/h <text:s text:c="4"/>Help text<text:line-break/> <text:s text:c="3"/>/m 000 Maximum correction of Z values; required<text:line-break/> <text:s text:c="3"/>/x zzz Regex for lines to be written to standard output<text:line-break/> <text:s text:c="3"/>/l zzz Language</text:p>
      <text:h text:style-name="P92" text:outline-level="3"><text:bookmark-start text:name="__RefHeading___Toc5593_2169950967"/>4.7.2. Maximum Z correction<text:bookmark-end text:name="__RefHeading___Toc5593_2169950967"/></text:h>
      <text:p text:style-name="P7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2" text:outline-level="3"><text:bookmark-start text:name="__RefHeading___Toc5595_2169950967"/>4.7.3. Emitting statistics lines<text:bookmark-end text:name="__RefHeading___Toc5595_2169950967"/></text:h>
      <text:p text:style-name="Standard"><text:span text:style-name="T1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9">/x mm.*min</text:span><text:span text:style-name="T16">.</text:span></text:p>
      <text:h text:style-name="P92" text:outline-level="3"><text:bookmark-start text:name="__RefHeading___Toc5597_2169950967"/>4.7.4. Problems and their solutions<text:bookmark-end text:name="__RefHeading___Toc5597_2169950967"/></text:h>
      <text:h text:style-name="P93" text:outline-level="4"><text:bookmark-start text:name="__RefHeading___Toc5599_2169950967"/>4.7.4.1. “Line does not have the format ‘(comment) #...=value’”<text:bookmark-end text:name="__RefHeading___Toc5599_2169950967"/></text:h>
      <text:p text:style-name="P74">Usually the values are missing after the equal signs.</text:p>
      <text:p text:style-name="P74">If you want to mill without Z-adjustments, you can also send the respective _Clean.gcode file directly to the milling machine.</text:p>
      <text:h text:style-name="Heading_20_2" text:outline-level="2"><text:bookmark-start text:name="__RefHeading___Toc5601_2169950967"/>4.<text:span text:style-name="T16">8</text:span>. Milling run<text:bookmark-end text:name="__RefHeading___Toc5601_2169950967"/></text:h>
      <text:p text:style-name="Text_20_body">For the milling process</text:p>
      <text:list text:style-name="L39">
        <text:list-item>
          <text:p text:style-name="P94">the generated G-code files</text:p>
        </text:list-item>
        <text:list-item>
          <text:p text:style-name="P94">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95">The 6 passes are:</text:p>
      <text:list text:style-name="L40">
        <text:list-item>
          <text:p text:style-name="P96">DXF-Datei → <text:span text:style-name="T50">DxfDocument</text:span>; the netDxf library is used for this. The central method of this pass is <text:span text:style-name="T50">DxfFile.LoadDxfDocument</text:span>.</text:p>
        </text:list-item>
      </text:list>
      <text:list text:style-name="L41">
        <text:list-item>
          <text:p text:style-name="P97"><text:span text:style-name="T7">DxfDocument</text:span> → <text:span text:style-name="T7">RawPathModel</text:span>; <text:span text:style-name="T7">RawPathModel</text:span> is a temporary representation of the paths from a path drawing. Each path consists of</text:p>
        </text:list-item>
      </text:list>
      <text:list text:style-name="L42">
        <text:list-item>
          <text:p text:style-name="P98">path segments (types: <text:span text:style-name="T7">MillSegment</text:span>, <text:span text:style-name="T7">SweepSegment</text:span>, <text:span text:style-name="T7">HelixSegment</text:span>, <text:span text:style-name="T7">DrillSegment</text:span><text:span text:style-name="T51"> a</text:span>nd <text:span text:style-name="T7">SubpathSegment</text:span>),</text:p>
          <text:list>
            <text:list-item>
              <text:p text:style-name="P98">where MillSegments have a <text:span text:style-name="T7">MillingGeometry</text:span> of type <text:span text:style-name="T7">LineGeometry</text:span> or <text:span text:style-name="T7">ArcGeometry</text:span>;</text:p>
            </text:list-item>
          </text:list>
        </text:list-item>
        <text:list-item>
          <text:p text:style-name="P98">Markers (start and end points)</text:p>
        </text:list-item>
        <text:list-item>
          <text:p text:style-name="P98">and path parameters.</text:p>
        </text:list-item>
      </text:list>
      <text:p text:style-name="P99">The central method of this pass is <text:span text:style-name="T50">PathModel.TransformDxf2PathModel</text:span>.</text:p>
      <text:list text:style-name="L43">
        <text:list-item>
          <text:p text:style-name="P100">combining milling segments into milling chains; the central method for this is <text:span text:style-name="T50">PathModel.CreatePathModel</text:span>.</text:p>
        </text:list-item>
        <text:list-item>
          <text:p text:style-name="P100"><text:span text:style-name="T50">PathModel</text:span> → <text:span text:style-name="T50">GCode</text:span>-Liste; the central method of this text output is <text:span text:style-name="T50">PathModel.EmitGCode</text:span> together with the <text:span text:style-name="T52">EmitGCode</text:span>-methods in the <text:span text:style-name="T7">GCode</text:span>-hierarchy. </text:p>
        </text:list-item>
        <text:list-item>
          <text:p text:style-name="P100">Peephole optimizer of the GCode list (currently for summarizing consecutive sweeps); the central method for this is <text:span text:style-name="T50">GCodeHelpers.Optimize</text:span>, together with the <text:span text:style-name="T50">Gcode</text:span>-class hierarchy.</text:p>
        </text:list-item>
        <text:list-item>
          <text:p text:style-name="P100">output of the G-code file; the central methods <text:span text:style-name="T53">are </text:span><text:span text:style-name="T50">WriteGCodes</text:span> and <text:span text:style-name="T7">WriteZProbingGCode</text:span> in the <text:span text:style-name="T50">Program</text:span><text:span text:style-name="T53"> class,</text:span> the <text:span text:style-name="T50">AsString</text:span>-methods of the <text:span text:style-name="T50">Gcode</text:span>-hierarchy and the <text:span text:style-name="T7">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5">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text:style-name="L44">
        <text:list-item>
          <text:p text:style-name="P101">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2"><text:span text:style-name="T7">ChainParams, SweepParams, HelixParams, DrillParams, SubpathParams, ZProbeParams</text:span> → <text:span text:style-name="T7">PathParams</text:span></text:p>
        </text:list-item>
        <text:list-item>
          <text:p text:style-name="P103">MillParams<text:span text:style-name="T54">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4">the collection of all EntityObjects on paths</text:p>
        </text:list-item>
        <text:list-item>
          <text:p text:style-name="P104">the assignment of parameter texts to objects</text:p>
        </text:list-item>
        <text:list-item>
          <text:p text:style-name="P104">the evaluation of special markers (start, end, ZProbes)</text:p>
        </text:list-item>
        <text:list-item>
          <text:p text:style-name="P104">the loading of sub-paths</text:p>
        </text:list-item>
      </text:list>
      <text:p text:style-name="Text_20_body">is done to create a <text:span text:style-name="T7">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5">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6">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7">·</text:span><text:span text:style-name="T18"> </text:span>O</text:p>
          </table:table-cell>
        </table:table-row>
        <table:table-row>
          <table:table-cell table:style-name="Tabelle1.A2" office:value-type="string">
            <text:p text:style-name="P106">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E</text:p>
          </table:table-cell>
          <table:table-cell table:style-name="Tabelle1.A2" office:value-type="string">
            <text:p text:style-name="P107"><text:span text:style-name="T29">Allowed subpaths </text:span>(<text:span text:style-name="T29">r</text:span>eg. <text:span text:style-name="T29">Expression</text:span>)</text:p>
          </table:table-cell>
          <table:table-cell table:style-name="Tabelle1.A2" office:value-type="string">
            <text:p text:style-name="P107">Text</text:p>
          </table:table-cell>
          <table:table-cell table:style-name="Tabelle1.D2" office:value-type="string">
            <text:p text:style-name="Table_20_Contents">/<text:span text:style-name="T29">e</text:span></text:p>
          </table:table-cell>
        </table:table-row>
        <table:table-row>
          <table:table-cell table:style-name="Tabelle1.A2" office:value-type="string">
            <text:p text:style-name="P106">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6">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H</text:p>
          </table:table-cell>
          <table:table-cell table:style-name="Tabelle1.A2" office:value-type="string">
            <text:p text:style-name="P108">Height</text:p>
          </table:table-cell>
          <table:table-cell table:style-name="Tabelle1.A2" office:value-type="string">
            <text:p text:style-name="P109">Mm</text:p>
          </table:table-cell>
          <table:table-cell table:style-name="Tabelle1.D2" office:value-type="string">
            <text:p text:style-name="P109">0</text:p>
          </table:table-cell>
        </table:table-row>
        <table:table-row>
          <table:table-cell table:style-name="Tabelle1.A2" office:value-type="string">
            <text:p text:style-name="P106">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P</text:p>
          </table:table-cell>
          <table:table-cell table:style-name="Tabelle1.A2" office:value-type="string">
            <text:p text:style-name="P110">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R</text:p>
          </table:table-cell>
          <table:table-cell table:style-name="Tabelle1.A2" office:value-type="string">
            <text:p text:style-name="P11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6">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U</text:p>
          </table:table-cell>
          <table:table-cell table:style-name="Tabelle1.A2" office:value-type="string">
            <text:p text:style-name="P110">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6">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6">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5">z</text:span></text:p>
          </table:table-cell>
        </table:table-row>
        <table:table-row>
          <table:table-cell table:style-name="Tabelle1.A2" office:value-type="string">
            <text:p text:style-name="P106">&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6">.</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5">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10">BORDER</text:p>
          </table:table-cell>
          <table:table-cell table:style-name="Tabelle2.A2" office:value-type="string">
            <text:p text:style-name="P110">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2">Z probe</text:p>
          </table:table-cell>
          <table:table-cell table:style-name="Tabelle2.D2" office:value-type="string">
            <text:p text:style-name="P113">&gt; M T O <text:span text:style-name="T56">H</text:span></text:p>
            <text:p text:style-name="P114">T L Z <text:span text:style-name="T56">H</text:span></text:p>
          </table:table-cell>
        </table:table-row>
        <table:table-row>
          <table:table-cell table:style-name="Tabelle2.A2" office:value-type="string">
            <text:p text:style-name="Table_20_Contents">‍………..</text:p>
          </table:table-cell>
          <table:table-cell table:style-name="Tabelle2.A2" office:value-type="string">
            <text:p text:style-name="P115">DOT</text:p>
          </table:table-cell>
          <table:table-cell table:style-name="Tabelle2.A2" office:value-type="string">
            <text:p text:style-name="P115">Subpath as sweep</text:p>
            <text:p text:style-name="P116">Ignored Z <text:span text:style-name="T57">p</text:span>robe</text:p>
          </table:table-cell>
          <table:table-cell table:style-name="Tabelle2.D2" office:value-type="string">
            <text:p text:style-name="P113">&gt; <text:span text:style-name="T58">M T O </text:span><text:span text:style-name="T56">H</text:span></text:p>
            <text:p text:style-name="P117">T L Z <text:span text:style-name="T56">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57">p</text:span>robe</text:p>
          </table:table-cell>
          <table:table-cell table:style-name="Tabelle2.D2" office:value-type="string">
            <text:p text:style-name="Table_20_Contents"/>
            <text:p text:style-name="P113">T O M B I F D U P S A W</text:p>
            <text:p text:style-name="Table_20_Contents"/>
            <text:p text:style-name="Table_20_Contents">T L Z <text:span text:style-name="T59">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18T17:14:02.756269600</dc:date>
    <meta:editing-duration>P16DT12H57M6S</meta:editing-duration>
    <meta:editing-cycles>988</meta:editing-cycles>
    <meta:generator>LibreOffice/25.8.6.1$Windows_X86_64 LibreOffice_project/85297ec6e49ec4e6faaa6f11880d49294fc70e60</meta:generator>
    <meta:print-date>2026-03-21T14:21:09.186518700</meta:print-date>
    <meta:printed-by>PDF-Dateien</meta:printed-by>
    <meta:document-statistic meta:table-count="2" meta:image-count="19" meta:object-count="0" meta:page-count="39" meta:paragraph-count="761" meta:word-count="11630" meta:character-count="68473" meta:non-whitespace-character-count="57552"/>
  </office:meta>
</office:document-meta>
</file>